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Heading_20_3">
      <style:text-properties fo:language="ru" fo:country="RU"/>
    </style:style>
    <style:style style:name="P3" style:family="paragraph" style:parent-style-name="Standard">
      <style:text-properties fo:language="en" fo:country="US" officeooo:rsid="001defcb" officeooo:paragraph-rsid="001defcb"/>
    </style:style>
    <style:style style:name="P4" style:family="paragraph" style:parent-style-name="Standard">
      <style:text-properties fo:language="ru" fo:country="RU" officeooo:rsid="001defcb" officeooo:paragraph-rsid="001defcb"/>
    </style:style>
    <style:style style:name="P5" style:family="paragraph" style:parent-style-name="вариант_5f_ответа">
      <style:text-properties officeooo:rsid="002fa36a" officeooo:paragraph-rsid="002fa36a"/>
    </style:style>
    <style:style style:name="P6" style:family="paragraph" style:parent-style-name="вариант_5f_ошибка">
      <style:text-properties fo:language="en" fo:country="US"/>
    </style:style>
    <style:style style:name="P7" style:family="paragraph" style:parent-style-name="Standard">
      <style:text-properties fo:language="ru" fo:country="RU" officeooo:rsid="0020651f" officeooo:paragraph-rsid="0020651f"/>
    </style:style>
    <style:style style:name="P8" style:family="paragraph" style:parent-style-name="Standard">
      <style:text-properties fo:language="ru" fo:country="RU" officeooo:rsid="00218f57" officeooo:paragraph-rsid="00218f57"/>
    </style:style>
    <style:style style:name="P9" style:family="paragraph" style:parent-style-name="вариант_5f_ошибка">
      <style:text-properties fo:language="en" fo:country="US" officeooo:rsid="00218f57"/>
    </style:style>
    <style:style style:name="P10" style:family="paragraph" style:parent-style-name="Standard">
      <style:text-properties fo:language="en" fo:country="US" officeooo:rsid="0020651f" officeooo:paragraph-rsid="0021a319"/>
    </style:style>
    <style:style style:name="P11" style:family="paragraph" style:parent-style-name="Standard">
      <style:text-properties fo:language="ru" fo:country="RU" officeooo:rsid="002a1188" officeooo:paragraph-rsid="002a1188"/>
    </style:style>
    <style:style style:name="P12" style:family="paragraph" style:parent-style-name="вариант_5f_ошибка">
      <style:text-properties fo:language="en" fo:country="US" officeooo:rsid="002557f0"/>
    </style:style>
    <style:style style:name="P13" style:family="paragraph" style:parent-style-name="Standard">
      <style:text-properties fo:language="en" fo:country="US" officeooo:rsid="0020651f" officeooo:paragraph-rsid="00229cde"/>
    </style:style>
    <style:style style:name="P14" style:family="paragraph" style:parent-style-name="вариант_5f_ответа">
      <style:text-properties fo:language="en" fo:country="US" officeooo:rsid="002557f0"/>
    </style:style>
    <style:style style:name="P15" style:family="paragraph" style:parent-style-name="Heading_20_3">
      <style:text-properties officeooo:paragraph-rsid="002d06d5"/>
    </style:style>
    <style:style style:name="P16" style:family="paragraph" style:parent-style-name="List_20_Heading">
      <style:text-properties officeooo:paragraph-rsid="002d06d5"/>
    </style:style>
    <style:style style:name="P17" style:family="paragraph" style:parent-style-name="вариант_5f_ответа">
      <style:text-properties officeooo:paragraph-rsid="002d06d5"/>
    </style:style>
    <style:style style:name="P18" style:family="paragraph" style:parent-style-name="вариант_5f_ошибка">
      <style:text-properties fo:language="en" fo:country="US" officeooo:rsid="0020651f" officeooo:paragraph-rsid="002d06d5"/>
    </style:style>
    <style:style style:name="P19" style:family="paragraph" style:parent-style-name="Heading_20_3">
      <style:text-properties officeooo:paragraph-rsid="00378c59"/>
    </style:style>
    <style:style style:name="P20" style:family="paragraph" style:parent-style-name="блок_5f_кода">
      <style:text-properties officeooo:paragraph-rsid="0034aad4"/>
    </style:style>
    <style:style style:name="P21" style:family="paragraph" style:parent-style-name="List_20_Heading">
      <style:text-properties officeooo:paragraph-rsid="0034aad4"/>
    </style:style>
    <style:style style:name="P22" style:family="paragraph" style:parent-style-name="вариант_5f_ответа">
      <style:text-properties officeooo:paragraph-rsid="0034aad4"/>
    </style:style>
    <style:style style:name="P23" style:family="paragraph" style:parent-style-name="вариант_5f_ошибка">
      <style:text-properties fo:language="en" fo:country="US" officeooo:rsid="0020651f" officeooo:paragraph-rsid="0034aad4"/>
    </style:style>
    <style:style style:name="P24" style:family="paragraph" style:parent-style-name="Heading_20_3">
      <style:text-properties officeooo:paragraph-rsid="0034aad4"/>
    </style:style>
    <style:style style:name="P25" style:family="paragraph" style:parent-style-name="Standard">
      <style:text-properties fo:language="en" fo:country="US" officeooo:rsid="0020651f" officeooo:paragraph-rsid="0034aad4"/>
    </style:style>
    <style:style style:name="P26" style:family="paragraph" style:parent-style-name="Heading_20_3">
      <style:text-properties officeooo:paragraph-rsid="003ba098"/>
    </style:style>
    <style:style style:name="P27" style:family="paragraph" style:parent-style-name="блок_5f_кода">
      <style:text-properties officeooo:paragraph-rsid="003ba098"/>
    </style:style>
    <style:style style:name="P28" style:family="paragraph" style:parent-style-name="List_20_Heading">
      <style:text-properties officeooo:paragraph-rsid="003ba098"/>
    </style:style>
    <style:style style:name="P29" style:family="paragraph" style:parent-style-name="вариант_5f_ответа">
      <style:text-properties officeooo:paragraph-rsid="003ba098"/>
    </style:style>
    <style:style style:name="P30" style:family="paragraph" style:parent-style-name="вариант_5f_ошибка">
      <style:text-properties fo:language="en" fo:country="US" officeooo:rsid="0020651f" officeooo:paragraph-rsid="003ba098"/>
    </style:style>
    <style:style style:name="P31" style:family="paragraph" style:parent-style-name="Standard">
      <style:text-properties fo:language="en" fo:country="US" officeooo:rsid="0020651f" officeooo:paragraph-rsid="003ba098"/>
    </style:style>
    <style:style style:name="T1" style:family="text">
      <style:text-properties officeooo:rsid="001d7965"/>
    </style:style>
    <style:style style:name="T2" style:family="text">
      <style:text-properties fo:language="ru" fo:country="RU" officeooo:rsid="001d7965"/>
    </style:style>
    <style:style style:name="T3" style:family="text">
      <style:text-properties fo:language="en" fo:country="US" officeooo:rsid="002e062d"/>
    </style:style>
    <style:style style:name="T4" style:family="text">
      <style:text-properties fo:language="ru" fo:country="RU" officeooo:rsid="002e062d"/>
    </style:style>
    <style:style style:name="T5" style:family="text">
      <style:text-properties fo:language="ru" fo:country="RU"/>
    </style:style>
    <style:style style:name="T6" style:family="text">
      <style:text-properties fo:color="#ff5429" loext:opacity="100%"/>
    </style:style>
    <style:style style:name="T7" style:family="text">
      <style:text-properties officeooo:rsid="0030f775"/>
    </style:style>
    <style:style style:name="T8" style:family="text">
      <style:text-properties officeooo:rsid="00378c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С++</text:span><text:span text:style-name="T2"> </text:span><text:span text:style-name="T3">П</text:span><text:span text:style-name="T4">родвинутый</text:span><text:span text:style-name="T5"> </text:span>уровень</text:h>
      <text:h text:style-name="Heading_20_3" text:outline-level="3">Какой из способов записи в файл является наиболее эффективным для бинаных данных?</text:h>
      <text:p text:style-name="List_20_Heading">правильный ответ:</text:p>
      <text:p text:style-name="вариант_5f_ответа">file.write(reinterpret_cast&lt;<text:span text:style-name="T6">char</text:span>*&gt;(&amp;num), <text:span text:style-name="T6">sizeof</text:span>(num))</text:p>
      <text:p text:style-name="List_20_Heading">ошибки:</text:p>
      <text:p text:style-name="вариант_5f_ошибка">file &lt;&lt; num</text:p>
      <text:p text:style-name="вариант_5f_ошибка">fprintf(file, "%d", num)</text:p>
      <text:p text:style-name="вариант_5f_ошибка">fread(str, file)</text:p>
      <text:p text:style-name="вариант_5f_ошибка">fputs(str, file)</text:p>
      <text:p text:style-name="Standard"/>
      <text:h text:style-name="Heading_20_3" text:outline-level="3">Как правильно организовать итерирование в цикле for?</text:h>
      <text:p text:style-name="блок_5f_кода">std::map&lt;<text:span text:style-name="T6">int</text:span>, std:string&gt; m = { {1, "a"}, {2, "b"}};</text:p>
      <text:p text:style-name="блок_5f_кода"><text:span text:style-name="T6">for</text:span> (_____) {</text:p>
      <text:p text:style-name="блок_5f_кода"><text:s text:c="4"/>std::cout &lt;&lt; p.first; <text:s text:c="2"/>// Ожидается 12</text:p>
      <text:p text:style-name="блок_5f_кода">}</text:p>
      <text:p text:style-name="List_20_Heading">правильный ответ:</text:p>
      <text:p text:style-name="вариант_5f_ответа"><text:span text:style-name="T6">const</text:span> <text:span text:style-name="T6">auto</text:span>&amp; p : m </text:p>
      <text:p text:style-name="List_20_Heading">ошибки:</text:p>
      <text:p text:style-name="вариант_5f_ошибка">auto p : m</text:p>
      <text:p text:style-name="вариант_5f_ошибка">auto &amp; p : *m</text:p>
      <text:p text:style-name="вариант_5f_ошибка">auto &amp;&amp; *p : m</text:p>
      <text:p text:style-name="вариант_5f_ошибка">const auto&amp; [key, val] : m</text:p>
      <text:p text:style-name="Standard"/>
      <text:h text:style-name="Heading_20_3" text:outline-level="3"><text:soft-page-break/>Вам нужно реализовать хранение данных для кэширования изображений в браузере на С++:</text:h>
      <text:h text:style-name="Heading_20_3" text:outline-level="3">1.При загрузке веб-страницы браузер должен быстро проверять, есть ли изображение в кэше, без перебора всех элементов.</text:h>
      <text:h text:style-name="Heading_20_3" text:outline-level="3">2.При достижении лимита кэша (например, 100 МБ) нужно удалять Least Recently Used (LRU) элементы.</text:h>
      <text:h text:style-name="Heading_20_3" text:outline-level="3">3.Если изображение запрашивается повторно, оно должно переместиться в начало кэша без полного перестроения кэша.</text:h>
      <text:h text:style-name="Heading_20_3" text:outline-level="3">Использование какого контейнера или контейнеров позволит эффективно реализовать хранение данных? </text:h>
      <text:p text:style-name="List_20_Heading">правильный ответ:</text:p>
      <text:p text:style-name="вариант_5f_ответа">std::list + std::unordered_map</text:p>
      <text:p text:style-name="List_20_Heading">ошибки:</text:p>
      <text:p text:style-name="вариант_5f_ошибка">std::deque + std::map</text:p>
      <text:p text:style-name="вариант_5f_ошибка">std::vector + std::unordered_map</text:p>
      <text:p text:style-name="вариант_5f_ошибка">std::stack + std::queue</text:p>
      <text:p text:style-name="вариант_5f_ошибка">std::list + std::ordered_map</text:p>
      <text:p text:style-name="Standard"/>
      <text:h text:style-name="P2" text:outline-level="3">Что такое "ковариантность возвращаемого типа"?</text:h>
      <text:p text:style-name="List_20_Heading">правильный ответ:</text:p>
      <text:p text:style-name="вариант_5f_ответа">Возможность вернуть производный тип при переопределении виртуальной функции</text:p>
      <text:p text:style-name="List_20_Heading">ошибки:</text:p>
      <text:p text:style-name="вариант_5f_ошибка">Автоматическое приведение возвращаемых типов</text:p>
      <text:p text:style-name="вариант_5f_ошибка">Совпадение типов возвращаемых значений в иерархии наследования</text:p>
      <text:p text:style-name="вариант_5f_ошибка">Возможность изменять тип возвращаемого значения при перегрузке</text:p>
      <text:p text:style-name="вариант_5f_ошибка">Автоматическое изменение типа возвращаемого значения при перегрузке</text:p>
      <text:p text:style-name="P3"/>
      <text:h text:style-name="Heading_20_3" text:outline-level="3">Выберите, что должно быть на месте пропуска, чтобы запретить переопределение метода foo для потомков класса В.</text:h>
      <text:p text:style-name="блок_5f_кода"><text:span text:style-name="T6">class</text:span> A {</text:p>
      <text:p text:style-name="блок_5f_кода"><text:span text:style-name="T6">public</text:span>:</text:p>
      <text:p text:style-name="блок_5f_кода"><text:s text:c="4"/><text:span text:style-name="T6">vitrual</text:span> <text:span text:style-name="T6">void</text:span> foo() <text:span text:style-name="T6">const</text:span> {}</text:p>
      <text:p text:style-name="блок_5f_кода"><text:soft-page-break/>};</text:p>
      <text:p text:style-name="блок_5f_кода"><text:span text:style-name="T6">class</text:span> B : <text:span text:style-name="T6">public</text:span> A {</text:p>
      <text:p text:style-name="блок_5f_кода"><text:span text:style-name="T6">public</text:span>:</text:p>
      <text:p text:style-name="блок_5f_кода"><text:s text:c="4"/>_____ <text:s text:c="3"/></text:p>
      <text:p text:style-name="блок_5f_кода">};</text:p>
      <text:p text:style-name="блок_5f_кода"><text:span text:style-name="T6">class</text:span> C : <text:span text:style-name="T6">public</text:span> B {</text:p>
      <text:p text:style-name="блок_5f_кода"><text:span text:style-name="T6">public</text:span>:</text:p>
      <text:p text:style-name="блок_5f_кода"><text:s text:c="4"/><text:span text:style-name="T6">void</text:span> foo() <text:span text:style-name="T6">const</text:span> <text:span text:style-name="T6">override</text:span> {} // Ожидается ошибка компиляции <text:s text:c="3"/></text:p>
      <text:p text:style-name="блок_5f_кода">};</text:p>
      <text:p text:style-name="List_20_Heading">правильный ответ:</text:p>
      <text:p text:style-name="вариант_5f_ответа"><text:span text:style-name="T6">void</text:span> foo() <text:span text:style-name="T6">const</text:span> <text:span text:style-name="T6">final</text:span> {} </text:p>
      <text:p text:style-name="List_20_Heading">ошибки:</text:p>
      <text:p text:style-name="вариант_5f_ошибка">virtual void foo() const {}</text:p>
      <text:p text:style-name="вариант_5f_ошибка">void foo() const override {}</text:p>
      <text:p text:style-name="вариант_5f_ошибка">void foo() const = delete</text:p>
      <text:p text:style-name="вариант_5f_ошибка">static void foo() const {}</text:p>
      <text:p text:style-name="P4"/>
      <text:h text:style-name="Heading_20_3" text:outline-level="3">Что выведет данный код на экран?</text:h>
      <text:p text:style-name="блок_5f_кода">#<text:span text:style-name="T6">include</text:span> &lt;functional&gt;</text:p>
      <text:p text:style-name="блок_5f_кода">#<text:span text:style-name="T6">include</text:span> &lt;iostream&gt;</text:p>
      <text:p text:style-name="блок_5f_кода"><text:span text:style-name="T6">int</text:span> bar(<text:span text:style-name="T6">int</text:span> x) { <text:span text:style-name="T6">return</text:span> x * 2; }</text:p>
      <text:p text:style-name="блок_5f_кода"><text:span text:style-name="T6">void</text:span> foo() {</text:p>
      <text:p text:style-name="блок_5f_кода"><text:s text:c="4"/><text:span text:style-name="T6">int</text:span> (*funcs[3])(<text:span text:style-name="T6">int</text:span>) = { [](<text:span text:style-name="T6">int</text:span> x) { <text:span text:style-name="T6">return</text:span> x + 1; }, bar, nullptr };</text:p>
      <text:p text:style-name="блок_5f_кода"><text:s text:c="4"/><text:span text:style-name="T6">auto</text:span> ptr = &amp;funcs[1];</text:p>
      <text:p text:style-name="блок_5f_кода"><text:s text:c="4"/>std::cout &lt;&lt; (*ptr)(5);</text:p>
      <text:p text:style-name="блок_5f_кода">}</text:p>
      <text:p text:style-name="List_20_Heading">правильный ответ:</text:p>
      <text:p text:style-name="P5">10</text:p>
      <text:p text:style-name="List_20_Heading">ошибки:</text:p>
      <text:p text:style-name="вариант_5f_ошибка">Ошибка компиляции из-за неверного синтаксиса</text:p>
      <text:p text:style-name="вариант_5f_ошибка">6</text:p>
      <text:p text:style-name="вариант_5f_ошибка">Код имеет неопределенное поведение</text:p>
      <text:p text:style-name="вариант_5f_ошибка">12</text:p>
      <text:p text:style-name="P4"/>
      <text:h text:style-name="Heading_20_3" text:outline-level="3">Укажите, какая строка должна быть на месте пропуска, чтобы исключение было корректно обработано и в консоль было бы выведено S:</text:h>
      <text:p text:style-name="блок_5f_кода"><text:span text:style-name="T6">class</text:span> GeneralException : <text:span text:style-name="T6">public</text:span> std::exception {</text:p>
      <text:p text:style-name="блок_5f_кода"><text:span text:style-name="T6">public</text:span>:</text:p>
      <text:p text:style-name="блок_5f_кода"><text:s text:c="4"/><text:span text:style-name="T6">virtual</text:span> <text:span text:style-name="T6">void</text:span> print() <text:span text:style-name="T6">const</text:span> { std::cout &lt;&lt; "G"; } <text:s text:c="3"/></text:p>
      <text:p text:style-name="блок_5f_кода">};</text:p>
      <text:p text:style-name="блок_5f_кода"><text:soft-page-break/><text:span text:style-name="T6">class</text:span> SpecialException : <text:span text:style-name="T6">public</text:span> GeneralException {</text:p>
      <text:p text:style-name="блок_5f_кода"><text:span text:style-name="T6">public</text:span>:</text:p>
      <text:p text:style-name="блок_5f_кода"><text:s text:c="4"/><text:span text:style-name="T6">void</text:span> print() <text:span text:style-name="T6">const</text:span> <text:span text:style-name="T6">override</text:span> { std::cout &lt;&lt; "S"; } <text:s text:c="3"/></text:p>
      <text:p text:style-name="блок_5f_кода">};</text:p>
      <text:p text:style-name="блок_5f_кода"><text:span text:style-name="T6">void</text:span> f() { <text:span text:style-name="T6">throw</text:span> SpecialException(); }</text:p>
      <text:p text:style-name="блок_5f_кода"><text:span text:style-name="T6">int</text:span> main() {</text:p>
      <text:p text:style-name="блок_5f_кода"><text:s text:c="4"/><text:span text:style-name="T6">try</text:span> {</text:p>
      <text:p text:style-name="блок_5f_кода"><text:s text:c="8"/>f();</text:p>
      <text:p text:style-name="блок_5f_кода"><text:s text:c="4"/>}</text:p>
      <text:p text:style-name="блок_5f_кода"><text:s text:c="4"/>_____</text:p>
      <text:p text:style-name="блок_5f_кода"><text:s text:c="4"/><text:span text:style-name="T6">catch</text:span> (<text:span text:style-name="T6">const</text:span> SpecialException &amp;e) {</text:p>
      <text:p text:style-name="блок_5f_кода"><text:s text:c="8"/>e.print();</text:p>
      <text:p text:style-name="блок_5f_кода"><text:s text:c="4"/>}</text:p>
      <text:p text:style-name="блок_5f_кода">}</text:p>
      <text:p text:style-name="List_20_Heading">правильный ответ:</text:p>
      <text:p text:style-name="вариант_5f_ответа"><text:span text:style-name="T6">catch</text:span> (<text:span text:style-name="T6">const</text:span> GeneralException &amp; e) { e.print(); } </text:p>
      <text:p text:style-name="List_20_Heading">ошибки:</text:p>
      <text:p text:style-name="P6">catch (const GeneralException &amp;e) { e.GeneralException::print(); }</text:p>
      <text:p text:style-name="P6">catch (const std::exception &amp;e) { dynamic_cast&lt;const GeneralException&amp;&gt; (e).print(); }</text:p>
      <text:p text:style-name="P6">catch (const GeneralException e) { e.print(); }</text:p>
      <text:p text:style-name="P6">catch (GeneralException e) { e.print(); }</text:p>
      <text:p text:style-name="P7"/>
      <text:h text:style-name="Heading_20_3" text:outline-level="3">Что нужно вставить в код, представленный ниже, чтобы в консоль вывелась строка "12345"?</text:h>
      <text:p text:style-name="блок_5f_кода">#<text:span text:style-name="T6">include</text:span> &lt;iostream&gt;</text:p>
      <text:p text:style-name="блок_5f_кода">#<text:span text:style-name="T6">include</text:span> &lt;algorithm&gt;</text:p>
      <text:p text:style-name="блок_5f_кода">#<text:span text:style-name="T6">include</text:span> &lt;vector&gt;</text:p>
      <text:p text:style-name="блок_5f_кода"><text:span text:style-name="T6">int</text:span> main() {</text:p>
      <text:p text:style-name="блок_5f_кода"><text:s text:c="4"/>std::vector&lt;<text:span text:style-name="T6">int</text:span>&gt; v = { 5, 3, 1, 4 ,2 };</text:p>
      <text:p text:style-name="блок_5f_кода"><text:s text:c="4"/>std::sort(v.begin(), v.end(), _______ );</text:p>
      <text:p text:style-name="блок_5f_кода"><text:s text:c="4"/><text:span text:style-name="T6">for</text:span> (<text:span text:style-name="T6">int</text:span> x : v) std::cout &lt;&lt; x ;</text:p>
      <text:p text:style-name="блок_5f_кода">}</text:p>
      <text:p text:style-name="List_20_Heading">правильный ответ:</text:p>
      <text:p text:style-name="вариант_5f_ответа">[](<text:span text:style-name="T6">int</text:span> a, <text:span text:style-name="T6">int</text:span> b) {<text:span text:style-name="T7"> </text:span><text:span text:style-name="T6">return</text:span> a &lt; b; }</text:p>
      <text:p text:style-name="List_20_Heading">ошибки:</text:p>
      <text:p text:style-name="вариант_5f_ошибка">[](int a, int b) { return a &gt; b; }</text:p>
      <text:p text:style-name="вариант_5f_ошибка">[](int a, int b) { return a = b; }</text:p>
      <text:p text:style-name="вариант_5f_ошибка">[](int a, int b) { return a == b; }</text:p>
      <text:p text:style-name="вариант_5f_ошибка">[](int a, int b) { return a &lt;= b; }</text:p>
      <text:p text:style-name="P8"/>
      <text:h text:style-name="Heading_20_3" text:outline-level="3"><text:soft-page-break/>Код ниже не может быть скомпилирован из-за проблем с определением шаблона. Какая проблема определения шаблонных функций мешает работоспособности этого решения?</text:h>
      <text:p text:style-name="блок_5f_кода"><text:span text:style-name="T6">template</text:span>&lt;<text:span text:style-name="T6">class</text:span> T1, <text:span text:style-name="T6">class</text:span> T2&gt;</text:p>
      <text:p text:style-name="блок_5f_кода"><text:span text:style-name="T6">void</text:span> f() </text:p>
      <text:p text:style-name="блок_5f_кода">{ </text:p>
      <text:p text:style-name="блок_5f_кода"><text:s text:c="4"/>std::cout &lt;&lt; "f() &lt;class T1, class T2&gt;\n"; </text:p>
      <text:p text:style-name="блок_5f_кода">}</text:p>
      <text:p text:style-name="блок_5f_кода"><text:span text:style-name="T6">template</text:span>&lt;&gt;</text:p>
      <text:p text:style-name="блок_5f_кода"><text:span text:style-name="T6">void</text:span> f&lt;<text:span text:style-name="T6">int</text:span>, <text:span text:style-name="T6">int</text:span>&gt;() { </text:p>
      <text:p text:style-name="блок_5f_кода"><text:s text:c="4"/>std::cout &lt;&lt; "f() &lt;int, int&gt; \n"; </text:p>
      <text:p text:style-name="блок_5f_кода">}</text:p>
      <text:p text:style-name="блок_5f_кода"><text:span text:style-name="T6">template</text:span>&lt;<text:span text:style-name="T6">class</text:span> T1&gt;</text:p>
      <text:p text:style-name="блок_5f_кода"><text:span text:style-name="T6">void</text:span> f&lt;T1, <text:span text:style-name="T6">double</text:span>&gt; { </text:p>
      <text:p text:style-name="блок_5f_кода"><text:s text:c="4"/>std::cout &lt;&lt; "f() &lt;T1, double&gt;\n"; </text:p>
      <text:p text:style-name="блок_5f_кода">}</text:p>
      <text:p text:style-name="List_20_Heading">правильный ответ:</text:p>
      <text:p text:style-name="вариант_5f_ответа">Нельзя создавать частичную сециализацию функции</text:p>
      <text:p text:style-name="List_20_Heading">ошибки:</text:p>
      <text:p text:style-name="P9">Неправильное декларирование частичной специализзации функции</text:p>
      <text:p text:style-name="P9">Нельзя создавать полную специализацию функции</text:p>
      <text:p text:style-name="P9">Нельзя создавать ни полную, ни частичную специализацию функции</text:p>
      <text:p text:style-name="P9">Неправильное декларирование полной специализации функции</text:p>
      <text:p text:style-name="P7"/>
      <text:h text:style-name="Heading_20_3" text:outline-level="3">Что будет выведено на консоль после выполнения следующего кода?</text:h>
      <text:p text:style-name="блок_5f_кода">std::map&lt;<text:span text:style-name="T6">int</text:span>, <text:span text:style-name="T6">char</text:span>&gt; m = { {1, 'a'}, {2,'b'}, {3,'c'}};</text:p>
      <text:p text:style-name="блок_5f_кода"><text:span text:style-name="T6">auto</text:span> it = m.lower_bound(2);</text:p>
      <text:p text:style-name="блок_5f_кода">std::cout &lt;&lt; it-&gt;second;</text:p>
      <text:p text:style-name="блок_5f_кода">++it;</text:p>
      <text:p text:style-name="блок_5f_кода">std::cout &lt;&lt; it-&gt;second;</text:p>
      <text:p text:style-name="List_20_Heading">правильный ответ:</text:p>
      <text:p text:style-name="вариант_5f_ответа">bc</text:p>
      <text:p text:style-name="List_20_Heading">ошибки:</text:p>
      <text:p text:style-name="вариант_5f_ошибка">ab</text:p>
      <text:p text:style-name="вариант_5f_ошибка">ba</text:p>
      <text:p text:style-name="вариант_5f_ошибка">Ошибка компиляции</text:p>
      <text:p text:style-name="вариант_5f_ошибка">ac</text:p>
      <text:p text:style-name="P10"/>
      <text:h text:style-name="Heading_20_3" text:outline-level="3"><text:soft-page-break/>Как объявить функцию-корутину с С++20?</text:h>
      <text:p text:style-name="List_20_Heading">правильный ответ:</text:p>
      <text:p text:style-name="вариант_5f_ответа">task&lt;<text:span text:style-name="T6">int</text:span>&gt; foo() co_<text:span text:style-name="T6">return</text:span></text:p>
      <text:p text:style-name="P11">ошибки:</text:p>
      <text:p text:style-name="вариант_5f_ошибка">task&lt;int&gt; foo() co_await</text:p>
      <text:p text:style-name="вариант_5f_ошибка">coroutine std::function&lt;int()&gt; foo()</text:p>
      <text:p text:style-name="вариант_5f_ошибка">std::coroutine int foo()</text:p>
      <text:p text:style-name="вариант_5f_ошибка">function std::coroutine&lt;int()&gt; foo()</text:p>
      <text:p text:style-name="P11"/>
      <text:h text:style-name="Heading_20_3" text:outline-level="3">Какое из утверждений верно?</text:h>
      <text:p text:style-name="List_20_Heading">правильный ответ:</text:p>
      <text:p text:style-name="вариант_5f_ответа">Несколько объектов типа std::thread не могут управлять одним потоком</text:p>
      <text:p text:style-name="List_20_Heading">ошибки:</text:p>
      <text:p text:style-name="P12">Что бы не ждать окончания потока, используется ключевое слово join</text:p>
      <text:p text:style-name="P12">Несколько объектов типа std::thread могут управлять одним и тем же потоком</text:p>
      <text:p text:style-name="P12">В конструктор std::thread нельзя передавать пользовательские типы данных</text:p>
      <text:p text:style-name="P12">Чтобы дождаться окончания потока, используется ключевое слово detach</text:p>
      <text:p text:style-name="P13"/>
      <text:h text:style-name="Heading_20_3" text:outline-level="3">Зачем в приведенном коде используется std::atomic ?</text:h>
      <text:p text:style-name="блок_5f_кода">#<text:span text:style-name="T6">include</text:span> &lt;iostream&gt;</text:p>
      <text:p text:style-name="блок_5f_кода">#<text:span text:style-name="T6">include</text:span> &lt;thread&gt;</text:p>
      <text:p text:style-name="блок_5f_кода">#<text:span text:style-name="T6">include</text:span> &lt;atomic&gt;</text:p>
      <text:p text:style-name="блок_5f_кода">std::atomic&lt;<text:span text:style-name="T6">int</text:span>&gt; counter(0);</text:p>
      <text:p text:style-name="блок_5f_кода"><text:span text:style-name="T6">void</text:span> increment() {</text:p>
      <text:p text:style-name="блок_5f_кода"><text:s text:c="4"/><text:span text:style-name="T6">for</text:span>(<text:span text:style-name="T6">int</text:span> i=0; i&lt;10000; ++i) { counter.fetch_add(1); }</text:p>
      <text:p text:style-name="блок_5f_кода">}</text:p>
      <text:p text:style-name="блок_5f_кода"><text:span text:style-name="T6">int</text:span> main() {</text:p>
      <text:p text:style-name="блок_5f_кода"><text:s text:c="4"/>std::thread t1(increment), t2(increment);</text:p>
      <text:p text:style-name="блок_5f_кода"><text:s text:c="4"/>t1.join(); t2.join();</text:p>
      <text:p text:style-name="блок_5f_кода"><text:s text:c="4"/>std::cout &lt;&lt; counter &lt;&lt; std::endl;</text:p>
      <text:p text:style-name="блок_5f_кода"><text:s text:c="4"/><text:span text:style-name="T6">return</text:span> 0;</text:p>
      <text:p text:style-name="блок_5f_кода">}</text:p>
      <text:p text:style-name="List_20_Heading">правильный ответ:</text:p>
      <text:p text:style-name="P14">Использование atomic гарантирует корректное значение counter без состояни гонки</text:p>
      <text:p text:style-name="List_20_Heading"><text:soft-page-break/>ошибки:</text:p>
      <text:p text:style-name="P12">atomic используется по умолчанию</text:p>
      <text:p text:style-name="P12">atomic замедляет программу для предотвращения возникновения тупика</text:p>
      <text:p text:style-name="P12">atomic требует дополнительной блокировки мьютекса для предотвращения состояния гонки</text:p>
      <text:p text:style-name="P12">atomic не требует дополнительной блокировки мьютекса для предотвращения состояния голодания</text:p>
      <text:p text:style-name="P13"/>
      <text:h text:style-name="Heading_20_3" text:outline-level="3">Выберите из предложенных вариантов тот, который правильно описывает поведение данного кода:</text:h>
      <text:p text:style-name="блок_5f_кода">#<text:span text:style-name="T6">include</text:span> &lt;mutex&gt;</text:p>
      <text:p text:style-name="блок_5f_кода">#<text:span text:style-name="T6">include</text:span> &lt;thread&gt;</text:p>
      <text:p text:style-name="блок_5f_кода">std::mutex mtx1, mtx2;</text:p>
      <text:p text:style-name="блок_5f_кода"><text:span text:style-name="T6">void</text:span> threadFunction() {</text:p>
      <text:p text:style-name="блок_5f_кода"><text:s text:c="4"/>mtx1.lock();</text:p>
      <text:p text:style-name="блок_5f_кода"><text:s text:c="4"/>mtx2.lock();</text:p>
      <text:p text:style-name="блок_5f_кода"><text:s text:c="4"/>std::lock_guard&lt;std::mutex&gt; lock1(mtx1, std:adopt_lock);</text:p>
      <text:p text:style-name="блок_5f_кода"><text:s text:c="4"/>std::lock_guard&lt;std::mutex&gt; lock2(mtx2, std:adopt_lock);</text:p>
      <text:p text:style-name="блок_5f_кода"><text:s text:c="4"/>// Критическая секция</text:p>
      <text:p text:style-name="блок_5f_кода">}</text:p>
      <text:p text:style-name="блок_5f_кода"><text:span text:style-name="T6">int</text:span> main() {</text:p>
      <text:p text:style-name="блок_5f_кода"><text:s text:c="4"/>std::thread t1(threadFunction);</text:p>
      <text:p text:style-name="блок_5f_кода"><text:s text:c="4"/>std::thread t2(threadFunction);</text:p>
      <text:p text:style-name="блок_5f_кода"><text:s text:c="4"/>t1.join();</text:p>
      <text:p text:style-name="блок_5f_кода"><text:s text:c="4"/>t2.join();</text:p>
      <text:p text:style-name="блок_5f_кода"><text:s text:c="4"/><text:span text:style-name="T6">return</text:span> 0;</text:p>
      <text:p text:style-name="блок_5f_кода">}</text:p>
      <text:p text:style-name="List_20_Heading">правильный ответ:</text:p>
      <text:p text:style-name="вариант_5f_ответа">Возможен deadlock, потому что мьютексы блокируются по отдельности</text:p>
      <text:p text:style-name="List_20_Heading">ошибки:</text:p>
      <text:p text:style-name="P6">Корректная работа без deadlock, так как мьютексы захватываются атомарно с помощью std::lock</text:p>
      <text:p text:style-name="P6">Программа аварийно завершится, так как std::lock не поддерживает несколько мьютексов</text:p>
      <text:p text:style-name="P6">Ошибка компиляции из-за неправильного использования std::lock_guard</text:p>
      <text:p text:style-name="P6">Возможно состояние голодания из-за использования нескольких мьютексов</text:p>
      <text:p text:style-name="P13"/>
      <text:h text:style-name="P15" text:outline-level="3"><text:soft-page-break/>Какой интринсик вычисляет горизонтальную сумму 4-х float-элементов в __m128?</text:h>
      <text:p text:style-name="блок_5f_кода">__m128 v = _mm_set_ps(1.0f, 2.0f, 3.0f, 4.0f);</text:p>
      <text:p text:style-name="блок_5f_кода"><text:span text:style-name="T6">float</text:span> sum = _____;</text:p>
      <text:p text:style-name="P16">правильный ответ:</text:p>
      <text:p text:style-name="P17">_mm_cvtss_f32(_mm_hadd_ps(_mm_hadd_ps(v,v), _mm_hadd_ps(v,v)))</text:p>
      <text:p text:style-name="P16">ошибки:</text:p>
      <text:p text:style-name="P18">_mm_mvtss_f32(_mm_add_ps(v, _mm_shuffle_ps(v,v, _MM_SHUFFLE(0,1,2,3))))</text:p>
      <text:p text:style-name="P18">_mm_cvtss_f32(_mm_hadd_ps(v, v))</text:p>
      <text:p text:style-name="P18">_mm_cvtss_f32(_mm_dp_ps(v, _mm_set1_ps(1.0f), 0xF1))</text:p>
      <text:p text:style-name="P18">_mm_cvtss_f32(_mm_add_ps(v, _mm_shuffle_ps(v, v, _MM_SHUFFLE(0,1,2,3))))</text:p>
      <text:p text:style-name="P13"/>
      <text:p text:style-name="P13"/>
      <text:h text:style-name="P19" text:outline-level="3">При выполнении следующего кода сообщение не появляется в консоли сразу<text:span text:style-name="T8">. Как обеспечить немедленный вывод сообщения?</text:span></text:h>
      <text:p text:style-name="P20">std::cout &lt;&lt; "Processing data...";</text:p>
      <text:p text:style-name="P20">long_running_operation();</text:p>
      <text:p text:style-name="P21">правильный ответ:</text:p>
      <text:p text:style-name="P22">Добавить std::flush или std::endl</text:p>
      <text:p text:style-name="P21">ошибки:</text:p>
      <text:p text:style-name="P23">Отключить буферизируемый вывод</text:p>
      <text:p text:style-name="P23">Использовать std::cerr вместо std::cout</text:p>
      <text:p text:style-name="P23">Уменьшить размер буфера</text:p>
      <text:p text:style-name="P23">Увеличить размер буфера</text:p>
      <text:p text:style-name="P13"/>
      <text:h text:style-name="P24" text:outline-level="3">Как правильно организовать итерирование в цикле for?</text:h>
      <text:p text:style-name="P20"><text:span text:style-name="T6">const</text:span> std::vector&lt;<text:span text:style-name="T6">int</text:span>&gt; v = {1, 2, 3};</text:p>
      <text:p text:style-name="P20"><text:span text:style-name="T6">for</text:span> (____) {</text:p>
      <text:p text:style-name="P20"><text:s text:c="4"/>std::cout &lt;&lt; x; // Ожидается: 123</text:p>
      <text:p text:style-name="P20">}</text:p>
      <text:p text:style-name="P21">правильный ответ:</text:p>
      <text:p text:style-name="P22"><text:span text:style-name="T6">const</text:span> <text:span text:style-name="T6">auto</text:span>&amp; x : v</text:p>
      <text:p text:style-name="P21">ошибки:</text:p>
      <text:p text:style-name="P23">int x : v</text:p>
      <text:p text:style-name="P23"><text:soft-page-break/>auto&amp; v::x</text:p>
      <text:p text:style-name="P23">int x : &amp;v</text:p>
      <text:p text:style-name="P23">int&amp; x : v</text:p>
      <text:p text:style-name="P25"/>
      <text:h text:style-name="P24" text:outline-level="3">В каком случае следует использовать friend вместо public методов?</text:h>
      <text:p text:style-name="P21">правильный ответ:</text:p>
      <text:p text:style-name="P22">Для предоставления доступа конкретным внешним функциям/классам без нарушения инкапсуляции</text:p>
      <text:p text:style-name="P21">ошибки:</text:p>
      <text:p text:style-name="P23">Когда нужно предоставить доступ всем производным классам без нарушения инкапсуляции</text:p>
      <text:p text:style-name="P23">Когда нужно сделать все члены класса доступными без инкапсуляции</text:p>
      <text:p text:style-name="P23">Когда нужно запретить доступ всем производным классам без нарушения инкапсуляции </text:p>
      <text:p text:style-name="P23">Для обеспечения инкапсуляции базового класса</text:p>
      <text:p text:style-name="P25"/>
      <text:h text:style-name="P24" text:outline-level="3">Проведите анализ данного кода и укажите, какие проблемы возникают в последней строке:</text:h>
      <text:p text:style-name="P20">#<text:span text:style-name="T6">include</text:span> &lt;memory&gt;</text:p>
      <text:p text:style-name="P20">#<text:span text:style-name="T6">include</text:span> &lt;vector&gt;</text:p>
      <text:p text:style-name="P20"><text:span text:style-name="T6">void</text:span> foo() {</text:p>
      <text:p text:style-name="P20"><text:s text:c="4"/>std::unique_ptr&lt;std::vector&lt;<text:span text:style-name="T6">int</text:span>&gt;&gt;ptr = std::make_unique&lt;std::vector&lt;<text:span text:style-name="T6">int</text:span>&gt;&gt;(10, 42);</text:p>
      <text:p text:style-name="P20"><text:s text:c="4"/><text:span text:style-name="T6">auto</text:span>&amp; vec = *ptr;</text:p>
      <text:p text:style-name="P20"><text:s text:c="4"/>vec.push_back(100);</text:p>
      <text:p text:style-name="P20"><text:s text:c="4"/>ptr.reset();</text:p>
      <text:p text:style-name="P20"><text:s text:c="4"/><text:span text:style-name="T6">int</text:span> x = vec.back(); // Что произойдет здесь?</text:p>
      <text:p text:style-name="P20">}</text:p>
      <text:p text:style-name="P21">правильный ответ:</text:p>
      <text:p text:style-name="P22">Неопределенное поведение, так как vec - ссылка на освобожденную память</text:p>
      <text:p text:style-name="P21">ошибки:</text:p>
      <text:p text:style-name="P23">Корректный код, x будет равен адресу последнего элемента</text:p>
      <text:p text:style-name="P23">Ошибка компиляции из-за попытки доступа к vec после reset</text:p>
      <text:p text:style-name="P23">Утечка памяти так как vec не был освобожден</text:p>
      <text:p text:style-name="P23">Корректный код, x будет равен 100</text:p>
      <text:p text:style-name="P25"/>
      <text:h text:style-name="P24" text:outline-level="3"><text:soft-page-break/>Что нужно вставить в код, представленный ниже, чтобы в консоль вывелась строка "15"?</text:h>
      <text:p text:style-name="P20">#<text:span text:style-name="T6">include</text:span> &lt;iostream&gt;</text:p>
      <text:p text:style-name="P20">#<text:span text:style-name="T6">include</text:span> &lt;vector&gt;</text:p>
      <text:p text:style-name="P20">#<text:span text:style-name="T6">include</text:span> &lt;algorithm&gt;</text:p>
      <text:p text:style-name="P20"><text:span text:style-name="T6">int</text:span> main() {</text:p>
      <text:p text:style-name="P20"><text:s text:c="4"/>std::vector&lt;<text:span text:style-name="T6">int</text:span>&gt; v = {1, 2, 3, 4, 5};</text:p>
      <text:p text:style-name="P20"><text:s text:c="4"/><text:span text:style-name="T6">int</text:span> sum = 0;</text:p>
      <text:p text:style-name="P20"><text:s text:c="4"/>std::for_each(v.begin(), v.end(), [&amp;sum](<text:span text:style-name="T6">int</text:span> x) {</text:p>
      <text:p text:style-name="P20"><text:s text:c="8"/>____</text:p>
      <text:p text:style-name="P20"><text:s text:c="4"/>});</text:p>
      <text:p text:style-name="P20"><text:s text:c="4"/>std::cout &lt;&lt; sum;</text:p>
      <text:p text:style-name="P20">}</text:p>
      <text:p text:style-name="P21">правильный ответ:</text:p>
      <text:p text:style-name="P22">sum += x</text:p>
      <text:p text:style-name="P21">ошибки:</text:p>
      <text:p text:style-name="P23">sum = x++</text:p>
      <text:p text:style-name="P23">sum += sum + x</text:p>
      <text:p text:style-name="P23">sum = x</text:p>
      <text:p text:style-name="P23">sum = sum + sum</text:p>
      <text:p text:style-name="P25"/>
      <text:h text:style-name="P24" text:outline-level="3">Какой механизм <text:s/>обеспечивает атомарность операций над разделяемыми данными в С++?</text:h>
      <text:p text:style-name="P21">правильный ответ:</text:p>
      <text:p text:style-name="P22">Мьютексы (std::mutex)</text:p>
      <text:p text:style-name="P21">ошибки:</text:p>
      <text:p text:style-name="P23">Атомарные типы (std::atomic)</text:p>
      <text:p text:style-name="P23">Несколько объектов типа std::thread не могут управлять одним потоком</text:p>
      <text:p text:style-name="P23">Ключевое слово volatile</text:p>
      <text:p text:style-name="P23">Барьеры памяти (std::memory_barrier)</text:p>
      <text:p text:style-name="P25"/>
      <text:h text:style-name="P26" text:outline-level="3">Зачем в приведенном примере использзуетс std::unique_lock вместо std::lock_guard?</text:h>
      <text:p text:style-name="P27">#<text:span text:style-name="T6">include</text:span> &lt;iostream&gt;</text:p>
      <text:p text:style-name="P27">#<text:span text:style-name="T6">include</text:span> &lt;thread&gt;</text:p>
      <text:p text:style-name="P27">#<text:span text:style-name="T6">include</text:span> &lt;mutex&gt;</text:p>
      <text:p text:style-name="P27">std::mutex m;</text:p>
      <text:p text:style-name="P27"><text:span text:style-name="T6">void</text:span> task() {</text:p>
      <text:p text:style-name="P27"><text:s text:c="4"/>std::unique_lock&lt;std::mutex&gt; lock(m, std::defer_lock);</text:p>
      <text:p text:style-name="P27"><text:soft-page-break/><text:s text:c="4"/>// .. (код без блокировки)</text:p>
      <text:p text:style-name="P27"><text:s text:c="4"/>lock.lock();</text:p>
      <text:p text:style-name="P27"><text:s text:c="4"/>std::cout &lt;&lt; "Critical section" &lt;&lt; std::endl;</text:p>
      <text:p text:style-name="P27"><text:s text:c="4"/>lock.unlock();</text:p>
      <text:p text:style-name="P27">}</text:p>
      <text:p text:style-name="P27"><text:span text:style-name="T6">int</text:span> main() {</text:p>
      <text:p text:style-name="P27"><text:s text:c="4"/>std::thread t1(task), t2(task);</text:p>
      <text:p text:style-name="P27"><text:s text:c="4"/>t1.join(); t2.join();</text:p>
      <text:p text:style-name="P27"><text:s text:c="4"/><text:span text:style-name="T6">return</text:span> 0;</text:p>
      <text:p text:style-name="P27">}</text:p>
      <text:p text:style-name="P28">правильный ответ:</text:p>
      <text:p text:style-name="P29">unique_lock позволяет отложить блокировку и управлять ею вручную</text:p>
      <text:p text:style-name="P28">ошибки:</text:p>
      <text:p text:style-name="P30">unique_lock автоматически освобождает мьютекс при исключении</text:p>
      <text:p text:style-name="P30">unique_lock не поддерживает мьютексы</text:p>
      <text:p text:style-name="P30">unique_lock работает медленнее, чем lock_guard</text:p>
      <text:p text:style-name="P30">unique_lock работает быстрее, чем lock_guard</text:p>
      <text:p text:style-name="P13"/>
      <text:h text:style-name="P26" text:outline-level="3">Выберите верное утверждение относительно данного кода.</text:h>
      <text:p text:style-name="P27">#<text:span text:style-name="T6">include</text:span> &lt;iostream&gt;</text:p>
      <text:p text:style-name="P27">#<text:span text:style-name="T6">include</text:span> &lt;thread&gt;</text:p>
      <text:p text:style-name="P27">#<text:span text:style-name="T6">include</text:span> &lt;mutex&gt;</text:p>
      <text:p text:style-name="P27">std::mutex mtx;</text:p>
      <text:p text:style-name="P27"><text:span text:style-name="T6">void</text:span> printNumbers(int id) {</text:p>
      <text:p text:style-name="P27"><text:s text:c="4"/><text:span text:style-name="T6">for</text:span> (<text:span text:style-name="T6">int</text:span> i = 0; i &lt; 5; ++i) {</text:p>
      <text:p text:style-name="P27"><text:s text:c="8"/>mtx.lock(); // Защита критической секции</text:p>
      <text:p text:style-name="P27"><text:s text:c="8"/>std::cout &lt;&lt; "Thread " &lt;&lt; id &lt;&lt; ": " &lt;&lt; i &lt;&lt; std::endl;</text:p>
      <text:p text:style-name="P27"><text:s text:c="8"/>mtx.unlock();</text:p>
      <text:p text:style-name="P27"><text:s text:c="4"/>}</text:p>
      <text:p text:style-name="P27">}</text:p>
      <text:p text:style-name="P27"><text:span text:style-name="T6">int</text:span> main() {</text:p>
      <text:p text:style-name="P27"><text:s text:c="4"/>std::thread t1(printNumbers, 1);</text:p>
      <text:p text:style-name="P27"><text:s text:c="4"/>std::thread t2(printNumbers, 2);</text:p>
      <text:p text:style-name="P27"><text:s text:c="4"/>t1.join();</text:p>
      <text:p text:style-name="P27"><text:s text:c="4"/>t2.join();</text:p>
      <text:p text:style-name="P27"><text:s text:c="4"/><text:span text:style-name="T6">return</text:span> 0;</text:p>
      <text:p text:style-name="P27">}</text:p>
      <text:p text:style-name="P28">правильный ответ:</text:p>
      <text:p text:style-name="P29">Корректный вывод с чередованием строк от двух потоков, так как мьютекс защищает вывод</text:p>
      <text:p text:style-name="P28">ошибки:</text:p>
      <text:p text:style-name="P30">Состояние гонки из-за некорректного использования мьютексов</text:p>
      <text:p text:style-name="P30">Программа завершится с ошибкой из-за двойного освобождения мьютекса</text:p>
      <text:p text:style-name="P30"><text:soft-page-break/>Вывод без всякого порядка, так как мьютекс не используетс</text:p>
      <text:p text:style-name="P30">Бесконечная блокировка, потому что мьютекс не освобождается</text:p>
      <text:p text:style-name="P31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Обычный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ариант_5f_ответа" style:display-name="вариант_ответа" style:family="paragraph" style:parent-style-name="Standard" style:master-page-name="">
      <style:paragraph-properties fo:margin-top="0.101cm" fo:margin-bottom="0.101cm" style:contextual-spacing="false" fo:line-height="100%" style:page-number="auto" fo:padding="0.199cm" fo:border="0.06pt solid #000000" style:join-border="false">
        <style:tab-stops/>
      </style:paragraph-properties>
      <style:text-properties style:font-name="Lucida Console" fo:font-family="'Lucida Console'" style:font-style-name="Обычный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блок_5f_кода" style:display-name="блок_кода" style:family="paragraph" style:master-page-name="">
      <loext:graphic-properties draw:fill="solid" draw:fill-color="#dee7e5"/>
      <style:paragraph-properties style:page-number="auto" fo:background-color="#dee7e5">
        <style:tab-stops/>
      </style:paragraph-properties>
      <style:text-properties style:font-name="Courier New" fo:font-family="'Courier New'" style:font-style-name="Обычный" style:font-family-generic="modern" style:font-pitch="fixed"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вариант_5f_ошибка" style:display-name="вариант_ошибка" style:family="paragraph" style:parent-style-name="вариант_5f_ответа" style:master-page-name="">
      <style:paragraph-properties style:page-number="auto" fo:padding="0.199cm" fo:border="0.06pt dotted #666666">
        <style:tab-stops/>
      </style:paragraph-properties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30T20:43:18.138572600</meta:creation-date>
    <dc:date>2026-07-01T13:24:47.916429200</dc:date>
    <meta:editing-duration>PT23H19M49S</meta:editing-duration>
    <meta:editing-cycles>44</meta:editing-cycles>
    <meta:generator>LibreOffice/25.8.4.2$Windows_X86_64 LibreOffice_project/290daaa01b999472f0c7a3890eb6a550fd74c6df</meta:generator>
    <meta:document-statistic meta:table-count="0" meta:image-count="0" meta:object-count="0" meta:page-count="12" meta:paragraph-count="349" meta:word-count="1490" meta:character-count="11009" meta:non-whitespace-character-count="9545"/>
  </office:meta>
</office:document-meta>
</file>