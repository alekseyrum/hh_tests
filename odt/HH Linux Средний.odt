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efcb" officeooo:paragraph-rsid="001defcb"/>
    </style:style>
    <style:style style:name="P2" style:family="paragraph" style:parent-style-name="вариант_5f_ошибка">
      <style:text-properties fo:language="en" fo:country="US"/>
    </style:style>
    <style:style style:name="P3" style:family="paragraph" style:parent-style-name="вариант_5f_ошибка">
      <style:text-properties fo:language="en" fo:country="US" officeooo:rsid="00218f57"/>
    </style:style>
    <style:style style:name="P4" style:family="paragraph" style:parent-style-name="вариант_5f_ошибка">
      <style:text-properties fo:language="en" fo:country="US" officeooo:rsid="002557f0"/>
    </style:style>
    <style:style style:name="P5" style:family="paragraph" style:parent-style-name="Standard">
      <style:text-properties fo:language="en" fo:country="US" officeooo:rsid="0020651f" officeooo:paragraph-rsid="00229cde"/>
    </style:style>
    <style:style style:name="P6" style:family="paragraph" style:parent-style-name="вариант_5f_ошибка">
      <style:text-properties fo:language="en" fo:country="US" officeooo:rsid="0020651f" officeooo:paragraph-rsid="002d9449"/>
    </style:style>
    <style:style style:name="P7" style:family="paragraph" style:parent-style-name="Standard">
      <style:text-properties fo:language="en" fo:country="US" officeooo:rsid="0020651f" officeooo:paragraph-rsid="002d9449"/>
    </style:style>
    <style:style style:name="P8" style:family="paragraph" style:parent-style-name="Standard">
      <style:text-properties fo:language="ru" fo:country="RU" officeooo:rsid="001defcb" officeooo:paragraph-rsid="001defcb"/>
    </style:style>
    <style:style style:name="P9" style:family="paragraph" style:parent-style-name="Standard">
      <style:text-properties fo:language="ru" fo:country="RU" officeooo:rsid="0020651f" officeooo:paragraph-rsid="0020651f"/>
    </style:style>
    <style:style style:name="P10" style:family="paragraph" style:parent-style-name="Standard">
      <style:text-properties fo:language="ru" fo:country="RU" officeooo:rsid="00218f57" officeooo:paragraph-rsid="00218f57"/>
    </style:style>
    <style:style style:name="P11" style:family="paragraph" style:parent-style-name="Standard">
      <style:text-properties fo:language="ru" fo:country="RU" officeooo:rsid="002a1188" officeooo:paragraph-rsid="002a1188"/>
    </style:style>
    <style:style style:name="P12" style:family="paragraph" style:parent-style-name="List_20_Heading">
      <style:text-properties officeooo:paragraph-rsid="002d9449"/>
    </style:style>
    <style:style style:name="P13" style:family="paragraph" style:parent-style-name="вариант_5f_ответа">
      <style:text-properties officeooo:paragraph-rsid="002d9449"/>
    </style:style>
    <style:style style:name="P14" style:family="paragraph" style:parent-style-name="Standard">
      <style:text-properties fo:language="en" fo:country="US" officeooo:rsid="0020651f" officeooo:paragraph-rsid="0021a319"/>
    </style:style>
    <style:style style:name="P15" style:family="paragraph" style:parent-style-name="Standard">
      <style:text-properties fo:language="en" fo:country="US" officeooo:rsid="0020651f" officeooo:paragraph-rsid="00229cde"/>
    </style:style>
    <style:style style:name="P16" style:family="paragraph" style:parent-style-name="Text_20_body">
      <style:text-properties fo:language="en" fo:country="US" officeooo:rsid="0020651f"/>
    </style:style>
    <style:style style:name="P17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18" style:family="paragraph" style:parent-style-name="Heading_20_3">
      <style:text-properties fo:language="ru" fo:country="RU"/>
    </style:style>
    <style:style style:name="P19" style:family="paragraph" style:parent-style-name="Heading_20_3">
      <style:text-properties officeooo:paragraph-rsid="002d9449"/>
    </style:style>
    <style:style style:name="P20" style:family="paragraph" style:parent-style-name="Heading_20_3">
      <style:text-properties fo:language="en" fo:country="US" officeooo:rsid="0020651f"/>
    </style:style>
    <style:style style:name="P21" style:family="paragraph" style:parent-style-name="вариант_5f_ответа">
      <style:text-properties fo:language="en" fo:country="US" officeooo:rsid="002557f0"/>
    </style:style>
    <style:style style:name="P22" style:family="paragraph" style:parent-style-name="вариант_5f_ошибка">
      <style:text-properties fo:language="en" fo:country="US"/>
    </style:style>
    <style:style style:name="P23" style:family="paragraph" style:parent-style-name="вариант_5f_ошибка">
      <style:text-properties fo:language="en" fo:country="US" officeooo:rsid="00218f57"/>
    </style:style>
    <style:style style:name="P24" style:family="paragraph" style:parent-style-name="вариант_5f_ошибка">
      <style:text-properties fo:language="en" fo:country="US" officeooo:rsid="002557f0"/>
    </style:style>
    <style:style style:name="T1" style:family="text">
      <style:text-properties fo:language="en" fo:country="US" officeooo:rsid="002bfe9b"/>
    </style:style>
    <style:style style:name="T2" style:family="text">
      <style:text-properties fo:language="ru" fo:country="RU" officeooo:rsid="002ef1c8"/>
    </style:style>
    <style:style style:name="T3" style:family="text">
      <style:text-properties officeooo:rsid="002ef1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Linux </text:span><text:span text:style-name="T2">Средний</text:span> уровень</text:h>
      <text:h text:style-name="Heading_20_3" text:outline-level="3">В директории /var/log вы хотите найти все текстовые файлы с расширением .log, в содержимом которых есть слово timeout, и получить список их имен. Какую команду используете?</text:h>
      <text:p text:style-name="List_20_Heading">правильный ответ:</text:p>
      <text:p text:style-name="вариант_5f_ответа">find /var/log -type f -name "*.log" -exec grep -l "timeout" {} \;</text:p>
      <text:p text:style-name="List_20_Heading">ошибки:</text:p>
      <text:p text:style-name="вариант_5f_ошибка">find /var/log -name "*.log" | grep -r "timeout"</text:p>
      <text:p text:style-name="вариант_5f_ошибка">grep -rl "timeout" /var/log -exec find -name "*.log"</text:p>
      <text:p text:style-name="вариант_5f_ошибка">find /var/log -type f -grep "timeout" &gt; *.log</text:p>
      <text:p text:style-name="вариант_5f_ошибка">grep -l "timeout" $(find /var/log -type d -name "*.log")</text:p>
      <text:p text:style-name="Standard"/>
      <text:h text:style-name="Heading_20_3" text:outline-level="3">Какой командой корректно завершить все процессы с именем "myapp" ?</text:h>
      <text:p text:style-name="List_20_Heading">правильный ответ:</text:p>
      <text:p text:style-name="вариант_5f_ответа">pkill myapp</text:p>
      <text:p text:style-name="List_20_Heading">ошибки:</text:p>
      <text:p text:style-name="вариант_5f_ошибка">ps -ef | grep myapp</text:p>
      <text:p text:style-name="вариант_5f_ошибка">killall -HUP myapp</text:p>
      <text:p text:style-name="вариант_5f_ошибка">jobs myapp</text:p>
      <text:p text:style-name="вариант_5f_ошибка">kill -9 myapp</text:p>
      <text:p text:style-name="Standard"/>
      <text:h text:style-name="Heading_20_3" text:outline-level="3">Какой командой изменить приоритет нескольких процессов, принадлежащих пользователю user123, за один раз?</text:h>
      <text:p text:style-name="List_20_Heading">правильный ответ:</text:p>
      <text:p text:style-name="вариант_5f_ответа">renice -n 10 -u user123</text:p>
      <text:p text:style-name="List_20_Heading">ошибки:</text:p>
      <text:p text:style-name="вариант_5f_ошибка">kill -STOP user123</text:p>
      <text:p text:style-name="вариант_5f_ошибка">nice -n 10 user123</text:p>
      <text:p text:style-name="вариант_5f_ошибка">renice -p user123 10</text:p>
      <text:p text:style-name="вариант_5f_ошибка"><text:soft-page-break/>nice user123 -all</text:p>
      <text:p text:style-name="Standard"/>
      <text:h text:style-name="P18" text:outline-level="3">Как просмотреть только записи systemd-журнала, относящиеся к сервису ssh?</text:h>
      <text:p text:style-name="List_20_Heading">правильный ответ:</text:p>
      <text:p text:style-name="вариант_5f_ответа">journalctl -u ssh</text:p>
      <text:p text:style-name="List_20_Heading">ошибки:</text:p>
      <text:p text:style-name="вариант_5f_ошибка">journalctl -- service sshd</text:p>
      <text:p text:style-name="вариант_5f_ошибка">cat /var/log/ssh.log</text:p>
      <text:p text:style-name="вариант_5f_ошибка">tail -f /var/log/secure</text:p>
      <text:p text:style-name="вариант_5f_ошибка">grep ssh /var/log/messages</text:p>
      <text:p text:style-name="P1"/>
      <text:h text:style-name="Heading_20_3" text:outline-level="3">В системном журнале /var/log/messages часто появляется сообщение "kernel: Out of memory: Kill process". Какова наиболее вероятная причина появления этого сообщения?</text:h>
      <text:p text:style-name="List_20_Heading">правильный ответ:</text:p>
      <text:p text:style-name="вариант_5f_ответа">Закончилась оперативная память, и ядро завершает процессы</text:p>
      <text:p text:style-name="List_20_Heading">ошибки:</text:p>
      <text:p text:style-name="вариант_5f_ошибка">Отказ аппаратного диска</text:p>
      <text:p text:style-name="вариант_5f_ошибка">Некорректные права на /var/log/messages</text:p>
      <text:p text:style-name="вариант_5f_ошибка">Переполнение файловой системы /tmp</text:p>
      <text:p text:style-name="вариант_5f_ошибка">Ошибки в сетевой конфигурации</text:p>
      <text:p text:style-name="P8"/>
      <text:h text:style-name="Heading_20_3" text:outline-level="3">Как выполнить Bash-скрипт myscript.sh из любой директории, не указывая путь каждый раз?</text:h>
      <text:p text:style-name="List_20_Heading">правильный ответ:</text:p>
      <text:p text:style-name="вариант_5f_ответа">Добавить скрипт в PATH</text:p>
      <text:p text:style-name="List_20_Heading">ошибки:</text:p>
      <text:p text:style-name="вариант_5f_ошибка">Скопировать его в ~</text:p>
      <text:p text:style-name="вариант_5f_ошибка">Изменить shebang на /usr/local/bin</text:p>
      <text:p text:style-name="вариант_5f_ошибка">Запустить только из /bin</text:p>
      <text:p text:style-name="вариант_5f_ошибка"><text:soft-page-break/>Выполнить su - root</text:p>
      <text:p text:style-name="P8"/>
      <text:h text:style-name="Heading_20_3" text:outline-level="3">Проанализируйте следующий скрипт и выберите корректное объяснение его поведения:</text:h>
      <text:p text:style-name="блок_5f_кода">#!/bin/bash</text:p>
      <text:p text:style-name="блок_5f_кода">count=1</text:p>
      <text:p text:style-name="блок_5f_кода">while [ $count -le 5 ]; do</text:p>
      <text:p text:style-name="блок_5f_кода"><text:tab/>echo $count</text:p>
      <text:p text:style-name="блок_5f_кода">done</text:p>
      <text:p text:style-name="List_20_Heading">правильный ответ:</text:p>
      <text:p text:style-name="вариант_5f_ответа">Скрипт зациклится и никогда не завершится</text:p>
      <text:p text:style-name="List_20_Heading">ошибки:</text:p>
      <text:p text:style-name="P2">count увеличивается на каждом шаге</text:p>
      <text:p text:style-name="P2">Переменная count не определена</text:p>
      <text:p text:style-name="P2">Скрипт ничего не выведет</text:p>
      <text:p text:style-name="P2">Скрипт корректно выведет числа от 1 до 5</text:p>
      <text:p text:style-name="P9"/>
      <text:h text:style-name="Heading_20_3" text:outline-level="3">Какой числовой режим задаёт: владелец - полныйдоступ, группа - чтение и выполнение, остальные - только выполнение?</text:h>
      <text:p text:style-name="List_20_Heading">правильный ответ:</text:p>
      <text:p text:style-name="вариант_5f_ответа">chmod 751 file</text:p>
      <text:p text:style-name="List_20_Heading">ошибки:</text:p>
      <text:p text:style-name="вариант_5f_ошибка">chmod 741 file</text:p>
      <text:p text:style-name="вариант_5f_ошибка">chmod 775 file</text:p>
      <text:p text:style-name="вариант_5f_ошибка">chmod 755 file</text:p>
      <text:p text:style-name="вариант_5f_ошибка">chmod 711 file</text:p>
      <text:p text:style-name="P10"/>
      <text:h text:style-name="Heading_20_3" text:outline-level="3">Какая команда позволяет изменить права доступа к файлу example.txt, установив для владельца права на чтение и запись, для группы - только на чтение, а для остальных пользователей - никаких прав?</text:h>
      <text:p text:style-name="List_20_Heading">правильный ответ:</text:p>
      <text:p text:style-name="вариант_5f_ответа">chmod 640 example.txt</text:p>
      <text:p text:style-name="List_20_Heading">ошибки:</text:p>
      <text:p text:style-name="P3">chmod 6400 example.txt</text:p>
      <text:p text:style-name="P3"><text:soft-page-break/>chmod 755 example.txt</text:p>
      <text:p text:style-name="P3">chmod 600 example.txt</text:p>
      <text:p text:style-name="P3">chmod 644 example.txt</text:p>
      <text:p text:style-name="P9"/>
      <text:h text:style-name="Heading_20_3" text:outline-level="3">Какой командой можно отправить HTTP-запрос и получить только код ответа, не загружая содержимое страницы?</text:h>
      <text:p text:style-name="List_20_Heading">правильный ответ:</text:p>
      <text:p text:style-name="вариант_5f_ответа">curl -s -w '%{http_code}' https://example.com</text:p>
      <text:p text:style-name="List_20_Heading">ошибки:</text:p>
      <text:p text:style-name="вариант_5f_ошибка">curl -s -o /dev/null -w "%{status}" https://example.com</text:p>
      <text:p text:style-name="вариант_5f_ошибка">curl -s -o /dev/null -w "%{response_code}" https://example.com</text:p>
      <text:p text:style-name="вариант_5f_ошибка">curl -s -o /dev/null -w '%{http_code}' https://example.com</text:p>
      <text:p text:style-name="вариант_5f_ошибка">curl -I -s https://example.com</text:p>
      <text:p text:style-name="P14"/>
      <text:h text:style-name="Heading_20_3" text:outline-level="3">Какой утилитой лучше всего проверить, открыт ли порт 443 на сервере example.com?</text:h>
      <text:p text:style-name="List_20_Heading">правильный ответ:</text:p>
      <text:p text:style-name="вариант_5f_ответа">nc -zv example.com 443</text:p>
      <text:p text:style-name="P11">ошибки:</text:p>
      <text:p text:style-name="вариант_5f_ошибка">netstat -an | grep 443</text:p>
      <text:p text:style-name="вариант_5f_ошибка">dig example.com</text:p>
      <text:p text:style-name="вариант_5f_ошибка">ping example.com</text:p>
      <text:p text:style-name="вариант_5f_ошибка">curl example.com:443</text:p>
      <text:p text:style-name="P11"/>
      <text:h text:style-name="Heading_20_3" text:outline-level="3">С помощью какой команды можно создать архив из каталога project в формате .tar.gz?</text:h>
      <text:p text:style-name="List_20_Heading">правильный ответ:</text:p>
      <text:p text:style-name="вариант_5f_ответа">tar -czf project.tar.gz project</text:p>
      <text:p text:style-name="List_20_Heading">ошибки:</text:p>
      <text:p text:style-name="P4">zip project.tzr.gz project</text:p>
      <text:p text:style-name="P4">gzip project &gt; project.tar.gz</text:p>
      <text:p text:style-name="P4"><text:soft-page-break/>archive project &gt; project.tar.gz</text:p>
      <text:p text:style-name="P4">tar -cvf project.tar.gz project</text:p>
      <text:p text:style-name="P5"/>
      <text:h text:style-name="Heading_20_3" text:outline-level="3">Для чего используют ключ -p в команде tar при создании архива?</text:h>
      <text:p text:style-name="List_20_Heading">правильный ответ:</text:p>
      <text:p text:style-name="P21">Для сохранения прав файлов</text:p>
      <text:p text:style-name="List_20_Heading">ошибки:</text:p>
      <text:p text:style-name="P4">Для смены владельца архива</text:p>
      <text:p text:style-name="P4">Для сжатия архива gzip</text:p>
      <text:p text:style-name="P4">Для удаления исходных файлов после архивации</text:p>
      <text:p text:style-name="P4">Для вывода списка файлов</text:p>
      <text:p text:style-name="P5"/>
      <text:h text:style-name="P20" text:outline-level="3"/>
      <text:p text:style-name="P16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29T09:38:43.929000000</dc:date>
    <meta:editing-duration>PT20H9M37S</meta:editing-duration>
    <meta:editing-cycles>37</meta:editing-cycles>
    <meta:generator>LibreOffice/7.2.4.1$Windows_X86_64 LibreOffice_project/27d75539669ac387bb498e35313b970b7fe9c4f9</meta:generator>
    <meta:document-statistic meta:table-count="0" meta:image-count="0" meta:object-count="0" meta:page-count="5" meta:paragraph-count="110" meta:word-count="527" meta:character-count="3601" meta:non-whitespace-character-count="3183"/>
  </office:meta>
</office:document-meta>
</file>