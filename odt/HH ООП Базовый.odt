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loext:opacity="0%" officeooo:paragraph-rsid="0027c7d8"/>
    </style:style>
    <style:style style:name="P2" style:family="paragraph" style:parent-style-name="Heading_20_3">
      <style:text-properties officeooo:rsid="0027c7d8" officeooo:paragraph-rsid="0027c7d8"/>
    </style:style>
    <style:style style:name="P3" style:family="paragraph" style:parent-style-name="Heading_20_3">
      <style:text-properties fo:language="ru" fo:country="RU"/>
    </style:style>
    <style:style style:name="P4" style:family="paragraph" style:parent-style-name="Standard">
      <style:text-properties fo:language="en" fo:country="US" officeooo:rsid="001defcb" officeooo:paragraph-rsid="001defcb"/>
    </style:style>
    <style:style style:name="P5" style:family="paragraph" style:parent-style-name="Standard">
      <style:text-properties fo:language="ru" fo:country="RU" officeooo:rsid="001defcb" officeooo:paragraph-rsid="001defcb"/>
    </style:style>
    <style:style style:name="P6" style:family="paragraph" style:parent-style-name="вариант_5f_ошибка">
      <style:text-properties fo:language="en" fo:country="US"/>
    </style:style>
    <style:style style:name="P7" style:family="paragraph" style:parent-style-name="Standard">
      <style:text-properties fo:language="ru" fo:country="RU" officeooo:rsid="0020651f" officeooo:paragraph-rsid="0020651f"/>
    </style:style>
    <style:style style:name="P8" style:family="paragraph" style:parent-style-name="Standard">
      <style:text-properties fo:language="ru" fo:country="RU" officeooo:rsid="00218f57" officeooo:paragraph-rsid="00218f57"/>
    </style:style>
    <style:style style:name="P9" style:family="paragraph" style:parent-style-name="вариант_5f_ошибка">
      <style:text-properties fo:language="en" fo:country="US" officeooo:rsid="00218f57"/>
    </style:style>
    <style:style style:name="P10" style:family="paragraph" style:parent-style-name="вариант_5f_ошибка">
      <style:text-properties fo:language="en" fo:country="US" officeooo:rsid="002557f0"/>
    </style:style>
    <style:style style:name="P11" style:family="paragraph" style:parent-style-name="Standard">
      <style:text-properties fo:language="en" fo:country="US" officeooo:rsid="0020651f" officeooo:paragraph-rsid="00229cde"/>
    </style:style>
    <style:style style:name="P12" style:family="paragraph" style:parent-style-name="Standard">
      <style:text-properties fo:language="ru" fo:country="RU" officeooo:rsid="0020651f" officeooo:paragraph-rsid="00229cde"/>
    </style:style>
    <style:style style:name="T1" style:family="text">
      <style:text-properties fo:language="ru" fo:country="RU" officeooo:rsid="003180dd"/>
    </style:style>
    <style:style style:name="T2" style:family="text">
      <style:text-properties fo:language="en" fo:country="US" officeooo:rsid="0027c7d8"/>
    </style:style>
    <style:style style:name="T3" style:family="text">
      <style:text-properties fo:language="ru" fo:country="RU" officeooo:rsid="0027c7d8"/>
    </style:style>
    <style:style style:name="T4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T1">ООП</text:span><text:span text:style-name="T2"> </text:span><text:span text:style-name="T3">Базовый уровень</text:span></text:h>
      <text:h text:style-name="P2" text:outline-level="3">Что такое метод в объектно-ориентированном программировании?</text:h>
      <text:p text:style-name="List_20_Heading">правильный ответ:</text:p>
      <text:p text:style-name="вариант_5f_ответа">Функция или процедура внутри класса или объекта</text:p>
      <text:p text:style-name="List_20_Heading">ошибки:</text:p>
      <text:p text:style-name="вариант_5f_ошибка">Переменная, связанная с классом или объектом</text:p>
      <text:p text:style-name="вариант_5f_ошибка">Тип объекта, который является изменяемым</text:p>
      <text:p text:style-name="вариант_5f_ошибка">Характеристика типа связи одного класса с другим</text:p>
      <text:p text:style-name="вариант_5f_ошибка">Вид класса, который преобразует входные данные и всегда возвращает какое-либо значение</text:p>
      <text:p text:style-name="Standard"/>
      <text:h text:style-name="Heading_20_3" text:outline-level="3">Выберите вариант, наиболее точно описывающий, какие принципы ООП направлены на организацию гибкости и переносимости кода.</text:h>
      <text:p text:style-name="List_20_Heading">правильный ответ:</text:p>
      <text:p text:style-name="вариант_5f_ответа">Наследование и полиморфизм - для создания многократно используемого безопасного кода и возможности изменения поведения объектов</text:p>
      <text:p text:style-name="List_20_Heading">ошибки:</text:p>
      <text:p text:style-name="вариант_5f_ошибка">Абстракция - для сокрытия данных и возможности расширения функционала без изменения существующего кода, наследование - для передачи объектов</text:p>
      <text:p text:style-name="вариант_5f_ошибка">Инкапсуляция - для выстраивания взаимодействия между классами, наследование - для минимизации зависимости между классами</text:p>
      <text:p text:style-name="вариант_5f_ошибка">Полиморфизм - для минимизации зависимости между классами, абстракция - для эффективного использования наследования</text:p>
      <text:p text:style-name="вариант_5f_ошибка">Полиморфизм и абстракция - для упрощения и унификации кода, который работает с разными объектами через общий интерфейс</text:p>
      <text:p text:style-name="Standard"/>
      <text:h text:style-name="Heading_20_3" text:outline-level="3">Согласно принципу подстановки Барбары Лисков (Liskov Substitution Principle) в SOLID подклассы должны...</text:h>
      <text:p text:style-name="List_20_Heading">правильный ответ:</text:p>
      <text:p text:style-name="вариант_5f_ответа">Заменять родительские классы, не нарушая корректности программы</text:p>
      <text:p text:style-name="List_20_Heading">ошибки:</text:p>
      <text:p text:style-name="вариант_5f_ошибка">Наследовать все атрибуты и методы родительского класса без изменений</text:p>
      <text:p text:style-name="вариант_5f_ошибка"><text:soft-page-break/>Иметь те же атрибуты, что и родительский класс, но не копировать методы</text:p>
      <text:p text:style-name="вариант_5f_ошибка">Заменять методы родительского класса своими атрибутами</text:p>
      <text:p text:style-name="вариант_5f_ошибка">Наследовать методы родительского класса, но не изменять их функциональность</text:p>
      <text:p text:style-name="Standard"/>
      <text:h text:style-name="P3" text:outline-level="3">Необходимо создать программу, которая будет работать в качестве каталогизатора книг в библиотеке. Для этого мы будем использовать принципы ООП. Выберите вариант, который решит данную задачу наиболее полно.</text:h>
      <text:p text:style-name="List_20_Heading">правильный ответ:</text:p>
      <text:p text:style-name="вариант_5f_ответа">Создаем класс "Книга" с атрибутами "Автор", "Название, "Год издания" и "Количество страниц", а также методами "Можно читать", "Получить возраст книги"</text:p>
      <text:p text:style-name="List_20_Heading">ошибки:</text:p>
      <text:p text:style-name="вариант_5f_ошибка">Создаем класс "Книга" с атрибутами "Автор", "Название", "Год издания", который будет наследовать методы от класса "Каталог", где информация о книге будет храниться в отдельном файле</text:p>
      <text:p text:style-name="вариант_5f_ошибка">Создаем класс "Читатель" с атрибутами "Имя" и "Возраст", а также второй класс "Книга", который будет объединен с классом "Читатель" посредством связи между именем и возрастом</text:p>
      <text:p text:style-name="вариант_5f_ошибка">Создаем класс "Книга", являющийся абстрактным, от которого будут наследоваться атрибуты "Количество страниц", "Возраст" и "Автор" для каждой книги в библиотеке</text:p>
      <text:p text:style-name="вариант_5f_ошибка">Создаем класс "Книга" с атрибутом "Название", хранящимся в виде стрроки, а также атрибутами "Автор" и "Количество страниц", хранящимися в отдельном файле</text:p>
      <text:p text:style-name="P4"/>
      <text:h text:style-name="Heading_20_3" text:outline-level="3">Вы создаете класс "Собака" и задаете емуприватный (private) метод "Лаять" и приватный атрибут "Голод". Это пример реализации какого принципа ООП?</text:h>
      <text:p text:style-name="List_20_Heading">правильный ответ:</text:p>
      <text:p text:style-name="вариант_5f_ответа">Инкапсуляция</text:p>
      <text:p text:style-name="List_20_Heading">ошибки:</text:p>
      <text:p text:style-name="вариант_5f_ошибка">Наследование</text:p>
      <text:p text:style-name="вариант_5f_ошибка">Закрытость</text:p>
      <text:p text:style-name="вариант_5f_ошибка">Полиморфизм</text:p>
      <text:p text:style-name="вариант_5f_ошибка"><text:soft-page-break/>Абстракция</text:p>
      <text:p text:style-name="P5"/>
      <text:h text:style-name="Heading_20_3" text:outline-level="3">Какая конструкция в ООП используется для обработки исключений?</text:h>
      <text:p text:style-name="List_20_Heading">правильный ответ:</text:p>
      <text:p text:style-name="вариант_5f_ответа">Try-except</text:p>
      <text:p text:style-name="List_20_Heading">ошибки:</text:p>
      <text:p text:style-name="вариант_5f_ошибка">Test-error</text:p>
      <text:p text:style-name="вариант_5f_ошибка">While-exception</text:p>
      <text:p text:style-name="вариант_5f_ошибка">Check-raise</text:p>
      <text:p text:style-name="вариант_5f_ошибка">Key-error</text:p>
      <text:p text:style-name="P5"/>
      <text:h text:style-name="Heading_20_3" text:outline-level="3">Какая из следующих характеристик отличает объектно-ориентированные языки программирования от процедурных?</text:h>
      <text:p text:style-name="List_20_Heading">правильный ответ:</text:p>
      <text:p text:style-name="вариант_5f_ответа">Взаимодействие через объекты, содержищие данные и методы</text:p>
      <text:p text:style-name="List_20_Heading">ошибки:</text:p>
      <text:p text:style-name="P6">Операции только с потоками данных и х фильтрацией</text:p>
      <text:p text:style-name="P6">Преимущественная работа с реляционными данными и классами</text:p>
      <text:p text:style-name="P6">Использование функций для разбиения программы на части</text:p>
      <text:p text:style-name="P6">Обработка объектов через строгие декларативныеструктуры</text:p>
      <text:p text:style-name="P7"/>
      <text:h text:style-name="Heading_20_3" text:outline-level="3">Вы создаете класс Кот, в котором объявлен атрибут порода. Для него определен геттер, но отдельный сеттер не задан. Внутри конструктора класса создается объект Барсик с породой "персидская". Позже создается объект Пушинка. При попытке присвоить новое значение через Пушинка.порода = "сиамская" программа выдаёт ошибку. Кроме того, в дочернем классе УмныйКот вы пробуете обратиться к полю порода в методе, но получаете ошибку. Какое из утверждений верное?</text:h>
      <text:p text:style-name="List_20_Heading">правильный ответ:</text:p>
      <text:p text:style-name="вариант_5f_ответа">Атрибут порода недоступен извне, а также из подклассов, поскольку он private и требует использования сеттеров для изменения</text:p>
      <text:p text:style-name="List_20_Heading">ошибки:</text:p>
      <text:p text:style-name="вариант_5f_ошибка"><text:soft-page-break/>Атрибут порода является статическим, и его изменение через экземпляр приводит к ошибке</text:p>
      <text:p text:style-name="вариант_5f_ошибка">Атрибут порода является публичным, но не может быть изменён, пока не будет использован super()</text:p>
      <text:p text:style-name="P8"/>
      <text:h text:style-name="Heading_20_3" text:outline-level="3">Какой процесс позволяет создать новый объект на основе существующего класса?</text:h>
      <text:p text:style-name="List_20_Heading">правильный ответ:</text:p>
      <text:p text:style-name="вариант_5f_ответа">Вызов метода конструктора класса с нужными аргументами</text:p>
      <text:p text:style-name="List_20_Heading">ошибки:</text:p>
      <text:p text:style-name="P9">Создание объекта через модификацию статического метода</text:p>
      <text:p text:style-name="P9">Вызов деструктора с параметром Destruction = False</text:p>
      <text:p text:style-name="P9">Вызов приватного метода класса для инициализации объекта</text:p>
      <text:p text:style-name="P9">Использование наследования для создания объекта из родительского класса</text:p>
      <text:p text:style-name="P7"/>
      <text:h text:style-name="Heading_20_3" text:outline-level="3">В класс Car есть метод _update_speed, который является защищенным. В какой ситуации будет корректно использовать этот метод?</text:h>
      <text:p text:style-name="List_20_Heading">правильный ответ:</text:p>
      <text:p text:style-name="вариант_5f_ответа">Можно вызвать только внутри метода этого же класса или подклассов</text:p>
      <text:p text:style-name="List_20_Heading">ошибки:</text:p>
      <text:p text:style-name="P10">Метод можно вызвать только с использованием публичных методов</text:p>
      <text:p text:style-name="P10">Это метод может быть использован любым объектом любого класса</text:p>
      <text:p text:style-name="P10">Метод можно вызвать только через статический метод класса</text:p>
      <text:p text:style-name="P10">Можно вызывать данный метод напрямую из любого класса</text:p>
      <text:p text:style-name="P11"/>
      <text:p text:style-name="P12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0:43:18.138572600</meta:creation-date>
    <dc:date>2026-06-20T20:37:24.675431000</dc:date>
    <meta:editing-duration>PT21H36M10S</meta:editing-duration>
    <meta:editing-cycles>40</meta:editing-cycles>
    <meta:generator>LibreOffice/25.8.4.2$Windows_X86_64 LibreOffice_project/290daaa01b999472f0c7a3890eb6a550fd74c6df</meta:generator>
    <meta:document-statistic meta:table-count="0" meta:image-count="0" meta:object-count="0" meta:page-count="4" meta:paragraph-count="79" meta:word-count="654" meta:character-count="5012" meta:non-whitespace-character-count="4437"/>
  </office:meta>
</office:document-meta>
</file>