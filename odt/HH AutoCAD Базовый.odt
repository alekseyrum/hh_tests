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D000001AF9E882293.png" manifest:media-type="image/png"/>
  <manifest:file-entry manifest:full-path="Pictures/10000001000002D7000001AEB5EE15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Standard">
      <style:text-properties fo:language="en" fo:country="US" officeooo:rsid="001defcb" officeooo:paragraph-rsid="001defcb"/>
    </style:style>
    <style:style style:name="P4" style:family="paragraph" style:parent-style-name="Standard">
      <style:text-properties fo:language="ru" fo:country="RU" officeooo:rsid="001defcb" officeooo:paragraph-rsid="001defcb"/>
    </style:style>
    <style:style style:name="P5" style:family="paragraph" style:parent-style-name="вариант_5f_ошибка">
      <style:text-properties fo:language="en" fo:country="US"/>
    </style:style>
    <style:style style:name="P6" style:family="paragraph" style:parent-style-name="Standard">
      <style:text-properties fo:language="ru" fo:country="RU" officeooo:rsid="0020651f" officeooo:paragraph-rsid="0020651f"/>
    </style:style>
    <style:style style:name="P7" style:family="paragraph" style:parent-style-name="Standard">
      <style:text-properties fo:language="ru" fo:country="RU" officeooo:rsid="00218f57" officeooo:paragraph-rsid="00218f57"/>
    </style:style>
    <style:style style:name="P8" style:family="paragraph" style:parent-style-name="вариант_5f_ошибка">
      <style:text-properties fo:language="en" fo:country="US" officeooo:rsid="00218f57"/>
    </style:style>
    <style:style style:name="P9" style:family="paragraph" style:parent-style-name="вариант_5f_ошибка">
      <style:text-properties fo:language="en" fo:country="US" officeooo:rsid="002557f0"/>
    </style:style>
    <style:style style:name="P10" style:family="paragraph" style:parent-style-name="Standard">
      <style:text-properties fo:language="en" fo:country="US" officeooo:rsid="0020651f" officeooo:paragraph-rsid="00229cde"/>
    </style:style>
    <style:style style:name="P11" style:family="paragraph" style:parent-style-name="Standard">
      <style:text-properties fo:language="ru" fo:country="RU" officeooo:rsid="0020651f" officeooo:paragraph-rsid="00229cde"/>
    </style:style>
    <style:style style:name="T1" style:family="text">
      <style:text-properties fo:language="en" fo:country="US" officeooo:rsid="0027c7d8"/>
    </style:style>
    <style:style style:name="T2" style:family="text">
      <style:text-properties fo:language="ru" fo:country="RU" officeooo:rsid="0027c7d8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AutoCAD </text:span><text:span text:style-name="T2">Базовый уровень</text:span></text:h>
      <text:h text:style-name="P2" text:outline-level="3">Что происходит при активации кнопки "Сетка"?</text:h>
      <text:p text:style-name="List_20_Heading">правильный ответ:</text:p>
      <text:p text:style-name="вариант_5f_ответа">Включается режим отображения сетки</text:p>
      <text:p text:style-name="List_20_Heading">ошибки:</text:p>
      <text:p text:style-name="вариант_5f_ошибка">Включается режим привязки курсора к точкам сетки</text:p>
      <text:p text:style-name="вариант_5f_ошибка">Включается режим привязки геометрии к точкам сетки</text:p>
      <text:p text:style-name="вариант_5f_ошибка">Включается режим отображения сетки и привязка к ней геометрии и курсора</text:p>
      <text:p text:style-name="вариант_5f_ошибка">Включается режим привязки геометрии и курсора к точкам сетки</text:p>
      <text:p text:style-name="Standard"/>
      <text:h text:style-name="Heading_20_3" text:outline-level="3">Какие точки объектной привязки активирует метод "Квадрант"?</text:h>
      <text:p text:style-name="List_20_Heading">правильный ответ:</text:p>
      <text:p text:style-name="вариант_5f_ответа">Точки делящие круги, эллипсы и дуги на четверти</text:p>
      <text:p text:style-name="List_20_Heading">ошибки:</text:p>
      <text:p text:style-name="вариант_5f_ошибка">Точки, делящие стороны многоугольников на равные части</text:p>
      <text:p text:style-name="вариант_5f_ошибка">Точки делящие замкнутую область на равные части</text:p>
      <text:p text:style-name="вариант_5f_ошибка">Точки, делящие отрезки на кратные отрезки</text:p>
      <text:p text:style-name="вариант_5f_ошибка">Точки, делящие углы на равные четверти</text:p>
      <text:p text:style-name="Standard"/>
      <text:h text:style-name="Heading_20_3" text:outline-level="3"><text:soft-page-break/>Какие привязки и ограничения ДОСТАТОЧНО активировать, чтобы построить из отрезков без применения дополнительной геометрии два квадрата, стороны одного из которых будут равноудалены от сторон другого?</text:h>
      <text:p text:style-name="List_20_Heading"><draw:frame draw:style-name="fr1" draw:name="Изображение1" text:anchor-type="char" svg:width="5.161cm" svg:height="5.602cm" draw:z-index="0"><draw:image xlink:href="Pictures/100000010000018D000001AF9E882293.png" xlink:type="simple" xlink:show="embed" xlink:actuate="onLoad" draw:mime-type="image/png"/></draw:frame></text:p>
      <text:p text:style-name="List_20_Heading">правильный ответ:</text:p>
      <text:p text:style-name="вариант_5f_ответа">Режим привязки к сетке и ортогональное ограничение перемещения курсора</text:p>
      <text:p text:style-name="List_20_Heading">ошибки:</text:p>
      <text:p text:style-name="вариант_5f_ошибка">Режим привязки "Нормаль" и ортогональное ограничение перемещения курсора</text:p>
      <text:p text:style-name="вариант_5f_ошибка">Режим привязки к сетке</text:p>
      <text:p text:style-name="вариант_5f_ошибка">Режим привязки "Нормаль"</text:p>
      <text:p text:style-name="вариант_5f_ошибка">Ортогональное ограничение перемещения курсора</text:p>
      <text:p text:style-name="Standard"/>
      <text:h text:style-name="Heading_20_3" text:outline-level="3"><text:span text:style-name="T3">Какой вид построения круга отсутствует в AutoCAD?</text:span></text:h>
      <text:p text:style-name="List_20_Heading">правильный ответ:</text:p>
      <text:p text:style-name="вариант_5f_ответа">Две точки, радиус </text:p>
      <text:p text:style-name="List_20_Heading">ошибки:</text:p>
      <text:p text:style-name="вариант_5f_ошибка">Две точки касания, радиус</text:p>
      <text:p text:style-name="вариант_5f_ошибка">Три точки</text:p>
      <text:p text:style-name="вариант_5f_ошибка">Две точки</text:p>
      <text:p text:style-name="вариант_5f_ошибка">Три точки касания</text:p>
      <text:p text:style-name="P3"/>
      <text:h text:style-name="Heading_20_3" text:outline-level="3"><text:soft-page-break/>Большая дуга построена через функцию "Смещение" от меньшей дуги. Как при этом теперь может быть отредактирована большая дуга?</text:h>
      <text:p text:style-name="List_20_Heading"><draw:frame draw:style-name="fr2" draw:name="Изображение2" text:anchor-type="char" svg:width="9.109cm" svg:height="5.389cm" draw:z-index="1"><draw:image xlink:href="Pictures/10000001000002D7000001AEB5EE157A.png" xlink:type="simple" xlink:show="embed" xlink:actuate="onLoad" draw:mime-type="image/png"/></draw:frame></text:p>
      <text:p text:style-name="List_20_Heading">правильный ответ:</text:p>
      <text:p text:style-name="вариант_5f_ответа">Её можно редактировать как вместе с меньшей дугой, так и отдельно</text:p>
      <text:p text:style-name="List_20_Heading">ошибки:</text:p>
      <text:p text:style-name="вариант_5f_ошибка">Её редактирование возможно только через изменение параметра расстояния смещения</text:p>
      <text:p text:style-name="вариант_5f_ошибка">Её можно редактировать только отдельно от меньшей дуги, изменяя параметры смещения</text:p>
      <text:p text:style-name="вариант_5f_ошибка">Её можно редактировать только с помощью команд масштаба и перемещения</text:p>
      <text:p text:style-name="вариант_5f_ошибка">Её можно редактировать только вместе с меньшей дугой, так как они связаны как единое целое</text:p>
      <text:p text:style-name="P4"/>
      <text:h text:style-name="Heading_20_3" text:outline-level="3">Вы выделили несколько объектов на чертеже для копирования, при этом часть из них копировать не нужно. Что нужно сделать, чтобы снять выделение с лишних объектов (на операционной системе Windows)?</text:h>
      <text:p text:style-name="List_20_Heading">правильный ответ:</text:p>
      <text:p text:style-name="вариант_5f_ответа">Удерживая Shift, выбрать лишние объекты нажатием ЛКМ</text:p>
      <text:p text:style-name="List_20_Heading">ошибки:</text:p>
      <text:p text:style-name="вариант_5f_ошибка">Повторно выбрать лишние объекты нажатием ЛКМ</text:p>
      <text:p text:style-name="вариант_5f_ошибка">Повторно выбрать лишние объекты двойным нажатием ЛКМ</text:p>
      <text:p text:style-name="вариант_5f_ошибка">Удерживая Ctrl, выбрать лишние объекты нажатием ЛКМ</text:p>
      <text:p text:style-name="вариант_5f_ошибка">Удерживая Alt, выбрать лишние объекты нажатием ЛКМ</text:p>
      <text:p text:style-name="P4"/>
      <text:h text:style-name="Heading_20_3" text:outline-level="3"><text:soft-page-break/>Что из нижеперечисленного НЕ помешает удалить слой?</text:h>
      <text:p text:style-name="List_20_Heading">правильный ответ:</text:p>
      <text:p text:style-name="вариант_5f_ответа">Вы отключили видимость слоя</text:p>
      <text:p text:style-name="List_20_Heading">ошибки:</text:p>
      <text:p text:style-name="P5">Вы пытаетесь удалить нулевой слой</text:p>
      <text:p text:style-name="P5">Вы добавили внешние ссылки на слой</text:p>
      <text:p text:style-name="P5">Слой содержит объекты</text:p>
      <text:p text:style-name="P5">Этот слой назначен "текущим"</text:p>
      <text:p text:style-name="P6"/>
      <text:h text:style-name="Heading_20_3" text:outline-level="3">Вы создаете чертеж и для упрощения управления и визуализацией планируете использовать слои. Какое из следующих действий НЕ получится выполнить с помощью функции "Слой" в AutoCAD?</text:h>
      <text:p text:style-name="List_20_Heading">правильный ответ:</text:p>
      <text:p text:style-name="вариант_5f_ответа">Добавление тегов и атрибутов в свойствах слоя</text:p>
      <text:p text:style-name="List_20_Heading">ошибки:</text:p>
      <text:p text:style-name="вариант_5f_ошибка">Группировка объектов</text:p>
      <text:p text:style-name="вариант_5f_ошибка">Размещение объектов с разными свойствами (толщина, цвет линий)</text:p>
      <text:p text:style-name="вариант_5f_ошибка">Добавление текстового пояснения в свойствах слоя</text:p>
      <text:p text:style-name="вариант_5f_ошибка">Размещение аннотационных объектов</text:p>
      <text:p text:style-name="P7"/>
      <text:h text:style-name="Heading_20_3" text:outline-level="3">Для чего применяются видовые экраны?</text:h>
      <text:p text:style-name="List_20_Heading">правильный ответ:</text:p>
      <text:p text:style-name="вариант_5f_ответа">Чтобы отобразить виды с пространства модели на листе</text:p>
      <text:p text:style-name="List_20_Heading">ошибки:</text:p>
      <text:p text:style-name="P8">Чтобы сохранить конкретные виды 2D-модели и иметь возможность к ним вернуться, даже если вы повернете или переместите эту модель</text:p>
      <text:p text:style-name="P8">Чтобы взаимосвязанно редактировать элементы чертежа, расположенные на разных геометрических видах</text:p>
      <text:p text:style-name="P8">Чтобы сохранить текущий вид чертежа и корректно вывести его на печать</text:p>
      <text:p text:style-name="P8">Чтобы ограничить текущую область построения элементов чертежа</text:p>
      <text:p text:style-name="P6"/>
      <text:h text:style-name="Heading_20_3" text:outline-level="3"><text:soft-page-break/>Вы работаете с листом, видовыый экран активирован и разблокирован. Что произойдет с масштабом вашего видового экрана, если вы делаете отдаление или приближение?</text:h>
      <text:p text:style-name="List_20_Heading">правильный ответ:</text:p>
      <text:p text:style-name="вариант_5f_ответа">Масштаб меняется на нестандартный</text:p>
      <text:p text:style-name="List_20_Heading">ошибки:</text:p>
      <text:p text:style-name="P9">Масштаб видового экрана меняется на следующий стандартный</text:p>
      <text:p text:style-name="P9">Масштаб остается прежним</text:p>
      <text:p text:style-name="P9">Масштаб сбрасывается к начальному значению 1:1</text:p>
      <text:p text:style-name="P9">Масштаб увеличивается или уменьшается ровно в два раза</text:p>
      <text:p text:style-name="P10"/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07T12:48:25.143425100</dc:date>
    <meta:editing-duration>PT19H56M55S</meta:editing-duration>
    <meta:editing-cycles>34</meta:editing-cycles>
    <meta:generator>LibreOffice/25.8.4.2$Windows_X86_64 LibreOffice_project/290daaa01b999472f0c7a3890eb6a550fd74c6df</meta:generator>
    <meta:document-statistic meta:table-count="0" meta:image-count="2" meta:object-count="0" meta:page-count="5" meta:paragraph-count="81" meta:word-count="519" meta:character-count="3766" meta:non-whitespace-character-count="3327"/>
  </office:meta>
</office:document-meta>
</file>