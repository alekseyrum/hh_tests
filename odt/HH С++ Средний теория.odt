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efcb" officeooo:paragraph-rsid="001defcb"/>
    </style:style>
    <style:style style:name="P2" style:family="paragraph" style:parent-style-name="вариант_5f_ошибка">
      <style:text-properties fo:language="en" fo:country="US" officeooo:rsid="00218f57" officeooo:paragraph-rsid="00218f57"/>
    </style:style>
    <style:style style:name="P3" style:family="paragraph" style:parent-style-name="Standard">
      <style:text-properties fo:language="en" fo:country="US" officeooo:rsid="0020651f" officeooo:paragraph-rsid="0020651f"/>
    </style:style>
    <style:style style:name="P4" style:family="paragraph" style:parent-style-name="Standard">
      <style:text-properties fo:language="en" fo:country="US" officeooo:rsid="0020651f" officeooo:paragraph-rsid="0021a319"/>
    </style:style>
    <style:style style:name="P5" style:family="paragraph" style:parent-style-name="Standard">
      <style:text-properties fo:language="en" fo:country="US" officeooo:rsid="0021a319" officeooo:paragraph-rsid="0021a319"/>
    </style:style>
    <style:style style:name="P6" style:family="paragraph" style:parent-style-name="Standard">
      <style:text-properties fo:language="ru" fo:country="RU" officeooo:rsid="001defcb" officeooo:paragraph-rsid="001defcb"/>
    </style:style>
    <style:style style:name="P7" style:family="paragraph" style:parent-style-name="Standard">
      <style:text-properties fo:language="ru" fo:country="RU" officeooo:rsid="0020651f" officeooo:paragraph-rsid="0020651f"/>
    </style:style>
    <style:style style:name="P8" style:family="paragraph" style:parent-style-name="Standard">
      <style:text-properties fo:language="ru" fo:country="RU" officeooo:rsid="00218f57" officeooo:paragraph-rsid="00218f57"/>
    </style:style>
    <style:style style:name="P9" style:family="paragraph" style:parent-style-name="Standard">
      <style:text-properties fo:language="ru" fo:country="RU" officeooo:rsid="002a1188" officeooo:paragraph-rsid="002a1188"/>
    </style:style>
    <style:style style:name="P10" style:family="paragraph" style:parent-style-name="Standard">
      <style:text-properties fo:language="ru" fo:country="RU" officeooo:rsid="0021a319" officeooo:paragraph-rsid="0021a319"/>
    </style:style>
    <style:style style:name="P11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12" style:family="paragraph" style:parent-style-name="Heading_20_3">
      <style:text-properties officeooo:paragraph-rsid="002d06d5"/>
    </style:style>
    <style:style style:name="P13" style:family="paragraph" style:parent-style-name="List_20_Heading">
      <style:text-properties officeooo:paragraph-rsid="002d06d5"/>
    </style:style>
    <style:style style:name="P14" style:family="paragraph" style:parent-style-name="Standard">
      <style:text-properties fo:language="en" fo:country="US" officeooo:rsid="0020651f" officeooo:paragraph-rsid="0020651f"/>
    </style:style>
    <style:style style:name="P15" style:family="paragraph" style:parent-style-name="Standard">
      <style:text-properties fo:language="en" fo:country="US" officeooo:rsid="0020651f" officeooo:paragraph-rsid="0021a319"/>
    </style:style>
    <style:style style:name="P16" style:family="paragraph" style:parent-style-name="Standard">
      <style:text-properties fo:language="en" fo:country="US" officeooo:rsid="0020651f" officeooo:paragraph-rsid="00229cde"/>
    </style:style>
    <style:style style:name="P17" style:family="paragraph" style:parent-style-name="вариант_5f_ответа">
      <style:text-properties officeooo:paragraph-rsid="002d06d5"/>
    </style:style>
    <style:style style:name="P18" style:family="paragraph" style:parent-style-name="вариант_5f_ошибка">
      <style:text-properties fo:language="en" fo:country="US" officeooo:rsid="0020651f" officeooo:paragraph-rsid="002d06d5"/>
    </style:style>
    <style:style style:name="T1" style:family="text">
      <style:text-properties officeooo:rsid="001d7965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2d2fc5"/>
    </style:style>
    <style:style style:name="T4" style:family="text">
      <style:text-properties fo:color="#c9211e" loext:opacity="100%" fo:language="en" fo:country="US"/>
    </style:style>
    <style:style style:name="T5" style:family="text">
      <style:text-properties fo:color="#c9211e" loext:opacity="100%" fo:language="en" fo:country="US" officeooo:rsid="002d2fc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557f0"/>
    </style:style>
    <style:style style:name="T8" style:family="text">
      <style:text-properties fo:language="en" fo:country="US" officeooo:rsid="002d2fc5"/>
    </style:style>
    <style:style style:name="T9" style:family="text">
      <style:text-properties officeooo:rsid="0027a6a4"/>
    </style:style>
    <style:style style:name="T10" style:family="text">
      <style:text-properties fo:language="ru" fo:country="RU"/>
    </style:style>
    <style:style style:name="T11" style:family="text">
      <style:text-properties officeooo:rsid="002a1188"/>
    </style:style>
    <style:style style:name="T12" style:family="text">
      <style:text-properties officeooo:rsid="002557f0"/>
    </style:style>
    <style:style style:name="T13" style:family="text">
      <style:text-properties officeooo:rsid="002d06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С++ </text:span>Средний уровень</text:h>
      <text:h text:style-name="Heading_20_3" text:outline-level="3">Как объявить константный указатель на изменяемое целое число?</text:h>
      <text:p text:style-name="List_20_Heading">правильный ответ:</text:p>
      <text:p text:style-name="вариант_5f_ответа"><text:span text:style-name="T2">int</text:span> *<text:span text:style-name="T2">const</text:span> ptr</text:p>
      <text:p text:style-name="List_20_Heading">ошибки:</text:p>
      <text:p text:style-name="вариант_5f_ошибка"><text:span text:style-name="T2">int</text:span> <text:span text:style-name="T2">const</text:span> *ptr</text:p>
      <text:p text:style-name="вариант_5f_ошибка"><text:span text:style-name="T2">const</text:span> <text:span text:style-name="T2">int</text:span> *ptr</text:p>
      <text:p text:style-name="вариант_5f_ошибка"><text:span text:style-name="T2">int</text:span> <text:span text:style-name="T2">const</text:span> *<text:span text:style-name="T2">const</text:span> ptr</text:p>
      <text:p text:style-name="вариант_5f_ошибка"><text:span text:style-name="T2">const</text:span> <text:span text:style-name="T2">int</text:span> &amp;ptr</text:p>
      <text:p text:style-name="Standard"/>
      <text:h text:style-name="Heading_20_3" text:outline-level="3">Как правильно прочитать строку с пробелами?</text:h>
      <text:p text:style-name="блок_5f_кода">std::string line;</text:p>
      <text:p text:style-name="блок_5f_кода">____;</text:p>
      <text:p text:style-name="List_20_Heading">правильный ответ:</text:p>
      <text:p text:style-name="вариант_5f_ответа">std::getline(std::cin, line)</text:p>
      <text:p text:style-name="List_20_Heading">ошибки:</text:p>
      <text:p text:style-name="вариант_5f_ошибка">std::cin &gt;&gt; line</text:p>
      <text:p text:style-name="вариант_5f_ошибка">std::cin.read(line)</text:p>
      <text:p text:style-name="вариант_5f_ошибка">std::cout &gt;&gt; line</text:p>
      <text:p text:style-name="вариант_5f_ошибка">std::cout &lt;&lt; line</text:p>
      <text:p text:style-name="Standard"/>
      <text:h text:style-name="Heading_20_3" text:outline-level="3">Система обработки событий <text:span text:style-name="T6">Event </text:span>в реальном времени должна удовлетворять следующим требованиям:</text:h>
      <text:h text:style-name="Heading_20_3" text:outline-level="3">Приоритетна<text:span text:style-name="T9">я</text:span> обработка событий</text:h>
      <text:h text:style-name="Heading_20_3" text:outline-level="3">Быстрое извлечение наиболее важных событий</text:h>
      <text:h text:style-name="Heading_20_3" text:outline-level="3">Частое обновление приоритетов</text:h>
      <text:h text:style-name="Heading_20_3" text:outline-level="3">Выберите контейнер, который позволяет эффективно реализовать данные требования.</text:h>
      <text:p text:style-name="List_20_Heading">правильный ответ:</text:p>
      <text:p text:style-name="вариант_5f_ответа">std::priority_queue&lt;Event&gt;</text:p>
      <text:p text:style-name="List_20_Heading"><text:soft-page-break/>ошибки:</text:p>
      <text:p text:style-name="вариант_5f_ошибка">std::queue&lt;Event&gt;</text:p>
      <text:p text:style-name="вариант_5f_ошибка">std::deque&lt;Event&gt;</text:p>
      <text:p text:style-name="вариант_5f_ошибка">std::multiset&lt;Event&gt;</text:p>
      <text:p text:style-name="вариант_5f_ошибка">std::set&lt;Event&gt;</text:p>
      <text:p text:style-name="Standard"/>
      <text:h text:style-name="Heading_20_3" text:outline-level="3">Укажите правильный вариант операторов по удалению диапазона динамической памяти, выделенной под одномерный массив а из <text:span text:style-name="T6">n </text:span><text:span text:style-name="T10">целых чисел.</text:span></text:h>
      <text:p text:style-name="List_20_Heading">правильный ответ:</text:p>
      <text:p text:style-name="вариант_5f_ответа"><text:span text:style-name="T2">delete</text:span>[] a </text:p>
      <text:p text:style-name="List_20_Heading">ошибки:</text:p>
      <text:p text:style-name="вариант_5f_ошибка">delete a[]</text:p>
      <text:p text:style-name="вариант_5f_ошибка">delete a[n]</text:p>
      <text:p text:style-name="вариант_5f_ошибка">delete a</text:p>
      <text:p text:style-name="вариант_5f_ошибка">delete[n] a</text:p>
      <text:p text:style-name="P1"/>
      <text:h text:style-name="Heading_20_3" text:outline-level="3">Какое выражение нужно вставить на место пропуска в коде ниже, чтобы в консоль вывелось 16?</text:h>
      <text:p text:style-name="блок_5f_кода"><text:span text:style-name="T2">int</text:span> main() {</text:p>
      <text:p text:style-name="блок_5f_кода"><text:s text:c="4"/><text:span text:style-name="T2">int</text:span> a = 1;</text:p>
      <text:p text:style-name="блок_5f_кода"><text:s text:c="4"/>a = a____;</text:p>
      <text:p text:style-name="блок_5f_кода"><text:s text:c="4"/>std::cout &lt;&lt; a;</text:p>
      <text:p text:style-name="блок_5f_кода">}</text:p>
      <text:p text:style-name="List_20_Heading">правильный ответ:</text:p>
      <text:p text:style-name="вариант_5f_ответа">&lt;&lt; (1 &lt;&lt; 2);</text:p>
      <text:p text:style-name="List_20_Heading">ошибки:</text:p>
      <text:p text:style-name="вариант_5f_ошибка">&lt;&lt; 1 &lt;&lt; 2</text:p>
      <text:p text:style-name="вариант_5f_ошибка">&lt;&lt; (2 &gt;&gt; 1)</text:p>
      <text:p text:style-name="вариант_5f_ошибка">&gt;&gt; (1 &lt;&lt; 2)</text:p>
      <text:p text:style-name="вариант_5f_ошибка">&lt;&lt; 2 &lt;&lt; 1</text:p>
      <text:p text:style-name="P6"/>
      <text:h text:style-name="Heading_20_3" text:outline-level="3"><text:soft-page-break/>Для хранения номеров заказов клиентов нужна структура данных, которая позволяет хранить уникальные элементы и быстро проверять их наличие. Выберите контейнер, который обеспечивает эффективное время вставки и поиска элементов.</text:h>
      <text:p text:style-name="List_20_Heading">правильный ответ:</text:p>
      <text:p text:style-name="вариант_5f_ответа">std::unordered_set</text:p>
      <text:p text:style-name="List_20_Heading">ошибки:</text:p>
      <text:p text:style-name="вариант_5f_ошибка">std::stack</text:p>
      <text:p text:style-name="вариант_5f_ошибка">std::deque</text:p>
      <text:p text:style-name="вариант_5f_ошибка">std::vector</text:p>
      <text:p text:style-name="вариант_5f_ошибка">std::list</text:p>
      <text:p text:style-name="P6"/>
      <text:h text:style-name="Heading_20_3" text:outline-level="3">Какой тип связи между классами использует класс Computer?</text:h>
      <text:p text:style-name="блок_5f_кода">class CPU {</text:p>
      <text:p text:style-name="блок_5f_кода">public:</text:p>
      <text:p text:style-name="блок_5f_кода"><text:s text:c="4"/>void process() { std::cout &lt;&lt; "Processing data;"}</text:p>
      <text:p text:style-name="блок_5f_кода">};</text:p>
      <text:p text:style-name="блок_5f_кода">class RAM {</text:p>
      <text:p text:style-name="блок_5f_кода">public:</text:p>
      <text:p text:style-name="блок_5f_кода"><text:s text:c="4"/>void load() { std::cout &lt;&lt; "Loading data"; }</text:p>
      <text:p text:style-name="блок_5f_кода">};</text:p>
      <text:p text:style-name="блок_5f_кода">class Computer {</text:p>
      <text:p text:style-name="блок_5f_кода">private:</text:p>
      <text:p text:style-name="блок_5f_кода"><text:s text:c="4"/>CPU * cpu;</text:p>
      <text:p text:style-name="блок_5f_кода"><text:s text:c="4"/>RAM * ram;</text:p>
      <text:p text:style-name="блок_5f_кода">public:</text:p>
      <text:p text:style-name="блок_5f_кода"><text:s text:c="4"/>Computer(CPU *c, RAM *r) : cpu(c), ram(r) {}</text:p>
      <text:p text:style-name="блок_5f_кода"><text:s text:c="4"/>void run() { cpu-&gt;process(); ram-&gt;load(); }</text:p>
      <text:p text:style-name="блок_5f_кода">}</text:p>
      <text:p text:style-name="List_20_Heading">правильный ответ:</text:p>
      <text:p text:style-name="вариант_5f_ответа">Агрегация (получает зависимости извне)</text:p>
      <text:p text:style-name="List_20_Heading">ошибки:</text:p>
      <text:p text:style-name="вариант_5f_ошибка">Наследование от <text:span text:style-name="T6">CPU </text:span>и <text:span text:style-name="T6">RAM</text:span></text:p>
      <text:p text:style-name="вариант_5f_ошибка">Ассоциация без владения</text:p>
      <text:p text:style-name="вариант_5f_ошибка">Композиция (управляет временем жизни <text:span text:style-name="T6">CPU </text:span>и <text:span text:style-name="T6">RAM)</text:span></text:p>
      <text:p text:style-name="вариант_5f_ошибка">Простое наследование</text:p>
      <text:p text:style-name="P7"/>
      <text:h text:style-name="Heading_20_3" text:outline-level="3"><text:soft-page-break/>Программист, разрабатывая класс UserManager, добавил функции, которые работают на разном уровне абстракции. Какая функция лишняя в UserManager?</text:h>
      <text:p text:style-name="блок_5f_кода"><text:span text:style-name="T2">class</text:span> User {</text:p>
      <text:p text:style-name="блок_5f_кода"><text:span text:style-name="T2">public</text:span>:</text:p>
      <text:p text:style-name="блок_5f_кода"><text:s text:c="4"/>string name;</text:p>
      <text:p text:style-name="блок_5f_кода"><text:s text:c="4"/>string email; <text:s text:c="3"/></text:p>
      <text:p text:style-name="блок_5f_кода">};</text:p>
      <text:p text:style-name="блок_5f_кода"><text:span text:style-name="T2">class</text:span> UserManager {</text:p>
      <text:p text:style-name="блок_5f_кода"><text:span text:style-name="T2">public</text:span>:</text:p>
      <text:p text:style-name="блок_5f_кода"><text:s text:c="4"/><text:span text:style-name="T2">void</text:span> addUser(User user) { /* добавление */ }</text:p>
      <text:p text:style-name="блок_5f_кода"><text:s text:c="4"/><text:span text:style-name="T2">void</text:span> deleteUser(int id) { /* удаление */ }</text:p>
      <text:p text:style-name="блок_5f_кода"><text:s text:c="4"/><text:span text:style-name="T2">void</text:span> sendEmail(User user) { /* рассылка */ } <text:s text:c="3"/></text:p>
      <text:p text:style-name="блок_5f_кода">};</text:p>
      <text:p text:style-name="List_20_Heading">правильный ответ:</text:p>
      <text:p text:style-name="вариант_5f_ответа">Рассылка сообщений</text:p>
      <text:p text:style-name="List_20_Heading">ошибки:</text:p>
      <text:p text:style-name="вариант_5f_ошибка">Добавление пользователей</text:p>
      <text:p text:style-name="вариант_5f_ошибка">Удаление пользователей</text:p>
      <text:p text:style-name="вариант_5f_ошибка">Обработка данных пользователя</text:p>
      <text:p text:style-name="вариант_5f_ошибка">Хранение данных пользователях</text:p>
      <text:p text:style-name="P8"/>
      <text:h text:style-name="Heading_20_3" text:outline-level="3">Выберите правильный вариант для указателя prev который разрывает циклические зависимости и предотвращает утечки памяти:</text:h>
      <text:p text:style-name="блок_5f_кода"><text:span text:style-name="T2">class</text:span> Node {</text:p>
      <text:p text:style-name="блок_5f_кода"><text:s text:c="4"/>std::shared_ptr&lt;Node&gt; next;</text:p>
      <text:p text:style-name="блок_5f_кода"><text:s text:c="4"/>___ prev; </text:p>
      <text:p text:style-name="блок_5f_кода">};</text:p>
      <text:p text:style-name="List_20_Heading">правильный ответ:</text:p>
      <text:p text:style-name="вариант_5f_ответа">std::weak_ptr&lt;Node&gt;</text:p>
      <text:p text:style-name="List_20_Heading">ошибки:</text:p>
      <text:p text:style-name="вариант_5f_ошибка">std::static_ptr&lt;Node&gt;</text:p>
      <text:p text:style-name="вариант_5f_ошибка">std::shared_ptr&lt;Node&gt;</text:p>
      <text:p text:style-name="вариант_5f_ошибка">Node*</text:p>
      <text:p text:style-name="P2">std::unique_ptr&lt;Node&gt;</text:p>
      <text:p text:style-name="P7"/>
      <text:h text:style-name="Heading_20_3" text:outline-level="3"><text:soft-page-break/>Проанализируйте код ниже и выберите утверждение, верное относительно необходимости использования указателя s3.</text:h>
      <text:p text:style-name="блок_5f_кода">#<text:span text:style-name="T2">include</text:span> &lt;memory&gt;</text:p>
      <text:p text:style-name="блок_5f_кода"><text:span text:style-name="T2">struct</text:span> Node {</text:p>
      <text:p text:style-name="блок_5f_кода"><text:s text:c="2"/>std::shared_ptr&lt;Node&gt; next;</text:p>
      <text:p text:style-name="блок_5f_кода"><text:s text:c="2"/><text:span text:style-name="T2">int</text:span> value;</text:p>
      <text:p text:style-name="блок_5f_кода"/>
      <text:p text:style-name="блок_5f_кода"><text:s text:c="2"/>Node(int v) : value(v) {} <text:s/></text:p>
      <text:p text:style-name="блок_5f_кода">};</text:p>
      <text:p text:style-name="блок_5f_кода"><text:span text:style-name="T2">void</text:span> test() {</text:p>
      <text:p text:style-name="блок_5f_кода"><text:s text:c="4"/><text:span text:style-name="T2">auto</text:span> s1 = std::make_shared&lt;Node&gt;(10);</text:p>
      <text:p text:style-name="блок_5f_кода"><text:s text:c="4"/><text:span text:style-name="T2">auto</text:span> s2 = std::make_shared&lt;Node&gt;(20);</text:p>
      <text:p text:style-name="блок_5f_кода"/>
      <text:p text:style-name="блок_5f_кода"><text:s text:c="4"/>s1-&gt;next = s2;</text:p>
      <text:p text:style-name="блок_5f_кода"><text:s text:c="4"/>s2-&gt;next = s1;</text:p>
      <text:p text:style-name="блок_5f_кода"/>
      <text:p text:style-name="блок_5f_кода"><text:s text:c="4"/>std::weak_ptr&lt;Node&gt; s3 = s1-&gt;next;</text:p>
      <text:p text:style-name="блок_5f_кода">}</text:p>
      <text:p text:style-name="P3"/>
      <text:p text:style-name="P3">ГуглИИ написал, что "В данном конкретном коде указатель s3 практически бесполезен и не решает проблему утечки памяти.". Поэтому выбрал ответ:</text:p>
      <text:p text:style-name="P9">пробовал так отвечать, но не засчитали:</text:p>
      <text:p text:style-name="вариант_5f_ошибка">s3 позволяет изменять значение Node</text:p>
      <text:p text:style-name="P10">Варианты<text:span text:style-name="T11"> еще не попробованные</text:span>:</text:p>
      <text:p text:style-name="P5">s3 <text:span text:style-name="T10">позволяет ускорить работу цикла</text:span></text:p>
      <text:p text:style-name="P5">s3 <text:span text:style-name="T10">позволяет увеличить производительность</text:span></text:p>
      <text:p text:style-name="P5">s3 <text:span text:style-name="T10">позволяет избежать утечки памяти из-за циклических ссылок</text:span></text:p>
      <text:p text:style-name="P10">s3 позволяет выполнить автоматический разрыв цикла</text:p>
      <text:p text:style-name="P4"/>
      <text:h text:style-name="Heading_20_3" text:outline-level="3">Какое выражение нужно вставить на место пропуска в коде ниже, чтобы указать конкретное исключение для функции validate?</text:h>
      <text:p text:style-name="блок_5f_кода">#<text:span text:style-name="T2">include</text:span> &lt;exception&gt;</text:p>
      <text:p text:style-name="блок_5f_кода"><text:span text:style-name="T2">void</text:span> validate(<text:span text:style-name="T2">int</text:span> x) noexcept(false) {</text:p>
      <text:p text:style-name="блок_5f_кода"><text:s text:c="4"/><text:span text:style-name="T2">if</text:span> (x &lt; 0) {</text:p>
      <text:p text:style-name="блок_5f_кода"><text:s text:c="8"/>// Пропущенная строка</text:p>
      <text:p text:style-name="блок_5f_кода"><text:s text:c="4"/>}</text:p>
      <text:p text:style-name="блок_5f_кода">}</text:p>
      <text:p text:style-name="блок_5f_кода"><text:span text:style-name="T2">void</text:span> test() {</text:p>
      <text:p text:style-name="блок_5f_кода"><text:s text:c="4"/><text:span text:style-name="T2">try</text:span> {</text:p>
      <text:p text:style-name="блок_5f_кода"><text:s text:c="8"/>validate(-1);</text:p>
      <text:p text:style-name="блок_5f_кода"><text:s text:c="4"/>}</text:p>
      <text:p text:style-name="блок_5f_кода"><text:s text:c="4"/><text:span text:style-name="T2">catch</text:span>(...) {}</text:p>
      <text:p text:style-name="блок_5f_кода">}</text:p>
      <text:p text:style-name="P4"/>
      <text:p text:style-name="List_20_Heading">правильный ответ:</text:p>
      <text:p text:style-name="вариант_5f_ответа">throw std::exception()</text:p>
      <text:p text:style-name="List_20_Heading">ошибки:</text:p>
      <text:p text:style-name="вариант_5f_ошибка">throw std::bad_exception()</text:p>
      <text:p text:style-name="вариант_5f_ошибка">return std::exception</text:p>
      <text:p text:style-name="вариант_5f_ошибка"><text:soft-page-break/>throw std::noexcept()</text:p>
      <text:p text:style-name="вариант_5f_ошибка">return std::noexception</text:p>
      <text:p text:style-name="P4"/>
      <text:h text:style-name="Heading_20_3" text:outline-level="3">Что выведет программа ниже?</text:h>
      <text:p text:style-name="блок_5f_кода">#<text:span text:style-name="T2">include</text:span> &lt;iostream&gt;</text:p>
      <text:p text:style-name="блок_5f_кода"><text:span text:style-name="T2">int</text:span> main() {</text:p>
      <text:p text:style-name="блок_5f_кода"><text:s text:c="4"/><text:span text:style-name="T2">int</text:span> x = 10;</text:p>
      <text:p text:style-name="блок_5f_кода"><text:s text:c="4"/><text:span text:style-name="T2">auto</text:span> lambda = [&amp;x]() {</text:p>
      <text:p text:style-name="блок_5f_кода"><text:s text:c="8"/>x += 5;</text:p>
      <text:p text:style-name="блок_5f_кода"><text:s text:c="8"/><text:span text:style-name="T2">return</text:span> x;</text:p>
      <text:p text:style-name="блок_5f_кода"><text:s text:c="4"/>};</text:p>
      <text:p text:style-name="блок_5f_кода"><text:s text:c="4"/>lambda();</text:p>
      <text:p text:style-name="блок_5f_кода"><text:s text:c="4"/>std::cout &lt;&lt; x;</text:p>
      <text:p text:style-name="блок_5f_кода">}</text:p>
      <text:p text:style-name="List_20_Heading">правильный ответ:</text:p>
      <text:p text:style-name="вариант_5f_ответа">15</text:p>
      <text:p text:style-name="P9">ошибки:</text:p>
      <text:p text:style-name="вариант_5f_ошибка">5</text:p>
      <text:p text:style-name="вариант_5f_ошибка">50</text:p>
      <text:p text:style-name="вариант_5f_ошибка">10</text:p>
      <text:p text:style-name="вариант_5f_ошибка">Ошибка компиляции</text:p>
      <text:p text:style-name="P9"/>
      <text:h text:style-name="Heading_20_3" text:outline-level="3">Проанализируйте код ниже. Каков будет результат выполнения кода?</text:h>
      <text:p text:style-name="блок_5f_кода"><text:span text:style-name="T2">template</text:span>&lt;<text:span text:style-name="T2">typename</text:span> T&gt;</text:p>
      <text:p text:style-name="блок_5f_кода"><text:span text:style-name="T2">void</text:span> f(T x) {</text:p>
      <text:p text:style-name="блок_5f_кода"><text:s text:c="4"/>cout &lt;&lt; "Generic";</text:p>
      <text:p text:style-name="блок_5f_кода">}</text:p>
      <text:p text:style-name="блок_5f_кода"><text:span text:style-name="T2">template</text:span>&lt;&gt;</text:p>
      <text:p text:style-name="блок_5f_кода"><text:span text:style-name="T2">void</text:span> f(<text:span text:style-name="T2">int</text:span> x) {</text:p>
      <text:p text:style-name="блок_5f_кода"><text:s text:c="4"/>cout &lt;&lt; "Specialized";</text:p>
      <text:p text:style-name="блок_5f_кода">}</text:p>
      <text:p text:style-name="блок_5f_кода"><text:span text:style-name="T2">int</text:span> main() {</text:p>
      <text:p text:style-name="блок_5f_кода"><text:s text:c="4"/>f(5.0);</text:p>
      <text:p text:style-name="блок_5f_кода"><text:s text:c="4"/>f(5);</text:p>
      <text:p text:style-name="блок_5f_кода">}</text:p>
      <text:p text:style-name="List_20_Heading">правильный ответ:</text:p>
      <text:p text:style-name="вариант_5f_ответа"><text:span text:style-name="T12">Выведет "</text:span>GenericSpecialized<text:span text:style-name="T12">"</text:span></text:p>
      <text:p text:style-name="List_20_Heading">ошибки:</text:p>
      <text:p text:style-name="вариант_5f_ошибка">Выведет "<text:span text:style-name="T6">Generic</text:span>"</text:p>
      <text:p text:style-name="вариант_5f_ошибка">Ошибка компиляции: конфликт шаблонов</text:p>
      <text:p text:style-name="вариант_5f_ошибка"><text:soft-page-break/><text:span text:style-name="T12">Выведет "</text:span>Generic<text:span text:style-name="T7">Generic</text:span><text:span text:style-name="T12">"</text:span></text:p>
      <text:p text:style-name="вариант_5f_ошибка"><text:span text:style-name="T7">Выведет "</text:span><text:span text:style-name="T6">SpecializedGeneric</text:span><text:span text:style-name="T7">"</text:span></text:p>
      <text:p text:style-name="P16"/>
      <text:h text:style-name="Heading_20_3" text:outline-level="3">Какой из вариантов позволит сохранить категорию значения (lvalue/rvalue) для аргумента функции T&amp;&amp; arg?</text:h>
      <text:p text:style-name="List_20_Heading">правильный ответ:</text:p>
      <text:p text:style-name="вариант_5f_ответа"><text:span text:style-name="T7">target(</text:span><text:span text:style-name="T6">std::forward&lt;T&gt;(arg)</text:span><text:span text:style-name="T7">)</text:span></text:p>
      <text:p text:style-name="List_20_Heading">ошибки:</text:p>
      <text:p text:style-name="вариант_5f_ошибка"><text:span text:style-name="T7">target(</text:span><text:span text:style-name="T6">std::</text:span><text:span text:style-name="T7">static</text:span><text:span text:style-name="T6">&lt;T&gt;(arg)</text:span><text:span text:style-name="T7">)</text:span></text:p>
      <text:p text:style-name="вариант_5f_ошибка"><text:span text:style-name="T7">target(</text:span><text:span text:style-name="T6">std::</text:span><text:span text:style-name="T7">unique_ptr</text:span><text:span text:style-name="T6">&lt;T&gt;(arg)</text:span><text:span text:style-name="T7">)</text:span></text:p>
      <text:p text:style-name="вариант_5f_ошибка"><text:span text:style-name="T7">target(</text:span><text:span text:style-name="T6">std::</text:span><text:span text:style-name="T7">weak_ptr</text:span><text:span text:style-name="T6">&lt;T&gt;(arg)</text:span><text:span text:style-name="T7">)</text:span></text:p>
      <text:p text:style-name="вариант_5f_ошибка"><text:span text:style-name="T7">target(</text:span><text:span text:style-name="T6">std::for</text:span><text:span text:style-name="T7">warding</text:span><text:span text:style-name="T6">&lt;T&gt;(arg)</text:span><text:span text:style-name="T7">)</text:span></text:p>
      <text:p text:style-name="P16"/>
      <text:h text:style-name="Heading_20_3" text:outline-level="3">Какой итератор поддерживает арифметику указателей (+, -, +=, -=)?</text:h>
      <text:p text:style-name="List_20_Heading">правильный ответ:</text:p>
      <text:p text:style-name="вариант_5f_ответа">Итератор произвольного доступа (Random Access Iterator)</text:p>
      <text:p text:style-name="List_20_Heading">ошибки:</text:p>
      <text:p text:style-name="вариант_5f_ошибка">Прямой итератор (<text:span text:style-name="T6">Forward Iterator)</text:span></text:p>
      <text:p text:style-name="вариант_5f_ошибка">Входной итератор (<text:span text:style-name="T6">Input Iterator)</text:span></text:p>
      <text:p text:style-name="вариант_5f_ошибка">Двунаправленный итератор<text:span text:style-name="T6"> (Bidirectional Iterator)</text:span></text:p>
      <text:p text:style-name="вариант_5f_ошибка">Выходной итератор<text:span text:style-name="T6"> (Output Iterator)</text:span></text:p>
      <text:p text:style-name="P16"/>
      <text:h text:style-name="P12" text:outline-level="3">Какое выражение нужно вставить на место пропуска в коде ниже, чтобы в консоль вывелось 7?</text:h>
      <text:p text:style-name="блок_5f_кода"><text:span text:style-name="T2">int</text:span> main() </text:p>
      <text:p text:style-name="блок_5f_кода">{</text:p>
      <text:p text:style-name="блок_5f_кода"><text:s text:c="4"/><text:span text:style-name="T2">int</text:span> a = 104;</text:p>
      <text:p text:style-name="блок_5f_кода"><text:s text:c="4"/>a = ____;</text:p>
      <text:p text:style-name="блок_5f_кода"><text:s text:c="4"/>std::cout &lt;&lt; a; <text:s text:c="3"/></text:p>
      <text:p text:style-name="блок_5f_кода">}</text:p>
      <text:p text:style-name="P13">правильный ответ:</text:p>
      <text:p text:style-name="P17">a ^ (a | (a - 1))</text:p>
      <text:p text:style-name="P13">ошибки:</text:p>
      <text:p text:style-name="P18">a ^ (a ^ (a - 1)) <text:s text:c="7"/>= 103</text:p>
      <text:p text:style-name="P18"><text:soft-page-break/>a | (a | (a + 1)) <text:s text:c="7"/>= 105</text:p>
      <text:p text:style-name="P18">a ^ (a &amp; (a - 1)) <text:s text:c="7"/>= 8 </text:p>
      <text:p text:style-name="P18">a | (a ^ (a - 1)) <text:s text:c="7"/>= 111</text:p>
      <text:p text:style-name="P16"/>
      <text:h text:style-name="P12" text:outline-level="3">Какой тип связи используется между Teacher и Student?</text:h>
      <text:p text:style-name="блок_5f_кода"><text:span text:style-name="T2">class</text:span> Teacher;</text:p>
      <text:p text:style-name="блок_5f_кода"><text:span text:style-name="T2">class</text:span> Student {</text:p>
      <text:p text:style-name="блок_5f_кода"><text:span text:style-name="T2">public</text:span>:</text:p>
      <text:p text:style-name="блок_5f_кода"><text:s text:c="4"/><text:span text:style-name="T2">void</text:span> attendClass(Teacher* teacher) {</text:p>
      <text:p text:style-name="блок_5f_кода"><text:s text:c="8"/>std::cout &lt;&lt; "Attending class by teacher" &lt;&lt; teacher;</text:p>
      <text:p text:style-name="блок_5f_кода"><text:s text:c="4"/>}</text:p>
      <text:p text:style-name="блок_5f_кода">};</text:p>
      <text:p text:style-name="блок_5f_кода"><text:span text:style-name="T2">class</text:span> Teacher {</text:p>
      <text:p text:style-name="блок_5f_кода"><text:span text:style-name="T2">public</text:span>:</text:p>
      <text:p text:style-name="блок_5f_кода"><text:s text:c="4"/><text:span text:style-name="T2">void</text:span> teach(Student* student) {</text:p>
      <text:p text:style-name="блок_5f_кода"><text:s text:c="8"/>std::cout &lt;&lt; "Teaching student " &lt;&lt; student;</text:p>
      <text:p text:style-name="блок_5f_кода"><text:s text:c="4"/>}</text:p>
      <text:p text:style-name="блок_5f_кода">}</text:p>
      <text:p text:style-name="P13">правильный ответ:</text:p>
      <text:p text:style-name="P17">Ассоциация</text:p>
      <text:p text:style-name="P13">ошибки:</text:p>
      <text:p text:style-name="P18">Агрегация </text:p>
      <text:p text:style-name="P18">Наследование</text:p>
      <text:p text:style-name="P18">Композиция</text:p>
      <text:p text:style-name="P18">Инкапсуляция</text:p>
      <text:p text:style-name="P16"/>
      <text:h text:style-name="P12" text:outline-level="3">В данном рагменте кода нарушена логика иерархии наследования. Какой из приведенных вариантов модификации кода устраняет нарушение?</text:h>
      <text:p text:style-name="блок_5f_кода"><text:span text:style-name="T2">class</text:span> Rectangle {</text:p>
      <text:p text:style-name="блок_5f_кода"><text:span text:style-name="T2">protected</text:span>:</text:p>
      <text:p text:style-name="блок_5f_кода"><text:s text:c="4"/><text:span text:style-name="T2">int</text:span> width, height;</text:p>
      <text:p text:style-name="блок_5f_кода"><text:span text:style-name="T2">public</text:span>:</text:p>
      <text:p text:style-name="блок_5f_кода"><text:s text:c="4"/><text:span text:style-name="T2">virtual</text:span> <text:span text:style-name="T2">void</text:span> setWidth(<text:span text:style-name="T2">int</text:span> w) { width = w; }</text:p>
      <text:p text:style-name="блок_5f_кода"><text:s text:c="4"/><text:span text:style-name="T2">virtual</text:span> <text:span text:style-name="T2">void</text:span> setHeight(<text:span text:style-name="T2">int</text:span> h) { height = h; }</text:p>
      <text:p text:style-name="блок_5f_кода"><text:s text:c="4"/><text:span text:style-name="T2">int</text:span> area() <text:span text:style-name="T2">const</text:span> { <text:span text:style-name="T2">return</text:span> width * height; } </text:p>
      <text:p text:style-name="блок_5f_кода">};</text:p>
      <text:p text:style-name="блок_5f_кода"><text:span text:style-name="T2">class</text:span> Square: <text:span text:style-name="T2">public</text:span> Rectangle {</text:p>
      <text:p text:style-name="блок_5f_кода"><text:span text:style-name="T2">public</text:span>:</text:p>
      <text:p text:style-name="блок_5f_кода"><text:s text:c="4"/><text:span text:style-name="T2">void</text:span> setWidth(<text:span text:style-name="T2">int</text:span> w) <text:span text:style-name="T2">override</text:span> { width = height = w; }</text:p>
      <text:p text:style-name="блок_5f_кода"><text:s text:c="4"/><text:span text:style-name="T2">void</text:span> setHeight(<text:span text:style-name="T2">int</text:span> h) <text:span text:style-name="T2">override</text:span> { width = height = h; }</text:p>
      <text:p text:style-name="блок_5f_кода">};</text:p>
      <text:p text:style-name="блок_5f_кода"><text:span text:style-name="T2">class</text:span> AreaCalculator {</text:p>
      <text:p text:style-name="блок_5f_кода"><text:span text:style-name="T2">public</text:span>:</text:p>
      <text:p text:style-name="блок_5f_кода"><text:soft-page-break/><text:s text:c="4"/><text:span text:style-name="T2">static</text:span> <text:span text:style-name="T2">void</text:span> printArea(Rectangle &amp;r) {</text:p>
      <text:p text:style-name="блок_5f_кода"><text:s text:c="8"/>r.setWidth(5);</text:p>
      <text:p text:style-name="блок_5f_кода"><text:s text:c="8"/>r.setHeight(4);</text:p>
      <text:p text:style-name="блок_5f_кода"><text:s text:c="8"/>std::cout &lt;&lt; r.area();</text:p>
      <text:p text:style-name="блок_5f_кода"><text:s text:c="4"/>}</text:p>
      <text:p text:style-name="блок_5f_кода">};</text:p>
      <text:p text:style-name="P13">правильный ответ:</text:p>
      <text:p text:style-name="P17">Добавить абстрактный класс Shape с виртуальным методом area() как базовый для Rectangle и Square</text:p>
      <text:p text:style-name="P13">ошибки:</text:p>
      <text:p text:style-name="P18">Добавить абстрактный класс Shape с методом area() как базовый для Rectangle и Square</text:p>
      <text:p text:style-name="P18">Переопределить метод area в классе Square</text:p>
      <text:p text:style-name="P18">Поменять последовательность наследования: класс Square должен стать базовым для Rectangle</text:p>
      <text:p text:style-name="P18">Переопределить метод area в классе Rectangle</text:p>
      <text:p text:style-name="P16"/>
      <text:h text:style-name="P12" text:outline-level="3">Проанализируйте код ниже и выберите верное утверждение.</text:h>
      <text:p text:style-name="блок_5f_кода">#<text:span text:style-name="T2">include</text:span> &lt;memory&gt;</text:p>
      <text:p text:style-name="блок_5f_кода">#<text:span text:style-name="T2">include</text:span> &lt;vector&gt;</text:p>
      <text:p text:style-name="блок_5f_кода"><text:span text:style-name="T2">void</text:span> test() {</text:p>
      <text:p text:style-name="блок_5f_кода"><text:s text:c="4"/><text:span text:style-name="T2">auto</text:span> s1 = std::make_unique&lt;<text:span text:style-name="T2">int</text:span>&gt;(30);</text:p>
      <text:p text:style-name="блок_5f_кода"><text:s text:c="4"/>std::vector&lt;std::unique_ptr&lt;<text:span text:style-name="T2">int</text:span>&gt;&gt; v;</text:p>
      <text:p text:style-name="блок_5f_кода"/>
      <text:p text:style-name="блок_5f_кода"><text:s text:c="4"/>v.push_back(std::move(s1));</text:p>
      <text:p text:style-name="блок_5f_кода"><text:s text:c="4"/><text:span text:style-name="T4">auto</text:span><text:span text:style-name="T8">&amp; </text:span>s2 = v[0];</text:p>
      <text:p text:style-name="блок_5f_кода"><text:s text:c="4"/><text:span text:style-name="T2">auto</text:span> s3 = std::move(s2);</text:p>
      <text:p text:style-name="блок_5f_кода">}</text:p>
      <text:p text:style-name="P13">правильный ответ:</text:p>
      <text:p text:style-name="P17">s2 пуст, s3 владеет объектом</text:p>
      <text:p text:style-name="P13">ошибки:</text:p>
      <text:p text:style-name="P18">s2 и s3 совместно владеют объектом</text:p>
      <text:p text:style-name="P18">Оба указателя пусты</text:p>
      <text:p text:style-name="P18">s2 владеет объектом, s3 пуст</text:p>
      <text:p text:style-name="P18">s2 владеет объектом, s3 не валидный</text:p>
      <text:p text:style-name="P16"/>
      <text:h text:style-name="P12" text:outline-level="3">Какое выражение нужно вставить на место пропуска в коде ниже, чтобы перехватывать только полиморфные исключения рантайма при вызове makeSDKRequest(); ?</text:h>
      <text:p text:style-name="блок_5f_кода">#<text:span text:style-name="T2">include</text:span> &lt;iostream&gt;</text:p>
      <text:p text:style-name="блок_5f_кода"><text:span text:style-name="T2">int</text:span> main () {</text:p>
      <text:p text:style-name="блок_5f_кода"><text:soft-page-break/><text:s text:c="4"/><text:span text:style-name="T2">try</text:span> {</text:p>
      <text:p text:style-name="блок_5f_кода"><text:s text:c="8"/>makeSDKRequest();</text:p>
      <text:p text:style-name="блок_5f_кода"><text:s text:c="4"/>} <text:span text:style-name="T2">catch</text:span>(____) {</text:p>
      <text:p text:style-name="блок_5f_кода"><text:s text:c="4"/>}</text:p>
      <text:p text:style-name="блок_5f_кода"><text:s text:c="4"/><text:span text:style-name="T2">return</text:span> 0;</text:p>
      <text:p text:style-name="блок_5f_кода">}</text:p>
      <text:p text:style-name="P13">правильный ответ:</text:p>
      <text:p text:style-name="P17">std::runtime_error &amp;</text:p>
      <text:p text:style-name="P13">ошибки:</text:p>
      <text:p text:style-name="P18">std::runtime_error</text:p>
      <text:p text:style-name="P18">std::exception</text:p>
      <text:p text:style-name="P18">std::exception&amp;</text:p>
      <text:p text:style-name="P18">...</text:p>
      <text:p text:style-name="P16"/>
      <text:h text:style-name="P12" text:outline-level="3">Какой из вариантов вызовет перемещение (move semantics), а не копирование?</text:h>
      <text:p text:style-name="P13">правильный ответ:</text:p>
      <text:p text:style-name="P17">std::string s1 = std::move(s2)</text:p>
      <text:p text:style-name="P13">ошибки:</text:p>
      <text:p text:style-name="P18">std::string s1 = s2</text:p>
      <text:p text:style-name="P18">std::string s1 = &amp;s2</text:p>
      <text:p text:style-name="P18">std::string s1 = new String(s2)</text:p>
      <text:p text:style-name="P18">std::string s1 = const_cast&lt;const std::string&amp;&gt;(s2)</text:p>
      <text:p text:style-name="P16"/>
      <text:p text:style-name="P16"/>
      <text:p text:style-name="P16"/>
      <text:p text:style-name="P16"/>
      <text:p text:style-name="P16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20:43:18.138572600</meta:creation-date>
    <dc:date>2026-06-30T23:28:18.128000000</dc:date>
    <meta:editing-duration>PT22H8M44S</meta:editing-duration>
    <meta:editing-cycles>33</meta:editing-cycles>
    <meta:generator>LibreOffice/7.2.4.1$Windows_X86_64 LibreOffice_project/27d75539669ac387bb498e35313b970b7fe9c4f9</meta:generator>
    <meta:document-statistic meta:table-count="0" meta:image-count="0" meta:object-count="0" meta:page-count="10" meta:paragraph-count="316" meta:word-count="1114" meta:character-count="7980" meta:non-whitespace-character-count="6812"/>
  </office:meta>
</office:document-meta>
</file>