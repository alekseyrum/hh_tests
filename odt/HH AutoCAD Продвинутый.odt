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6E000002EB659F5988.png" manifest:media-type="image/png"/>
  <manifest:file-entry manifest:full-path="Pictures/100000010000039A0000013E32E1FF7D.png" manifest:media-type="image/png"/>
  <manifest:file-entry manifest:full-path="Pictures/10000001000003B7000002769F3E2949.png" manifest:media-type="image/png"/>
  <manifest:file-entry manifest:full-path="Pictures/10000001000003A600000224C78F1FBE.png" manifest:media-type="image/png"/>
  <manifest:file-entry manifest:full-path="Pictures/10000001000003A600000267B8429B5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loext:opacity="0%" officeooo:paragraph-rsid="0027c7d8"/>
    </style:style>
    <style:style style:name="P2" style:family="paragraph" style:parent-style-name="Heading_20_3">
      <style:text-properties officeooo:rsid="0027c7d8" officeooo:paragraph-rsid="0027c7d8"/>
    </style:style>
    <style:style style:name="P3" style:family="paragraph" style:parent-style-name="вариант_5f_ошибка">
      <style:text-properties officeooo:paragraph-rsid="0030ceef"/>
    </style:style>
    <style:style style:name="P4" style:family="paragraph" style:parent-style-name="Heading_20_3">
      <style:text-properties fo:language="ru" fo:country="RU"/>
    </style:style>
    <style:style style:name="P5" style:family="paragraph" style:parent-style-name="Standard">
      <style:text-properties fo:language="en" fo:country="US" officeooo:rsid="001defcb" officeooo:paragraph-rsid="001defcb"/>
    </style:style>
    <style:style style:name="P6" style:family="paragraph" style:parent-style-name="Standard">
      <style:text-properties fo:language="ru" fo:country="RU" officeooo:rsid="001defcb" officeooo:paragraph-rsid="001defcb"/>
    </style:style>
    <style:style style:name="P7" style:family="paragraph" style:parent-style-name="вариант_5f_ошибка">
      <style:text-properties fo:language="en" fo:country="US"/>
    </style:style>
    <style:style style:name="P8" style:family="paragraph" style:parent-style-name="Standard">
      <style:text-properties fo:language="ru" fo:country="RU" officeooo:rsid="0020651f" officeooo:paragraph-rsid="0020651f"/>
    </style:style>
    <style:style style:name="P9" style:family="paragraph" style:parent-style-name="Standard">
      <style:text-properties fo:language="ru" fo:country="RU" officeooo:rsid="00218f57" officeooo:paragraph-rsid="00218f57"/>
    </style:style>
    <style:style style:name="P10" style:family="paragraph" style:parent-style-name="вариант_5f_ошибка">
      <style:text-properties fo:language="en" fo:country="US" officeooo:rsid="00218f57"/>
    </style:style>
    <style:style style:name="P11" style:family="paragraph" style:parent-style-name="вариант_5f_ошибка">
      <style:text-properties fo:language="en" fo:country="US" officeooo:rsid="002557f0"/>
    </style:style>
    <style:style style:name="P12" style:family="paragraph" style:parent-style-name="List_20_Heading">
      <style:text-properties officeooo:paragraph-rsid="00314dc5"/>
    </style:style>
    <style:style style:name="P13" style:family="paragraph" style:parent-style-name="вариант_5f_ответа">
      <style:text-properties officeooo:paragraph-rsid="00314dc5"/>
    </style:style>
    <style:style style:name="P14" style:family="paragraph" style:parent-style-name="вариант_5f_ошибка">
      <style:text-properties officeooo:paragraph-rsid="00314dc5"/>
    </style:style>
    <style:style style:name="P15" style:family="paragraph" style:parent-style-name="Standard">
      <style:text-properties fo:language="en" fo:country="US" officeooo:rsid="0020651f" officeooo:paragraph-rsid="00229cde"/>
    </style:style>
    <style:style style:name="T1" style:family="text">
      <style:text-properties fo:language="en" fo:country="US" officeooo:rsid="0027c7d8"/>
    </style:style>
    <style:style style:name="T2" style:family="text">
      <style:text-properties fo:language="ru" fo:country="RU" officeooo:rsid="0027c7d8"/>
    </style:style>
    <style:style style:name="T3" style:family="text">
      <style:text-properties fo:language="en" fo:country="US" officeooo:rsid="0031f79b"/>
    </style:style>
    <style:style style:name="T4" style:family="text">
      <style:text-properties fo:language="ru" fo:country="RU" officeooo:rsid="0031f7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T1">AutoCAD</text:span><text:span text:style-name="T2"> </text:span><text:span text:style-name="T3">П</text:span><text:span text:style-name="T2">родви</text:span><text:span text:style-name="T4">нуты</text:span><text:span text:style-name="T4">й</text:span><text:span text:style-name="T2"> </text:span><text:span text:style-name="T2">уровень</text:span></text:h>
      <text:h text:style-name="P2" text:outline-level="3">Какая из перечисленных ниже задач НЕ может быть решена с помощью функции "Полярное отслеживание" без применения других функций привязок и ограничения курсора?</text:h>
      <text:p text:style-name="List_20_Heading">правильный ответ:</text:p>
      <text:p text:style-name="вариант_5f_ответа">Построение дуги, сопряженной с отрезком</text:p>
      <text:p text:style-name="List_20_Heading">ошибки:</text:p>
      <text:p text:style-name="P3">Поворот геометрической фигуры на 30 градусов</text:p>
      <text:p text:style-name="P3">Построение двух параллельных отрезков и двух отрезков, перпендикулярных им</text:p>
      <text:p text:style-name="P3">Написание однострочного текста под углом 5 градусов</text:p>
      <text:p text:style-name="P3">Вставка блока с поворотом на 60 градусов</text:p>
      <text:p text:style-name="Standard"/>
      <text:h text:style-name="Heading_20_3" text:outline-level="3">В программе AutoCAD возможно выполнить быстрое построение изометрического вида объекта при помощи режима "Изометрическое проектирование". Как при переходе в этот режим функционируют привязки к опорным точкам, ортогональное перемещение курсора и полярное отслеживание?</text:h>
      <text:p text:style-name="List_20_Heading">правильный ответ:</text:p>
      <text:p text:style-name="вариант_5f_ответа">Ортогональное перемещение курсора работает только в плоскости изометрии, а привязки к опорным точкам и полярное отслеживание работают только по трем плоскостям</text:p>
      <text:p text:style-name="List_20_Heading">ошибки:</text:p>
      <text:p text:style-name="вариант_5f_ошибка">Ортогональное перемещение курсора, полярное отслеживание и привязки к опорным точкам работают только по трем плоскостям</text:p>
      <text:p text:style-name="вариант_5f_ошибка">Ортогональное перемещение курсора работает только в плоскости изометрии, полярное отслеживание работает только по трем плоскостям, а для опорных точек становится активна функция 3D-привязки</text:p>
      <text:p text:style-name="вариант_5f_ошибка">Ортогональное перемещение курсора и полярное отслеживание работают только в плоскости изометрии, а привязки к опорным точкам работают только по трем плоскостям</text:p>
      <text:p text:style-name="вариант_5f_ошибка">Ортогональное перемещение курсора, полярное отслеживание и привязки к опорным точкам работают только в плоскости изометрии</text:p>
      <text:p text:style-name="Standard"/>
      <text:h text:style-name="Heading_20_3" text:outline-level="3" text:is-list-header="true"><text:soft-page-break/>Из объекта "Круг" был образован круговой массив. Затем через один из объектов массива был построен отрезок. При выборе функции "Обрезать" и нажатии на круг, через который проведен отрезок, программа выполняет редактирование элемента. Как обрезать один из объектов массива, не затрагивая остальные?</text:h>
      <text:p text:style-name="List_20_Heading"><draw:frame draw:style-name="fr1" draw:name="Изображение2" text:anchor-type="char" svg:width="17cm" svg:height="8.431cm" draw:z-index="0"><draw:image xlink:href="Pictures/10000001000003A600000224C78F1FBE.png" xlink:type="simple" xlink:show="embed" xlink:actuate="onLoad" draw:mime-type="image/png"/></draw:frame>правильный ответ:</text:p>
      <text:p text:style-name="вариант_5f_ответа">Выделить массив - Выбрать вкладку "Редактирование" - Выбрать команду "Расчленить"</text:p>
      <text:p text:style-name="List_20_Heading">ошибки:</text:p>
      <text:p text:style-name="вариант_5f_ошибка">Выделить массив - Нажать ПКМ - Выбрать строку "Массив" - Выбрать команду "Редактировать массив" - Выбрать элемент, который требуется отредактировать</text:p>
      <text:p text:style-name="вариант_5f_ошибка">Выделить массив - Нажать ПКМ - Выбрать строку "Массив" - Выбрать команду "Редактировать исходные по месту" - Выбрать элемент, который требуется отредактировать</text:p>
      <text:p text:style-name="вариант_5f_ошибка">Выделить массив - Нажать ПКМ - Выбрать вкладку "Группировка" - Выбрать команду "Разгруппировать"</text:p>
      <text:p text:style-name="вариант_5f_ошибка">Выделить массив - На вкладке "Массив" нажать "Сбросить массив" - Нажать "Закрыть массив"</text:p>
      <text:p text:style-name="Standard"/>
      <text:h text:style-name="P4" text:outline-level="3">Вы хотите заморозить слой на одном из видовых экранов. Какое ОДНО условие необходимо выполнить?</text:h>
      <text:p text:style-name="List_20_Heading">правильный ответ:</text:p>
      <text:p text:style-name="вариант_5f_ответа">Видовый экран должен быть активирован</text:p>
      <text:p text:style-name="List_20_Heading">ошибки:</text:p>
      <text:p text:style-name="вариант_5f_ошибка">Слой НЕ должен быть текущим</text:p>
      <text:p text:style-name="вариант_5f_ошибка"><text:soft-page-break/>Слой НЕ должен быть заблокирован</text:p>
      <text:p text:style-name="вариант_5f_ошибка">Видовой экран должен быть разблокирован</text:p>
      <text:p text:style-name="вариант_5f_ошибка">Слой должен быть включен</text:p>
      <text:p text:style-name="P5"/>
      <text:h text:style-name="Heading_20_3" text:outline-level="3">Что нужно изменить в указанном порядке действий, чтобы был создан видовой экран непрямоугольной формы?</text:h>
      <text:p text:style-name="Text_20_body">1. Создать видовой экран на листе</text:p>
      <text:p text:style-name="Text_20_body">2. Создать требуемый контур видового экрана</text:p>
      <text:p text:style-name="Text_20_body">3. Выделить видовой экран и нажать ПКМ</text:p>
      <text:p text:style-name="Text_20_body">4. Выбрать созданный контур</text:p>
      <text:p text:style-name="Text_20_body">5. В контекстном меню выбрать команду "Подрезать видовой экран"</text:p>
      <text:p text:style-name="List_20_Heading">правильный ответ:</text:p>
      <text:p text:style-name="вариант_5f_ответа">Поменять местами пункты 4 и 5</text:p>
      <text:p text:style-name="List_20_Heading">ошибки:</text:p>
      <text:p text:style-name="вариант_5f_ошибка">Поменять местами пункты 2 и 3</text:p>
      <text:p text:style-name="вариант_5f_ошибка">Заменить пункт 5 на: в контекстном меню выбрать команду "Преобразовать видовой экран по контуру"</text:p>
      <text:p text:style-name="вариант_5f_ошибка">Заменить пункт 5 на: в контекстном меню выбрать команду "Преобразовать в видовой экран"</text:p>
      <text:p text:style-name="вариант_5f_ошибка">Заменить пункт 3 и 4 на: выделить видовой экран и нажать ПКМ</text:p>
      <text:p text:style-name="P6"/>
      <text:h text:style-name="Heading_20_3" text:outline-level="3"><text:soft-page-break/>При выделении блока на чертеже на нем отображается только одна связанная точка - точка вставки. Что необходимо сделать для отображения всех точек, связанных с блоком, как показано на рисунке?</text:h>
      <text:p text:style-name="Text_20_body"><draw:frame draw:style-name="fr2" draw:name="Изображение3" text:anchor-type="char" svg:width="14.626cm" svg:height="8.8cm" draw:z-index="1"><draw:image xlink:href="Pictures/10000001000003B7000002769F3E2949.png" xlink:type="simple" xlink:show="embed" xlink:actuate="onLoad" draw:mime-type="image/png"/></draw:frame></text:p>
      <text:p text:style-name="List_20_Heading">правильный ответ:</text:p>
      <text:p text:style-name="вариант_5f_ответа">Изменить системную переменную GRIPBLOCK на 1</text:p>
      <text:p text:style-name="List_20_Heading">ошибки:</text:p>
      <text:p text:style-name="вариант_5f_ошибка">Открыть свойства блока и настроить отображение связанных точек</text:p>
      <text:p text:style-name="вариант_5f_ошибка">Выделить блок, нажать ПКМ и включить отображение связанных точек в контекстном меню</text:p>
      <text:p text:style-name="вариант_5f_ошибка">Изменить системную переменную GRIPBLOCK на 0</text:p>
      <text:p text:style-name="вариант_5f_ошибка">Изменить системную переменную БЛОКРЕАКТСВЯЗЬ на 1</text:p>
      <text:p text:style-name="P6"/>
      <text:h text:style-name="Heading_20_3" text:outline-level="3">Какое из данных утверждений неверно в отношении работы с именованной ПСК?</text:h>
      <text:p text:style-name="List_20_Heading">правильный ответ:</text:p>
      <text:p text:style-name="вариант_5f_ответа">Чтобы выбрать другую ПСК, необходимо перезайти в программу</text:p>
      <text:p text:style-name="List_20_Heading">ошибки:</text:p>
      <text:p text:style-name="P7">Сохранить ПСК возможно с привязкой к определенному геометрическому объекту </text:p>
      <text:p text:style-name="P7">Допустимо установить ПСК как систему координат по умолчанию</text:p>
      <text:p text:style-name="P7"><text:soft-page-break/>Сохраненная ПСК может быть добавлена на любой видовый экран</text:p>
      <text:p text:style-name="P7">При создании нового чертежа можно использовать сохраненную ПСК вместо мировой системы координат (МСК)</text:p>
      <text:p text:style-name="P8"/>
      <text:h text:style-name="Heading_20_3" text:outline-level="3">Применение каких функций позволит упростить заполнение основной надписи разрабатываемого чертежа, указанной на рисунке?</text:h>
      <text:p text:style-name="List_20_Heading"><draw:frame draw:style-name="fr1" draw:name="Изображение4" text:anchor-type="char" svg:width="17cm" svg:height="5.861cm" draw:z-index="2"><draw:image xlink:href="Pictures/100000010000039A0000013E32E1FF7D.png" xlink:type="simple" xlink:show="embed" xlink:actuate="onLoad" draw:mime-type="image/png"/></draw:frame>правильный ответ:</text:p>
      <text:p text:style-name="вариант_5f_ответа">Создание и настройка атрибутов и их включение в состав блока"</text:p>
      <text:p text:style-name="List_20_Heading">ошибки:</text:p>
      <text:p text:style-name="вариант_5f_ошибка">Создание и настройка таблицы и аннотативного текста и их включение в состав блока</text:p>
      <text:p text:style-name="вариант_5f_ошибка">Создание отдельного шаблона для штампа чертежа</text:p>
      <text:p text:style-name="вариант_5f_ошибка">Создание таблицы с настроенным автозаполнением формы и её включение в состав блока</text:p>
      <text:p text:style-name="вариант_5f_ошибка">Создание и настройка аннотативного текста и его включение в состав блока</text:p>
      <text:p text:style-name="P9"/>
      <text:h text:style-name="Heading_20_3" text:outline-level="3">При выполнении публикации чертежей в AutoCAD есть возможность сохранить список чертежей в файл DSD. При выполнении указанного ниже порядка действий сохранить список не удастся. Какое дополнительное действие нужно совершить, чтобы сохранение прошло успешно?</text:h>
      <text:p text:style-name="Text_20_body">Порядок действий:</text:p>
      <text:p text:style-name="Text_20_body">*Перейти на вкладку "Вывод", выбрать панель "Печать" и кнопку "Пакетная печать"</text:p>
      <text:p text:style-name="Text_20_body">*В диалоговом окне "Публикация" добавить листы, которые требуется экспортировать в список листов</text:p>
      <text:p text:style-name="Text_20_body">*В диалоговом окне "Публикация" нажать "Сохранить список листов"</text:p>
      <text:p text:style-name="Text_20_body"><text:soft-page-break/>*Ввести имя файла и выбрать папку для сохранения</text:p>
      <text:p text:style-name="List_20_Heading">правильный ответ:</text:p>
      <text:p text:style-name="вариант_5f_ответа">Требуется вначале сохранить все изменения в файлах чертежей</text:p>
      <text:p text:style-name="List_20_Heading">ошибки:</text:p>
      <text:p text:style-name="P10">В окне "Публикация" требуется выполнить настройку параметров публикации</text:p>
      <text:p text:style-name="P10">В конце требуется выбрать формат сохранения списка</text:p>
      <text:p text:style-name="P10">Вначале требуется установить одинаковые параметры листов на чертежах</text:p>
      <text:p text:style-name="P10">Требуется вначале выполнить публикацию чертежей в формате PDF</text:p>
      <text:p text:style-name="P8"/>
      <text:h text:style-name="Heading_20_3" text:outline-level="3">Какая из указанных проблем может быть решена применением функции "Допуск замкнутости"?</text:h>
      <text:p text:style-name="List_20_Heading">правильный ответ:</text:p>
      <text:p text:style-name="вариант_5f_ответа">Присутствие между геометрическими объектами зазоров, которые не могут быть обнаружены без значительного увеличения масштаба</text:p>
      <text:p text:style-name="List_20_Heading">ошибки:</text:p>
      <text:p text:style-name="P11">Невозможность создания штриховки контура</text:p>
      <text:p text:style-name="P11">Необходимость автоматического расчета допусков и размерных цепей</text:p>
      <text:p text:style-name="P11">Ошибочное неприсвоение размера какому-либо геометрическому элементу</text:p>
      <text:p text:style-name="P11">Необходимость проставления значительного количества допусков формы и расположения на чертеже</text:p>
      <text:h text:style-name="Heading_20_3" text:outline-level="3">Какие действия нужно выполнить, чтобы добавить в программу AutoCAD собственную палитру инструментов?</text:h>
      <text:p text:style-name="List_20_Heading">правильный ответ:</text:p>
      <text:p text:style-name="вариант_5f_ответа">Вид - Инструментальные палитры - Адаптация палитр - Импорт</text:p>
      <text:p text:style-name="List_20_Heading">ошибки:</text:p>
      <text:p text:style-name="вариант_5f_ошибка">Вид - Инструментальные палитры - Вставка палитр</text:p>
      <text:p text:style-name="вариант_5f_ошибка">Вид - Инструментальные палитры - Импорт</text:p>
      <text:p text:style-name="вариант_5f_ошибка">Вставка - Инструментальные палитры - Адаптация палитр - Импорт</text:p>
      <text:p text:style-name="вариант_5f_ошибка">Файл - Импорт - Дополнительно - Инструментальные палитры</text:p>
      <text:h text:style-name="Heading_20_3" text:outline-level="3"><text:soft-page-break/>Какая последовательность действий в версии AutoCAD со стандартными настройками приведет к построению фигуры, показанной на рисунке?</text:h>
      <text:p text:style-name="P12"><draw:frame draw:style-name="fr3" draw:name="Изображение1" text:anchor-type="char" svg:width="10.769cm" svg:height="7.093cm" draw:z-index="3"><draw:image xlink:href="Pictures/100000010000046E000002EB659F5988.png" xlink:type="simple" xlink:show="embed" xlink:actuate="onLoad" draw:mime-type="image/png"/></draw:frame></text:p>
      <text:p text:style-name="P12">правильный ответ:</text:p>
      <text:p text:style-name="P13">Вид - Просвечивание - Построение цилиндра - Построение сферы - Вычитание тел</text:p>
      <text:p text:style-name="P12">ошибки:</text:p>
      <text:p text:style-name="P14">Переключение рабочего пространства в режим "3D-моделирование" - Построение цилиндра - Построение сфры - Вычитание тел - Вид - Каркас</text:p>
      <text:p text:style-name="P14">Построение круга - Переключение рабочего пространствав режим "3D-моделирование" - Выдавливание круга - Построение сферы - Вычитание тел - Вид - Просвечивание</text:p>
      <text:p text:style-name="P14">Переключение рабочего пространства в режим "3D-моделирование" - Построение цилиндра - Построение дуги - Создание выреза - Вид - Просвечивание</text:p>
      <text:p text:style-name="P14">Переключение рабочего пространства в режим "3D-моделирование" - Построение цилиндра - Создание выреза по траектории - Вид - Просвечивание</text:p>
      <text:p text:style-name="P15"/>
      <text:h text:style-name="Heading_20_3" text:outline-level="3">Как можно настроить параметры сравнения файлов DWG</text:h>
      <text:p text:style-name="List_20_Heading">правильный ответ:</text:p>
      <text:p text:style-name="вариант_5f_ответа">В окне сравнения</text:p>
      <text:p text:style-name="List_20_Heading">ошибки:</text:p>
      <text:p text:style-name="вариант_5f_ошибка">В свойствах чертежа</text:p>
      <text:p text:style-name="вариант_5f_ошибка">Через меню Настройки</text:p>
      <text:p text:style-name="вариант_5f_ошибка"><text:soft-page-break/>В параметрах программы</text:p>
      <text:p text:style-name="вариант_5f_ошибка">Используя команду COMPARESETTINS</text:p>
      <text:p text:style-name="P15"/>
      <text:h text:style-name="Heading_20_3" text:outline-level="3">Какая команда позволяет открыть палитру блоков для добавления нового блока на чертеж?</text:h>
      <text:p text:style-name="List_20_Heading">правильный ответ:</text:p>
      <text:p text:style-name="вариант_5f_ответа">ВСТАВИТЬ (PASTE)</text:p>
      <text:p text:style-name="List_20_Heading">ошибки:</text:p>
      <text:p text:style-name="вариант_5f_ошибка">БЛОКОНСТР (BCYCLEORDER)<text:tab/>- действует только в редакторе блоков</text:p>
      <text:p text:style-name="вариант_5f_ошибка">ВСТБЛОК (PASTEBLOCK)<text:tab/>- действует только в редакторе блоков</text:p>
      <text:p text:style-name="вариант_5f_ошибка">БЛОКВСТ (BLOCKPASTE)<text:tab/>- нет такой команды</text:p>
      <text:p text:style-name="вариант_5f_ошибка">БЛОК (BLOCK)<text:tab/><text:tab/><text:tab/>- создает определение нового блока</text:p>
      <text:p text:style-name="P15"/>
      <text:h text:style-name="Heading_20_3" text:outline-level="3">Какую последовательность команд вы введете, чтобы из объектов на рисунке 1 создать объекты, изображенные на рисунке 2?</text:h>
      <text:p text:style-name="P15"><draw:frame draw:style-name="fr3" draw:name="Изображение5" text:anchor-type="char" svg:width="12.358cm" svg:height="7.345cm" draw:z-index="4"><draw:image xlink:href="Pictures/10000001000003A600000267B8429B53.png" xlink:type="simple" xlink:show="embed" xlink:actuate="onLoad" draw:mime-type="image/png"/></draw:frame></text:p>
      <text:p text:style-name="List_20_Heading">правильный ответ:</text:p>
      <text:p text:style-name="вариант_5f_ответа">КРУГ - ТЕКСТ - MIRRTEXT - ЗЕРКАЛО</text:p>
      <text:p text:style-name="List_20_Heading">ошибки:</text:p>
      <text:p text:style-name="вариант_5f_ошибка">КРУГ - ТЕКСТ - MIRRARRAY<text:tab/>- MIRRARRAY несуществующая команда</text:p>
      <text:p text:style-name="вариант_5f_ошибка">КРУГ - ТЕКСТ - MIRRALL<text:tab/><text:tab/>- MIRRALL неизвестная команда</text:p>
      <text:p text:style-name="вариант_5f_ошибка">КРУГ - ТЕКСТ - КОПИРОВАТЬ - PASTEMIRR</text:p>
      <text:p text:style-name="вариант_5f_ошибка"><text:soft-page-break/>КРУГ - ТЕКСТ - КРУГ - ОБРТЕКСТ<text:tab/>- ОБРТЕКСТ неизвестная команда</text:p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0:43:18.138572600</meta:creation-date>
    <dc:date>2026-06-14T15:00:38.273500700</dc:date>
    <meta:editing-duration>PT22H11M46S</meta:editing-duration>
    <meta:editing-cycles>40</meta:editing-cycles>
    <meta:generator>LibreOffice/25.8.4.2$Windows_X86_64 LibreOffice_project/290daaa01b999472f0c7a3890eb6a550fd74c6df</meta:generator>
    <meta:document-statistic meta:table-count="0" meta:image-count="5" meta:object-count="0" meta:page-count="9" meta:paragraph-count="131" meta:word-count="1121" meta:character-count="8203" meta:non-whitespace-character-count="7209"/>
  </office:meta>
</office:document-meta>
</file>