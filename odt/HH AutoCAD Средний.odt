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2700000260A08A6F1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 officeooo:paragraph-rsid="0027c7d8"/>
    </style:style>
    <style:style style:name="P2" style:family="paragraph" style:parent-style-name="Heading_20_3">
      <style:text-properties officeooo:rsid="0027c7d8" officeooo:paragraph-rsid="0027c7d8"/>
    </style:style>
    <style:style style:name="P3" style:family="paragraph" style:parent-style-name="вариант_5f_ошибка">
      <style:text-properties officeooo:paragraph-rsid="0030ceef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Standard">
      <style:text-properties fo:language="en" fo:country="US" officeooo:rsid="001defcb" officeooo:paragraph-rsid="001defcb"/>
    </style:style>
    <style:style style:name="P6" style:family="paragraph" style:parent-style-name="Standard">
      <style:text-properties fo:language="ru" fo:country="RU" officeooo:rsid="001defcb" officeooo:paragraph-rsid="001defcb"/>
    </style:style>
    <style:style style:name="P7" style:family="paragraph" style:parent-style-name="вариант_5f_ошибка">
      <style:text-properties fo:language="en" fo:country="US"/>
    </style:style>
    <style:style style:name="P8" style:family="paragraph" style:parent-style-name="Standard">
      <style:text-properties fo:language="ru" fo:country="RU" officeooo:rsid="0020651f" officeooo:paragraph-rsid="0020651f"/>
    </style:style>
    <style:style style:name="P9" style:family="paragraph" style:parent-style-name="Standard">
      <style:text-properties fo:language="ru" fo:country="RU" officeooo:rsid="00218f57" officeooo:paragraph-rsid="00218f57"/>
    </style:style>
    <style:style style:name="P10" style:family="paragraph" style:parent-style-name="вариант_5f_ошибка">
      <style:text-properties fo:language="en" fo:country="US" officeooo:rsid="00218f57"/>
    </style:style>
    <style:style style:name="P11" style:family="paragraph" style:parent-style-name="вариант_5f_ошибка">
      <style:text-properties fo:language="en" fo:country="US" officeooo:rsid="002557f0"/>
    </style:style>
    <style:style style:name="P12" style:family="paragraph" style:parent-style-name="List_20_Heading">
      <style:text-properties officeooo:paragraph-rsid="00314dc5"/>
    </style:style>
    <style:style style:name="P13" style:family="paragraph" style:parent-style-name="вариант_5f_ответа">
      <style:text-properties officeooo:paragraph-rsid="00314dc5"/>
    </style:style>
    <style:style style:name="P14" style:family="paragraph" style:parent-style-name="вариант_5f_ошибка">
      <style:text-properties officeooo:paragraph-rsid="00314dc5"/>
    </style:style>
    <style:style style:name="P15" style:family="paragraph" style:parent-style-name="Standard">
      <style:text-properties fo:language="en" fo:country="US" officeooo:rsid="0020651f" officeooo:paragraph-rsid="00229cde"/>
    </style:style>
    <style:style style:name="T1" style:family="text">
      <style:text-properties fo:language="en" fo:country="US" officeooo:rsid="0027c7d8"/>
    </style:style>
    <style:style style:name="T2" style:family="text">
      <style:text-properties fo:language="ru" fo:country="RU" officeooo:rsid="0027c7d8"/>
    </style:style>
    <style:style style:name="T3" style:family="text">
      <style:text-properties fo:language="en" fo:country="US" officeooo:rsid="002fb470"/>
    </style:style>
    <style:style style:name="T4" style:family="text">
      <style:text-properties fo:language="ru" fo:country="RU" officeooo:rsid="002fb4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AutoCAD</text:span><text:span text:style-name="T2"> </text:span><text:span text:style-name="T3">С</text:span><text:span text:style-name="T4">редний</text:span><text:span text:style-name="T2"> уровень</text:span></text:h>
      <text:h text:style-name="P2" text:outline-level="3">Какой режим объектной привязки ОТСУТСТВУЕТ в программе AutoCAD?</text:h>
      <text:p text:style-name="List_20_Heading">правильный ответ:</text:p>
      <text:p text:style-name="вариант_5f_ответа">Равноудаленная</text:p>
      <text:p text:style-name="List_20_Heading">ошибки:</text:p>
      <text:p text:style-name="P3">Геометрический центр</text:p>
      <text:p text:style-name="P3">Ближайшая</text:p>
      <text:p text:style-name="P3">Кажущееся пересечение</text:p>
      <text:p text:style-name="P3">Центр</text:p>
      <text:p text:style-name="Standard"/>
      <text:h text:style-name="Heading_20_3" text:outline-level="3">Для чего НЕЛЬЗЯ использовать функцию "Фильтр" в окне управления слоями?</text:h>
      <text:p text:style-name="List_20_Heading">правильный ответ:</text:p>
      <text:p text:style-name="вариант_5f_ответа">Для группировки объектов по функциям</text:p>
      <text:p text:style-name="List_20_Heading">ошибки:</text:p>
      <text:p text:style-name="вариант_5f_ошибка">Для изменения параметров графики</text:p>
      <text:p text:style-name="вариант_5f_ошибка">Для организации совместной работы со смежным специалистом</text:p>
      <text:p text:style-name="вариант_5f_ошибка">Для разделения проекта по стадиям</text:p>
      <text:p text:style-name="вариант_5f_ошибка">Для группировки слоев по разделу проекта</text:p>
      <text:p text:style-name="Standard"/>
      <text:h text:style-name="Heading_20_3" text:outline-level="3">Какое действие нельзя выполнить, если видовый экран заблокирован?</text:h>
      <text:p text:style-name="List_20_Heading">правильный ответ:</text:p>
      <text:p text:style-name="вариант_5f_ответа">Изменить масштаб модели внутри видового экрана</text:p>
      <text:p text:style-name="List_20_Heading">ошибки:</text:p>
      <text:p text:style-name="вариант_5f_ошибка">Активировать видовой экран</text:p>
      <text:p text:style-name="вариант_5f_ошибка">Изменить масштаб видового экрана на листе</text:p>
      <text:p text:style-name="вариант_5f_ошибка">Изменить область отображения на видовом экране</text:p>
      <text:p text:style-name="вариант_5f_ошибка">Изменить границы видового экрана</text:p>
      <text:p text:style-name="Standard"><text:soft-page-break/></text:p>
      <text:h text:style-name="P4" text:outline-level="3">К какому объекту геометрии НЕ может быть выполнена привязка в режиме "Середина"?</text:h>
      <text:p text:style-name="List_20_Heading">правильный ответ:</text:p>
      <text:p text:style-name="вариант_5f_ответа">Эллипс</text:p>
      <text:p text:style-name="List_20_Heading">ошибки:</text:p>
      <text:p text:style-name="вариант_5f_ошибка">Разность диаметров кольца</text:p>
      <text:p text:style-name="вариант_5f_ошибка">Отрезок </text:p>
      <text:p text:style-name="вариант_5f_ошибка">Дуга</text:p>
      <text:p text:style-name="вариант_5f_ошибка">Старт построения прямой</text:p>
      <text:p text:style-name="P5"/>
      <text:h text:style-name="Heading_20_3" text:outline-level="3">Где выполняется большая часть геометрических построений в AutoCAD?</text:h>
      <text:p text:style-name="List_20_Heading">правильный ответ:</text:p>
      <text:p text:style-name="вариант_5f_ответа">В пространстве модели</text:p>
      <text:p text:style-name="List_20_Heading">ошибки:</text:p>
      <text:p text:style-name="вариант_5f_ошибка">В пространстве листа</text:p>
      <text:p text:style-name="вариант_5f_ошибка">В пространстве слоев</text:p>
      <text:p text:style-name="вариант_5f_ошибка">В пространствах листа и видового экрана</text:p>
      <text:p text:style-name="вариант_5f_ошибка">В пространстве видового экрана</text:p>
      <text:p text:style-name="P6"/>
      <text:h text:style-name="Heading_20_3" text:outline-level="3">В меню "Свойства слоя" для слоя "Пунктирные линии" была выбрана команда "Установить". Что изменится?</text:h>
      <text:p text:style-name="List_20_Heading">правильный ответ:</text:p>
      <text:p text:style-name="вариант_5f_ответа">Новые объекты чертежа будут размещены на слое "Пунктирные линии"</text:p>
      <text:p text:style-name="List_20_Heading">ошибки:</text:p>
      <text:p text:style-name="вариант_5f_ошибка">Слой "Пунктирные линии" будет установлен как нулевой слой</text:p>
      <text:p text:style-name="вариант_5f_ошибка">Свойства слоя "Пунктирные линии" будут аналогичны текущему активному слою</text:p>
      <text:p text:style-name="вариант_5f_ошибка">Вновь создаваемые слои будут иметь свойства, аналогичные слою "Пунктирные линии"</text:p>
      <text:p text:style-name="вариант_5f_ошибка"><text:soft-page-break/>Параметры печати будут установлены в соответствии с параметрами слоя "Пунктирные линии"</text:p>
      <text:p text:style-name="P6"/>
      <text:h text:style-name="Heading_20_3" text:outline-level="3">Какой функции НЕТ у аннотативных размеров в AutoCAD?</text:h>
      <text:p text:style-name="List_20_Heading">правильный ответ:</text:p>
      <text:p text:style-name="вариант_5f_ответа">Автоматическое изменение геометрии объекта при изменении числового значения размера</text:p>
      <text:p text:style-name="List_20_Heading">ошибки:</text:p>
      <text:p text:style-name="P7">Автоматическое изменение размеров в соответствии с выбранным масштабом чертежа</text:p>
      <text:p text:style-name="P7">Автоматическое обновление размеров при изменении геометрии объектов на чертеже</text:p>
      <text:p text:style-name="P7">Автоматическое выравнивание размерных линий и текста в соответствии с геометрией объектов на чертеже</text:p>
      <text:p text:style-name="P7">Автоматическое изменение размера текста в соответствии с выбранным масштабом чертежа</text:p>
      <text:p text:style-name="P8"/>
      <text:h text:style-name="Heading_20_3" text:outline-level="3">Что нужно изменить в указанном ниже порядке действий, чтобы успешно создать блок в AutoCAD?</text:h>
      <text:p text:style-name="List_20_Heading">правильный ответ:</text:p>
      <text:p text:style-name="вариант_5f_ответа">Функция создания блока недоступна через ПКМ - это можно сделать через вкладку "Блок"</text:p>
      <text:p text:style-name="List_20_Heading">ошибки:</text:p>
      <text:p text:style-name="вариант_5f_ошибка">Прежде чем создать блок, объекты необходимо объединить в группу</text:p>
      <text:p text:style-name="вариант_5f_ошибка">Не получится создать блок на текущем чертеже - их нужно продублировать на новый чертеж</text:p>
      <text:p text:style-name="вариант_5f_ошибка">Прежде чем выделить объекты и создать из них блок, необходимо перенести на их один слой</text:p>
      <text:p text:style-name="вариант_5f_ошибка">Ввести имя блока недостаточно - также необходимо добавить описание блока</text:p>
      <text:p text:style-name="P9"/>
      <text:h text:style-name="Heading_20_3" text:outline-level="3">Какой параметр необходимо настроить, чтобы установить границы печати для конкретного листа в AutoCAD?</text:h>
      <text:p text:style-name="List_20_Heading">правильный ответ:</text:p>
      <text:p text:style-name="вариант_5f_ответа">Область печати</text:p>
      <text:p text:style-name="List_20_Heading">ошибки:</text:p>
      <text:p text:style-name="P10"><text:soft-page-break/>Формат</text:p>
      <text:p text:style-name="P10">Масштаб</text:p>
      <text:p text:style-name="P10">Ориентация</text:p>
      <text:p text:style-name="P10">Стили печати</text:p>
      <text:p text:style-name="P8"/>
      <text:h text:style-name="Heading_20_3" text:outline-level="3">Какие параметры следует применить в диспетчере печати, чтобы распечатать чертежи для плоттера в корректном масштабе (например, А1х3)?</text:h>
      <text:p text:style-name="List_20_Heading"><draw:frame draw:style-name="fr1" draw:name="Изображение1" text:anchor-type="char" svg:width="17cm" svg:height="9.723cm" draw:z-index="0"><draw:image xlink:href="Pictures/100000010000042700000260A08A6F12.png" xlink:type="simple" xlink:show="embed" xlink:actuate="onLoad" draw:mime-type="image/png"/></draw:frame>правильный ответ:</text:p>
      <text:p text:style-name="вариант_5f_ответа">Добавить нестандартный формат листа через "Свойства" принтера DWG to PDF</text:p>
      <text:p text:style-name="List_20_Heading">ошибки:</text:p>
      <text:p text:style-name="P11">Настроить печать из пространства модели инструментом "Рамка"</text:p>
      <text:p text:style-name="P11">Использовать формат листа "ISO раш." при печати</text:p>
      <text:p text:style-name="P11">Вывести чертеж на печать в большем формате и отредактировать границы в стороннем графическом редакторе</text:p>
      <text:p text:style-name="P11">Задать границы инструментом рамка и отметить "Вписать" в окне "Масштаб печати"</text:p>
      <text:h text:style-name="Heading_20_3" text:outline-level="3"><text:soft-page-break/>Какой способ позволяет быстро вставить блок на чертеж без необходимости каждый раз находить его в библиотеке?</text:h>
      <text:p text:style-name="List_20_Heading">правильный ответ:</text:p>
      <text:p text:style-name="вариант_5f_ответа">Добавление блока в панель инструментов</text:p>
      <text:p text:style-name="List_20_Heading">ошибки:</text:p>
      <text:p text:style-name="вариант_5f_ошибка">Создание шаблона чертежа</text:p>
      <text:p text:style-name="вариант_5f_ошибка">Вставка блока через команду "Вставить блок"</text:p>
      <text:p text:style-name="вариант_5f_ошибка">Создание динамического блока</text:p>
      <text:p text:style-name="вариант_5f_ошибка">Использование команды "Копировать"</text:p>
      <text:h text:style-name="Heading_20_3" text:outline-level="3">Вам нужно повторить последнее выполненное действие в AutoCAD. Что используете?</text:h>
      <text:p text:style-name="P12">правильный ответ:</text:p>
      <text:p text:style-name="P13">Space или Enter</text:p>
      <text:p text:style-name="P12">ошибки:</text:p>
      <text:p text:style-name="P14">Клавиши R или С</text:p>
      <text:p text:style-name="P14">Page Up или Page Down</text:p>
      <text:p text:style-name="P14">Tab</text:p>
      <text:p text:style-name="P14">Сочетание Ctrl + R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6-07T17:09:01.097271500</dc:date>
    <meta:editing-duration>PT21H56M34S</meta:editing-duration>
    <meta:editing-cycles>37</meta:editing-cycles>
    <meta:generator>LibreOffice/25.8.4.2$Windows_X86_64 LibreOffice_project/290daaa01b999472f0c7a3890eb6a550fd74c6df</meta:generator>
    <meta:document-statistic meta:table-count="0" meta:image-count="1" meta:object-count="0" meta:page-count="5" meta:paragraph-count="97" meta:word-count="515" meta:character-count="3797" meta:non-whitespace-character-count="3378"/>
  </office:meta>
</office:document-meta>
</file>