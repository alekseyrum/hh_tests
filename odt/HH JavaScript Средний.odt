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Standard">
      <style:text-properties fo:language="en" fo:country="US" officeooo:rsid="0007a5bb" officeooo:paragraph-rsid="0007a5bb"/>
    </style:style>
    <style:style style:name="P4" style:family="paragraph" style:parent-style-name="Standard">
      <style:text-properties fo:language="ru" fo:country="RU" officeooo:rsid="000addf8" officeooo:paragraph-rsid="000addf8"/>
    </style:style>
    <style:style style:name="P5" style:family="paragraph" style:parent-style-name="вариант_5f_ошибка">
      <style:text-properties fo:language="ru" fo:country="RU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en" fo:country="US" officeooo:rsid="000e2394" officeooo:paragraph-rsid="000e2394"/>
    </style:style>
    <style:style style:name="P8" style:family="paragraph" style:parent-style-name="вариант_5f_ошибка">
      <style:text-properties fo:language="en" fo:country="US" officeooo:paragraph-rsid="0026cd48"/>
    </style:style>
    <style:style style:name="P9" style:family="paragraph" style:parent-style-name="Standard">
      <style:text-properties fo:language="ru" fo:country="RU" officeooo:rsid="000f7017" officeooo:paragraph-rsid="000f7017"/>
    </style:style>
    <style:style style:name="P10" style:family="paragraph" style:parent-style-name="Standard">
      <style:text-properties fo:language="en" fo:country="US" officeooo:rsid="000feebf" officeooo:paragraph-rsid="000feebf"/>
    </style:style>
    <style:style style:name="P11" style:family="paragraph" style:parent-style-name="Heading_20_3" style:list-style-name="">
      <style:text-properties fo:language="ru" fo:country="RU" officeooo:rsid="0012948c" officeooo:paragraph-rsid="0012948c"/>
    </style:style>
    <style:style style:name="P12" style:family="paragraph" style:parent-style-name="Standard">
      <style:text-properties officeooo:rsid="0026cd48" officeooo:paragraph-rsid="0026cd48"/>
    </style:style>
    <style:style style:name="T1" style:family="text">
      <style:text-properties fo:language="en" fo:country="US" officeooo:rsid="0025ca4b"/>
    </style:style>
    <style:style style:name="T2" style:family="text">
      <style:text-properties officeooo:rsid="00267f93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JavaScript</text:span> <text:span text:style-name="T2">Средний</text:span> уровень</text:h>
      <text:h text:style-name="Heading_20_3" text:outline-level="3">Как ведет себя стрелочная функция, если её вызвать как метод объекта?</text:h>
      <text:p text:style-name="блок_5f_кода">let obj = {</text:p>
      <text:p text:style-name="блок_5f_кода"><text:tab/>value:42,</text:p>
      <text:p text:style-name="блок_5f_кода"><text:tab/>getValue: () =&gt; this.value</text:p>
      <text:p text:style-name="блок_5f_кода">}</text:p>
      <text:p text:style-name="блок_5f_кода">console.log(obj.getValue());</text:p>
      <text:p text:style-name="List_20_Heading">правильный ответ:</text:p>
      <text:p text:style-name="вариант_5f_ответа">Вернёт undefined</text:p>
      <text:p text:style-name="List_20_Heading">ошибки:</text:p>
      <text:p text:style-name="вариант_5f_ошибка">Вернёт this</text:p>
      <text:p text:style-name="вариант_5f_ошибка">Ошибка ReferenceError</text:p>
      <text:p text:style-name="вариант_5f_ошибка">Вернет объект obj</text:p>
      <text:p text:style-name="вариант_5f_ошибка">Вернет 42</text:p>
      <text:p text:style-name="Standard"/>
      <text:h text:style-name="P2" text:outline-level="3">Какой результат выполнения будет у следующего кода?</text:h>
      <text:p text:style-name="блок_5f_кода">const user = {info: {id: 123, status: 'active'}};</text:p>
      <text:p text:style-name="блок_5f_кода">const {info: {status}} = user;</text:p>
      <text:p text:style-name="блок_5f_кода">console.log(status);</text:p>
      <text:p text:style-name="List_20_Heading">правильный ответ:</text:p>
      <text:p text:style-name="вариант_5f_ответа">'active'</text:p>
      <text:p text:style-name="List_20_Heading">ошибки:</text:p>
      <text:p text:style-name="вариант_5f_ошибка">undefined</text:p>
      <text:p text:style-name="вариант_5f_ошибка">{status: 'active'}</text:p>
      <text:p text:style-name="вариант_5f_ошибка">SyntaxError</text:p>
      <text:p text:style-name="вариант_5f_ошибка">123</text:p>
      <text:p text:style-name="P3"/>
      <text:h text:style-name="Heading_20_3" text:outline-level="3">Какое из следующих выражений вернет true?</text:h>
      <text:p text:style-name="List_20_Heading">правильный ответ:</text:p>
      <text:p text:style-name="вариант_5f_ответа">null==undefined</text:p>
      <text:p text:style-name="List_20_Heading">ошибки:</text:p>
      <text:p text:style-name="вариант_5f_ошибка">Nan==Nan</text:p>
      <text:p text:style-name="вариант_5f_ошибка">'5' === 5</text:p>
      <text:p text:style-name="вариант_5f_ошибка"><text:soft-page-break/>typeof[]==='array'</text:p>
      <text:p text:style-name="вариант_5f_ошибка">0 === '0'</text:p>
      <text:p text:style-name="P4"/>
      <text:h text:style-name="Heading_20_3" text:outline-level="3">Какое поведение у Promise.all при наличии хотя бы одного отклоненного промиса?</text:h>
      <text:p text:style-name="List_20_Heading">правильный ответ:</text:p>
      <text:p text:style-name="вариант_5f_ответа">Сразу становится отклоненным</text:p>
      <text:p text:style-name="List_20_Heading">ошибки:</text:p>
      <text:p text:style-name="P5">Ждёт завершения всех промисов и возвращает массив статусов</text:p>
      <text:p text:style-name="P5">Рандомно завершает</text:p>
      <text:p text:style-name="P5">Ожидает только выполненных</text:p>
      <text:p text:style-name="P5">Игнорирует отклонённые</text:p>
      <text:p text:style-name="P4"/>
      <text:h text:style-name="Heading_20_3" text:outline-level="3">Вы должны запустить некий участок кода как минимум один раз и лишь затем проверить, можно ли продолжить повтор. Какую конструкцию предпочтительнее выбрать?</text:h>
      <text:p text:style-name="List_20_Heading">правильный ответ:</text:p>
      <text:p text:style-name="вариант_5f_ответа">do-while</text:p>
      <text:p text:style-name="List_20_Heading">ошибки:</text:p>
      <text:p text:style-name="вариант_5f_ошибка">if-else</text:p>
      <text:p text:style-name="вариант_5f_ошибка">for-in</text:p>
      <text:p text:style-name="вариант_5f_ошибка">for-of</text:p>
      <text:p text:style-name="вариант_5f_ошибка">switch-case</text:p>
      <text:p text:style-name="P4"/>
      <text:h text:style-name="Heading_20_3" text:outline-level="3">Каково основное правило, описывающее доступ к параметрам внутри функции в JavaScript?</text:h>
      <text:p text:style-name="List_20_Heading">правильный ответ:</text:p>
      <text:p text:style-name="вариант_5f_ответа">Они локальны внутри функции</text:p>
      <text:p text:style-name="List_20_Heading">ошибки:</text:p>
      <text:p text:style-name="P6">Они передаются в объекты при помощи this</text:p>
      <text:p text:style-name="P6">Они сохраняются в глобальном объекте</text:p>
      <text:p text:style-name="P6"><text:soft-page-break/>Они скрыты от замыканий</text:p>
      <text:p text:style-name="P6">Они доступны во всём приложении</text:p>
      <text:p text:style-name="Standard"/>
      <text:h text:style-name="Heading_20_3" text:outline-level="3">Для чего используется event.preventDefault() в обработчиках событий?</text:h>
      <text:p text:style-name="List_20_Heading">правильный ответ:</text:p>
      <text:p text:style-name="вариант_5f_ответа">Предотвращает стандартное действие браузера для события</text:p>
      <text:p text:style-name="List_20_Heading">ошибки:</text:p>
      <text:p text:style-name="вариант_5f_ошибка">Останавливает распространение событий вверх по DOM</text:p>
      <text:p text:style-name="вариант_5f_ошибка">Останавливает выполнение кода дальше по цепочке</text:p>
      <text:p text:style-name="вариант_5f_ошибка">Разрешает всплытие события</text:p>
      <text:p text:style-name="вариант_5f_ошибка">Удаляет элемент из DOM</text:p>
      <text:p text:style-name="P7"/>
      <text:h text:style-name="Heading_20_3" text:outline-level="3">Вам нужно реализовать систему локализации интерфейса. Для каждой строки интерфейса должно быть несколько переводов на разные языки. Необходимые функциональности:</text:h>
      <text:h text:style-name="Heading_20_3" text:outline-level="3">-Хранение переводов на русском, английском и других языках</text:h>
      <text:h text:style-name="Heading_20_3" text:outline-level="3">-Быстррое получение перевода по ключу и языку</text:h>
      <text:h text:style-name="Heading_20_3" text:outline-level="3">-Возможность обновлять и добавлять новые переводы</text:h>
      <text:h text:style-name="Heading_20_3" text:outline-level="3">Какой способ организации данных наиболее подходит для хранения текстов локализации?</text:h>
      <text:p text:style-name="List_20_Heading">правильный ответ:</text:p>
      <text:p text:style-name="вариант_5f_ответа"><text:span text:style-name="T3">Создать объект, где ключи - это языки, а значение - объект с ключами-строками и значениями-переводами</text:span></text:p>
      <text:p text:style-name="List_20_Heading">ошибки:</text:p>
      <text:p text:style-name="P6">Делать глобальную переменную для каждого языка и записывать переводы в виде: en_key:translation</text:p>
      <text:p text:style-name="P6">Использовать массив, где каждый элемент - это пара "ключ-стока,перевод"</text:p>
      <text:p text:style-name="P8">Сформировать общий массив всех переводов и искать в нем по индексу</text:p>
      <text:p text:style-name="P8">Хранить все в одной огромной JSON-строке и регулярно ее парсить</text:p>
      <text:p text:style-name="P9"><text:soft-page-break/></text:p>
      <text:h text:style-name="P2" text:outline-level="3">Что будет результатом кода и почему?</text:h>
      <text:p text:style-name="блок_5f_кода">function Shape() {}</text:p>
      <text:p text:style-name="блок_5f_кода">Shape.prototype.area = function() { return 42; };</text:p>
      <text:p text:style-name="блок_5f_кода">const s = new Shape();</text:p>
      <text:p text:style-name="блок_5f_кода">Shape.prototype = { area() { return 99; } };</text:p>
      <text:p text:style-name="блок_5f_кода">console.log( s.area() );</text:p>
      <text:p text:style-name="List_20_Heading">правильный ответ:</text:p>
      <text:p text:style-name="вариант_5f_ответа">42</text:p>
      <text:p text:style-name="List_20_Heading">ошибки:</text:p>
      <text:p text:style-name="вариант_5f_ошибка">null</text:p>
      <text:p text:style-name="вариант_5f_ошибка">99</text:p>
      <text:p text:style-name="вариант_5f_ошибка">undefined</text:p>
      <text:p text:style-name="вариант_5f_ошибка">ошибка выполнения</text:p>
      <text:p text:style-name="P10"/>
      <text:h text:style-name="Heading_20_3" text:outline-level="3">Как можно изменить прототип объекта в JavaScript?</text:h>
      <text:p text:style-name="List_20_Heading">правильный ответ:</text:p>
      <text:p text:style-name="вариант_5f_ответа">С помощью Object.setPrototypeOf(obj, prototype)</text:p>
      <text:p text:style-name="List_20_Heading">ошибки:</text:p>
      <text:p text:style-name="вариант_5f_ошибка">Прототип нельзя изменить после создания</text:p>
      <text:p text:style-name="вариант_5f_ошибка">Прототип заменяется автоматически при вызове конструктора</text:p>
      <text:p text:style-name="вариант_5f_ошибка">Только при помощи классов</text:p>
      <text:p text:style-name="вариант_5f_ошибка">Нужно вызвать prototype.override()</text:p>
      <text:p text:style-name="Standard"/>
      <text:h text:style-name="Heading_20_3" text:outline-level="3">Что произойдет при выполнении кода?</text:h>
      <text:p text:style-name="блок_5f_кода">function createCounter() {</text:p>
      <text:p text:style-name="блок_5f_кода"><text:tab/>let count = 0;</text:p>
      <text:p text:style-name="блок_5f_кода"><text:tab/>return {</text:p>
      <text:p text:style-name="блок_5f_кода"><text:tab/><text:tab/>increment() {</text:p>
      <text:p text:style-name="блок_5f_кода"><text:tab/><text:tab/><text:tab/>count++;</text:p>
      <text:p text:style-name="блок_5f_кода"><text:tab/><text:tab/><text:tab/>return count;</text:p>
      <text:p text:style-name="блок_5f_кода"><text:tab/><text:tab/>}</text:p>
      <text:p text:style-name="блок_5f_кода"><text:tab/>};</text:p>
      <text:p text:style-name="блок_5f_кода">}</text:p>
      <text:p text:style-name="блок_5f_кода">const counter = createCounter();</text:p>
      <text:p text:style-name="блок_5f_кода">console.log( counter.increment() );</text:p>
      <text:p text:style-name="List_20_Heading">правильный ответ:</text:p>
      <text:p text:style-name="вариант_5f_ответа">Метод increment использует замыкание для доступа к count и увеличивает его</text:p>
      <text:p text:style-name="List_20_Heading"><text:soft-page-break/>ошибки:</text:p>
      <text:p text:style-name="вариант_5f_ошибка">Функция createCounter ничего не возвращает</text:p>
      <text:p text:style-name="вариант_5f_ошибка">Создается глобальная переменная count и метод increment в counter, который увеличивает count</text:p>
      <text:p text:style-name="вариант_5f_ошибка">Каждый вызов increment возвращает 1, так как заново создается count и увеличивается на 1</text:p>
      <text:p text:style-name="вариант_5f_ошибка">count становится недоступным после первой итерации</text:p>
      <text:p text:style-name="Standard"/>
      <text:h text:style-name="P11" text:outline-level="3">Когда целесообразно применять async/await ?</text:h>
      <text:p text:style-name="List_20_Heading">правильный ответ:</text:p>
      <text:p text:style-name="вариант_5f_ответа">При последовательной обработке шагов, каждый из которых зависит от результата предыдущего</text:p>
      <text:p text:style-name="List_20_Heading">ошибки:</text:p>
      <text:p text:style-name="вариант_5f_ошибка">При объявлении функций, содержащих вложенные циклы без асинхронных вызовов</text:p>
      <text:p text:style-name="вариант_5f_ошибка">При создании логики, основанной на генераторах и итерируемых объектах </text:p>
      <text:p text:style-name="вариант_5f_ошибка">При реализации цепочки преобразований без промежуточных переменных</text:p>
      <text:p text:style-name="вариант_5f_ошибка">При описании функций, не содержащих операций с побочными эффектам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7T15:17:39.229374900</dc:date>
    <meta:editing-duration>PT18H54M16S</meta:editing-duration>
    <meta:editing-cycles>30</meta:editing-cycles>
    <meta:generator>LibreOffice/25.8.4.2$Windows_X86_64 LibreOffice_project/290daaa01b999472f0c7a3890eb6a550fd74c6df</meta:generator>
    <meta:document-statistic meta:table-count="0" meta:image-count="0" meta:object-count="0" meta:page-count="6" meta:paragraph-count="125" meta:word-count="540" meta:character-count="3992" meta:non-whitespace-character-count="3561"/>
  </office:meta>
</office:document-meta>
</file>