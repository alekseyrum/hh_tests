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5bb" officeooo:paragraph-rsid="0007a5bb"/>
    </style:style>
    <style:style style:name="P2" style:family="paragraph" style:parent-style-name="вариант_5f_ошибка">
      <style:text-properties fo:language="en" fo:country="US"/>
    </style:style>
    <style:style style:name="P3" style:family="paragraph" style:parent-style-name="Standard">
      <style:text-properties fo:language="en" fo:country="US" officeooo:rsid="000e2394" officeooo:paragraph-rsid="000e2394"/>
    </style:style>
    <style:style style:name="P4" style:family="paragraph" style:parent-style-name="вариант_5f_ошибка">
      <style:text-properties fo:language="en" fo:country="US" officeooo:paragraph-rsid="0026cd48"/>
    </style:style>
    <style:style style:name="P5" style:family="paragraph" style:parent-style-name="Standard">
      <style:text-properties fo:language="en" fo:country="US" officeooo:rsid="000feebf" officeooo:paragraph-rsid="000feebf"/>
    </style:style>
    <style:style style:name="P6" style:family="paragraph" style:parent-style-name="вариант_5f_ответа">
      <style:text-properties fo:language="en" fo:country="US"/>
    </style:style>
    <style:style style:name="P7" style:family="paragraph" style:parent-style-name="Standard">
      <style:text-properties fo:language="ru" fo:country="RU" officeooo:rsid="000addf8" officeooo:paragraph-rsid="000addf8"/>
    </style:style>
    <style:style style:name="P8" style:family="paragraph" style:parent-style-name="вариант_5f_ошибка">
      <style:text-properties fo:language="ru" fo:country="RU"/>
    </style:style>
    <style:style style:name="P9" style:family="paragraph" style:parent-style-name="Standard">
      <style:text-properties fo:language="ru" fo:country="RU" officeooo:rsid="000f7017" officeooo:paragraph-rsid="000f7017"/>
    </style:style>
    <style:style style:name="P10" style:family="paragraph" style:parent-style-name="Standard">
      <style:text-properties officeooo:rsid="0026cd48" officeooo:paragraph-rsid="0026cd48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Heading_20_3" style:list-style-name="">
      <style:text-properties fo:language="ru" fo:country="RU" officeooo:rsid="0012948c" officeooo:paragraph-rsid="0012948c"/>
    </style:style>
    <style:style style:name="P14" style:family="paragraph" style:parent-style-name="Heading_20_3" style:list-style-name="">
      <style:text-properties fo:language="ru" fo:country="RU" officeooo:rsid="0012948c" officeooo:paragraph-rsid="002c1f57"/>
    </style:style>
    <style:style style:name="P15" style:family="paragraph" style:parent-style-name="Heading_20_3" style:list-style-name="">
      <style:text-properties fo:language="ru" fo:country="RU" officeooo:rsid="0012948c" officeooo:paragraph-rsid="002e36c2"/>
    </style:style>
    <style:style style:name="P16" style:family="paragraph" style:parent-style-name="List_20_Heading">
      <style:text-properties officeooo:paragraph-rsid="002c1f57"/>
    </style:style>
    <style:style style:name="P17" style:family="paragraph" style:parent-style-name="List_20_Heading">
      <style:text-properties officeooo:paragraph-rsid="002e36c2"/>
    </style:style>
    <style:style style:name="P18" style:family="paragraph" style:parent-style-name="Standard">
      <style:text-properties officeooo:rsid="0026cd48" officeooo:paragraph-rsid="0026cd48"/>
    </style:style>
    <style:style style:name="P19" style:family="paragraph" style:parent-style-name="Standard">
      <style:text-properties officeooo:rsid="0026cd48" officeooo:paragraph-rsid="002c1f57"/>
    </style:style>
    <style:style style:name="P20" style:family="paragraph" style:parent-style-name="вариант_5f_ответа">
      <style:text-properties officeooo:paragraph-rsid="002c1f57"/>
    </style:style>
    <style:style style:name="P21" style:family="paragraph" style:parent-style-name="вариант_5f_ответа">
      <style:text-properties officeooo:paragraph-rsid="002e36c2"/>
    </style:style>
    <style:style style:name="P22" style:family="paragraph" style:parent-style-name="вариант_5f_ошибка">
      <style:text-properties officeooo:rsid="0026cd48" officeooo:paragraph-rsid="002c1f57"/>
    </style:style>
    <style:style style:name="P23" style:family="paragraph" style:parent-style-name="вариант_5f_ошибка">
      <style:text-properties officeooo:rsid="0026cd48" officeooo:paragraph-rsid="002e36c2"/>
    </style:style>
    <style:style style:name="T1" style:family="text">
      <style:text-properties fo:language="en" fo:country="US" officeooo:rsid="0025ca4b"/>
    </style:style>
    <style:style style:name="T2" style:family="text">
      <style:text-properties officeooo:rsid="00267f93"/>
    </style:style>
    <style:style style:name="T3" style:family="text">
      <style:text-properties fo:color="#c9211e" loext:opacity="100%"/>
    </style:style>
    <style:style style:name="T4" style:family="text">
      <style:text-properties officeooo:rsid="002c1f57"/>
    </style:style>
    <style:style style:name="T5" style:family="text">
      <style:text-properties officeooo:rsid="002e3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JavaScript</text:span> <text:span text:style-name="T2">Средний</text:span> уровень</text:h>
      <text:h text:style-name="Heading_20_3" text:outline-level="3">Как ведет себя стрелочная функция, если её вызвать как метод объекта?</text:h>
      <text:p text:style-name="блок_5f_кода"><text:span text:style-name="T3">let</text:span> obj = {</text:p>
      <text:p text:style-name="блок_5f_кода"><text:tab/>value:42,</text:p>
      <text:p text:style-name="блок_5f_кода"><text:tab/>getValue: () =&gt; <text:span text:style-name="T3">this</text:span>.value</text:p>
      <text:p text:style-name="блок_5f_кода">}</text:p>
      <text:p text:style-name="блок_5f_кода"><text:span text:style-name="T3">console</text:span>.log(obj.getValue());</text:p>
      <text:p text:style-name="List_20_Heading">правильный ответ:</text:p>
      <text:p text:style-name="вариант_5f_ответа">Вернёт undefined</text:p>
      <text:p text:style-name="List_20_Heading">ошибки:</text:p>
      <text:p text:style-name="вариант_5f_ошибка">Вернёт this</text:p>
      <text:p text:style-name="вариант_5f_ошибка">Ошибка ReferenceError</text:p>
      <text:p text:style-name="вариант_5f_ошибка">Вернет объект obj</text:p>
      <text:p text:style-name="вариант_5f_ошибка">Вернет 42</text:p>
      <text:p text:style-name="Standard"/>
      <text:h text:style-name="P12" text:outline-level="3">Какой результат выполнения будет у следующего кода?</text:h>
      <text:p text:style-name="блок_5f_кода"><text:span text:style-name="T3">const</text:span> user = {info: {id: 123, status: 'active'}};</text:p>
      <text:p text:style-name="блок_5f_кода"><text:span text:style-name="T3">const</text:span> {info: {status}} = user;</text:p>
      <text:p text:style-name="блок_5f_кода"><text:span text:style-name="T3">console</text:span>.log(status);</text:p>
      <text:p text:style-name="List_20_Heading">правильный ответ:</text:p>
      <text:p text:style-name="вариант_5f_ответа">'active'</text:p>
      <text:p text:style-name="List_20_Heading">ошибки:</text:p>
      <text:p text:style-name="вариант_5f_ошибка">undefined</text:p>
      <text:p text:style-name="вариант_5f_ошибка">{status: 'active'}</text:p>
      <text:p text:style-name="вариант_5f_ошибка">SyntaxError</text:p>
      <text:p text:style-name="вариант_5f_ошибка">123</text:p>
      <text:p text:style-name="P1"/>
      <text:h text:style-name="Heading_20_3" text:outline-level="3">Какое из следующих выражений вернет true?</text:h>
      <text:p text:style-name="List_20_Heading">правильный ответ:</text:p>
      <text:p text:style-name="вариант_5f_ответа">null==undefined</text:p>
      <text:p text:style-name="List_20_Heading">ошибки:</text:p>
      <text:p text:style-name="вариант_5f_ошибка">Nan==Nan</text:p>
      <text:p text:style-name="вариант_5f_ошибка">'5' === 5</text:p>
      <text:p text:style-name="вариант_5f_ошибка"><text:soft-page-break/>typeof[]==='array'</text:p>
      <text:p text:style-name="вариант_5f_ошибка">0 === '0'</text:p>
      <text:p text:style-name="P7"/>
      <text:h text:style-name="Heading_20_3" text:outline-level="3">Какое поведение у Promise.all при наличии хотя бы одного отклоненного промиса?</text:h>
      <text:p text:style-name="List_20_Heading">правильный ответ:</text:p>
      <text:p text:style-name="вариант_5f_ответа">Сразу становится отклоненным</text:p>
      <text:p text:style-name="List_20_Heading">ошибки:</text:p>
      <text:p text:style-name="P8">Ждёт завершения всех промисов и возвращает массив статусов</text:p>
      <text:p text:style-name="P8">Рандомно завершает</text:p>
      <text:p text:style-name="P8">Ожидает только выполненных</text:p>
      <text:p text:style-name="P8">Игнорирует отклонённые</text:p>
      <text:p text:style-name="P7"/>
      <text:h text:style-name="Heading_20_3" text:outline-level="3">Вы должны запустить некий участок кода как минимум один раз и лишь затем проверить, можно ли продолжить повтор. Какую конструкцию предпочтительнее выбрать?</text:h>
      <text:p text:style-name="List_20_Heading">правильный ответ:</text:p>
      <text:p text:style-name="вариант_5f_ответа">do-while</text:p>
      <text:p text:style-name="List_20_Heading">ошибки:</text:p>
      <text:p text:style-name="вариант_5f_ошибка">if-else</text:p>
      <text:p text:style-name="вариант_5f_ошибка">for-in</text:p>
      <text:p text:style-name="вариант_5f_ошибка">for-of</text:p>
      <text:p text:style-name="вариант_5f_ошибка">switch-case</text:p>
      <text:p text:style-name="P7"/>
      <text:h text:style-name="Heading_20_3" text:outline-level="3">Каково основное правило, описывающее доступ к параметрам внутри функции в JavaScript?</text:h>
      <text:p text:style-name="List_20_Heading">правильный ответ:</text:p>
      <text:p text:style-name="вариант_5f_ответа">Они локальны внутри функции</text:p>
      <text:p text:style-name="List_20_Heading">ошибки:</text:p>
      <text:p text:style-name="P2">Они передаются в объекты при помощи this</text:p>
      <text:p text:style-name="P2">Они сохраняются в глобальном объекте</text:p>
      <text:p text:style-name="P2"><text:soft-page-break/>Они скрыты от замыканий</text:p>
      <text:p text:style-name="P2">Они доступны во всём приложении</text:p>
      <text:p text:style-name="Standard"/>
      <text:h text:style-name="Heading_20_3" text:outline-level="3">Для чего используется event.preventDefault() в обработчиках событий?</text:h>
      <text:p text:style-name="List_20_Heading">правильный ответ:</text:p>
      <text:p text:style-name="вариант_5f_ответа">Предотвращает стандартное действие браузера для события</text:p>
      <text:p text:style-name="List_20_Heading">ошибки:</text:p>
      <text:p text:style-name="вариант_5f_ошибка">Останавливает распространение событий вверх по DOM</text:p>
      <text:p text:style-name="вариант_5f_ошибка">Останавливает выполнение кода дальше по цепочке</text:p>
      <text:p text:style-name="вариант_5f_ошибка">Разрешает всплытие события</text:p>
      <text:p text:style-name="вариант_5f_ошибка">Удаляет элемент из DOM</text:p>
      <text:p text:style-name="P3"/>
      <text:h text:style-name="Heading_20_3" text:outline-level="3">Вам нужно реализовать систему локализации интерфейса. Для каждой строки интерфейса должно быть несколько переводов на разные языки. Необходимые функциональности:</text:h>
      <text:h text:style-name="Heading_20_3" text:outline-level="3">-Хранение переводов на русском, английском и других языках</text:h>
      <text:h text:style-name="Heading_20_3" text:outline-level="3">-Быстррое получение перевода по ключу и языку</text:h>
      <text:h text:style-name="Heading_20_3" text:outline-level="3">-Возможность обновлять и добавлять новые переводы</text:h>
      <text:h text:style-name="Heading_20_3" text:outline-level="3">Какой способ организации данных наиболее подходит для хранения текстов локализации?</text:h>
      <text:p text:style-name="List_20_Heading">правильный ответ:</text:p>
      <text:p text:style-name="P6">Создать объект, где ключи - это языки, а значение - объект с ключами-строками и значениями-переводами</text:p>
      <text:p text:style-name="List_20_Heading">ошибки:</text:p>
      <text:p text:style-name="P2">Делать глобальную переменную для каждого языка и записывать переводы в виде: en_key:translation</text:p>
      <text:p text:style-name="P2">Использовать массив, где каждый элемент - это пара "ключ-стока,перевод"</text:p>
      <text:p text:style-name="P4">Сформировать общий массив всех переводов и искать в нем по индексу</text:p>
      <text:p text:style-name="P4">Хранить все в одной огромной JSON-строке и регулярно ее парсить</text:p>
      <text:p text:style-name="P9"><text:soft-page-break/></text:p>
      <text:h text:style-name="P12" text:outline-level="3">Что будет результатом кода и почему?</text:h>
      <text:p text:style-name="блок_5f_кода"><text:span text:style-name="T3">function</text:span> Shape() {}</text:p>
      <text:p text:style-name="блок_5f_кода">Shape.prototype.area = <text:span text:style-name="T3">function</text:span>() { <text:span text:style-name="T3">return</text:span> 42; };</text:p>
      <text:p text:style-name="блок_5f_кода"><text:span text:style-name="T3">const</text:span> s = <text:span text:style-name="T3">new</text:span> Shape();</text:p>
      <text:p text:style-name="блок_5f_кода">Shape.prototype = { area() { <text:span text:style-name="T3">return</text:span> 99; } };</text:p>
      <text:p text:style-name="блок_5f_кода"><text:span text:style-name="T3">console</text:span>.log( s.area() );</text:p>
      <text:p text:style-name="List_20_Heading">правильный ответ:</text:p>
      <text:p text:style-name="вариант_5f_ответа">42</text:p>
      <text:p text:style-name="List_20_Heading">ошибки:</text:p>
      <text:p text:style-name="вариант_5f_ошибка">null</text:p>
      <text:p text:style-name="вариант_5f_ошибка">99</text:p>
      <text:p text:style-name="вариант_5f_ошибка">undefined</text:p>
      <text:p text:style-name="вариант_5f_ошибка">ошибка выполнения</text:p>
      <text:p text:style-name="P5"/>
      <text:h text:style-name="Heading_20_3" text:outline-level="3">Как можно изменить прототип объекта в JavaScript?</text:h>
      <text:p text:style-name="List_20_Heading">правильный ответ:</text:p>
      <text:p text:style-name="вариант_5f_ответа">С помощью Object.setPrototypeOf(obj, prototype)</text:p>
      <text:p text:style-name="List_20_Heading">ошибки:</text:p>
      <text:p text:style-name="вариант_5f_ошибка">Прототип нельзя изменить после создания</text:p>
      <text:p text:style-name="вариант_5f_ошибка">Прототип заменяется автоматически при вызове конструктора</text:p>
      <text:p text:style-name="вариант_5f_ошибка">Только при помощи классов</text:p>
      <text:p text:style-name="вариант_5f_ошибка">Нужно вызвать prototype.override()</text:p>
      <text:p text:style-name="Standard"/>
      <text:h text:style-name="Heading_20_3" text:outline-level="3">Что произойдет при выполнении кода?</text:h>
      <text:p text:style-name="блок_5f_кода"><text:span text:style-name="T3">function</text:span> createCounter() {</text:p>
      <text:p text:style-name="блок_5f_кода"><text:tab/><text:span text:style-name="T3">let</text:span> count = 0;</text:p>
      <text:p text:style-name="блок_5f_кода"><text:tab/><text:span text:style-name="T3">return</text:span> {</text:p>
      <text:p text:style-name="блок_5f_кода"><text:tab/><text:tab/>increment() {</text:p>
      <text:p text:style-name="блок_5f_кода"><text:tab/><text:tab/><text:tab/>count++;</text:p>
      <text:p text:style-name="блок_5f_кода"><text:tab/><text:tab/><text:tab/><text:span text:style-name="T3">return</text:span> count;</text:p>
      <text:p text:style-name="блок_5f_кода"><text:tab/><text:tab/>}</text:p>
      <text:p text:style-name="блок_5f_кода"><text:tab/>};</text:p>
      <text:p text:style-name="блок_5f_кода">}</text:p>
      <text:p text:style-name="блок_5f_кода"><text:span text:style-name="T3">const</text:span> counter = createCounter();</text:p>
      <text:p text:style-name="блок_5f_кода"><text:span text:style-name="T3">console</text:span>.log( counter.increment() );</text:p>
      <text:p text:style-name="List_20_Heading">правильный ответ:</text:p>
      <text:p text:style-name="вариант_5f_ответа">Метод increment использует замыкание для доступа к count и увеличивает его</text:p>
      <text:p text:style-name="List_20_Heading"><text:soft-page-break/>ошибки:</text:p>
      <text:p text:style-name="вариант_5f_ошибка">Функция createCounter ничего не возвращает</text:p>
      <text:p text:style-name="вариант_5f_ошибка">Создается глобальная переменная count и метод increment в counter, который увеличивает count</text:p>
      <text:p text:style-name="вариант_5f_ошибка">Каждый вызов increment возвращает 1, так как заново создается count и увеличивается на 1</text:p>
      <text:p text:style-name="вариант_5f_ошибка">count становится недоступным после первой итерации</text:p>
      <text:p text:style-name="Standard"/>
      <text:h text:style-name="P13" text:outline-level="3">Когда целесообразно применять async/await ?</text:h>
      <text:p text:style-name="List_20_Heading">правильный ответ:</text:p>
      <text:p text:style-name="вариант_5f_ответа">При последовательной обработке шагов, каждый из которых зависит от результата предыдущего</text:p>
      <text:p text:style-name="List_20_Heading">ошибки:</text:p>
      <text:p text:style-name="вариант_5f_ошибка">При объявлении функций, содержащих вложенные циклы без асинхронных вызовов</text:p>
      <text:p text:style-name="вариант_5f_ошибка">При создании логики, основанной на генераторах и итерируемых объектах </text:p>
      <text:p text:style-name="вариант_5f_ошибка">При реализации цепочки преобразований без промежуточных переменных</text:p>
      <text:p text:style-name="вариант_5f_ошибка">При описании функций, не содержащих операций с побочными эффектами</text:p>
      <text:p text:style-name="P10"/>
      <text:h text:style-name="P14" text:outline-level="3">Почему нельзя использовать стрелочную функцию как конструктор (с оператором new)?</text:h>
      <text:p text:style-name="P16">правильный ответ:</text:p>
      <text:p text:style-name="P20">Она не имеет [[Construct]] и не создает собственный this.</text:p>
      <text:p text:style-name="P16">ошибки:</text:p>
      <text:p text:style-name="P22">Она всегда возвращает undefined</text:p>
      <text:p text:style-name="P22">Она не принимает аргументы </text:p>
      <text:p text:style-name="P22">Она наследует прототип родителя</text:p>
      <text:p text:style-name="P22">Она не поддерживает ключевое слово new</text:p>
      <text:p text:style-name="P10"/>
      <text:h text:style-name="P14" text:outline-level="3"><text:soft-page-break/>Какое утверждение НЕВЕРНО относительно хранения данных в браузере?</text:h>
      <text:p text:style-name="P16">правильный ответ:</text:p>
      <text:p text:style-name="P20">localStorage может содержать бинарные файлы напрямую</text:p>
      <text:p text:style-name="P16">ошибки:</text:p>
      <text:p text:style-name="P22">Данные в sessionStorage удаляются после закрытия вкладки</text:p>
      <text:p text:style-name="P22">Данные в cookies могут быть отправлены на сервер</text:p>
      <text:p text:style-name="P22">sessionStorage работает только в пределах одной вкладки</text:p>
      <text:p text:style-name="P22">localStorage доступен только в том же домене</text:p>
      <text:p text:style-name="P19"/>
      <text:h text:style-name="P14" text:outline-level="3">Какое из ниже приведенных выражений вернет false в результате вычисления?</text:h>
      <text:p text:style-name="P16">правильный ответ:</text:p>
      <text:p text:style-name="P20">(1===true)===true</text:p>
      <text:p text:style-name="P16">ошибки:</text:p>
      <text:p text:style-name="P22">3 &lt; 5 &amp;&amp; 5 &lt; 10 === true</text:p>
      <text:p text:style-name="P22">10 % 3 === 1</text:p>
      <text:p text:style-name="P22">2+2 * 2 === 6</text:p>
      <text:p text:style-name="P22">(3&lt;5 &amp;&amp; 5&lt;10) === true</text:p>
      <text:p text:style-name="P19"/>
      <text:h text:style-name="P14" text:outline-level="3">Пусть в программе нужно проверить,является ли некое число отрицательным, нулем или положительным, и в зависимости от этого выполнить различные действия. Какую конструкцию лучше всего применить?</text:h>
      <text:p text:style-name="P16">правильный ответ:</text:p>
      <text:p text:style-name="P20">if-else</text:p>
      <text:p text:style-name="P16">ошибки:</text:p>
      <text:p text:style-name="P22">do-while</text:p>
      <text:p text:style-name="P22">for-of</text:p>
      <text:p text:style-name="P22">for-in</text:p>
      <text:p text:style-name="P22">switch-case</text:p>
      <text:p text:style-name="P19"/>
      <text:h text:style-name="P14" text:outline-level="3"><text:soft-page-break/>При объявлении анонимной функции через let внутри блока код {}, что можно сказать про её доступность?</text:h>
      <text:p text:style-name="P16">правильный ответ:</text:p>
      <text:p text:style-name="P20">Используется только в рамках текущего блока</text:p>
      <text:p text:style-name="P16">ошибки:</text:p>
      <text:p text:style-name="P22">Автоматически становится глобально доступной</text:p>
      <text:p text:style-name="P22">Присваивается объекту this</text:p>
      <text:p text:style-name="P22">Она сохраняется во всех вложенных функциях</text:p>
      <text:p text:style-name="P22">Продолжает действовать даже после выхода из блока</text:p>
      <text:p text:style-name="P19"/>
      <text:h text:style-name="P15" text:outline-level="3">Имеется объект, который содержит сведения о пользователе. Нужно добавить новое свойство country: 'Canada' к этому объекту, не изменяя исходный. Как это сделать?</text:h>
      <text:p text:style-name="блок_5f_кода"><text:span text:style-name="T3">const</text:span> user = { name: 'Alice', age: 25};</text:p>
      <text:p text:style-name="блок_5f_кода"><text:span text:style-name="T3">function</text:span> extendUser(original) {</text:p>
      <text:p text:style-name="блок_5f_кода"><text:tab/><text:span text:style-name="T3">return</text:span> ____</text:p>
      <text:p text:style-name="блок_5f_кода">}</text:p>
      <text:p text:style-name="блок_5f_кода"><text:span text:style-name="T3">const</text:span> newUser = extendUser(user);</text:p>
      <text:p text:style-name="блок_5f_кода"><text:span text:style-name="T3">console</text:span>.log(newUser);</text:p>
      <text:p text:style-name="блок_5f_кода">// {... country: 'Canada'}</text:p>
      <text:p text:style-name="блок_5f_кода"><text:span text:style-name="T3">console</text:span>.log(user);</text:p>
      <text:p text:style-name="блок_5f_кода">// { ... }</text:p>
      <text:p text:style-name="P17">правильный ответ:</text:p>
      <text:p text:style-name="P21">{ ...original, country: 'Canada'}</text:p>
      <text:p text:style-name="P17">ошибки:</text:p>
      <text:p text:style-name="P23">new Map(Object.entries(original)).set('country', 'Canada')</text:p>
      <text:p text:style-name="P23">Object.assign(original, { country: 'Canada'})</text:p>
      <text:p text:style-name="P23">[original, {country: 'Canada'} ]</text:p>
      <text:p text:style-name="P23">return original.country = 'Canada'</text:p>
      <text:p text:style-name="P19"/>
      <text:h text:style-name="P15" text:outline-level="3">Какой будет результат выполнения кода?</text:h>
      <text:p text:style-name="блок_5f_кода"><text:span text:style-name="T3">function</text:span> Car() {}</text:p>
      <text:p text:style-name="блок_5f_кода">Car.<text:span text:style-name="T3">prototype</text:span>.features = [];</text:p>
      <text:p text:style-name="блок_5f_кода"><text:span text:style-name="T3">const</text:span> car1 = <text:span text:style-name="T3">new</text:span> Car();</text:p>
      <text:p text:style-name="блок_5f_кода"><text:span text:style-name="T3">const</text:span> car2 = <text:span text:style-name="T3">new</text:span> Car();</text:p>
      <text:p text:style-name="блок_5f_кода">car1.features.push('airbag');</text:p>
      <text:p text:style-name="блок_5f_кода"><text:span text:style-name="T3">console</text:span>.log(car2.features);</text:p>
      <text:p text:style-name="P17">правильный ответ:</text:p>
      <text:p text:style-name="P21"><text:soft-page-break/>['airbag']</text:p>
      <text:p text:style-name="P17">ошибки:</text:p>
      <text:p text:style-name="P23">ReferenceError</text:p>
      <text:p text:style-name="P23">['airbag', 'abs']</text:p>
      <text:p text:style-name="P23">undefined</text:p>
      <text:p text:style-name="P23">[]</text:p>
      <text:p text:style-name="P19"/>
      <text:h text:style-name="P15" text:outline-level="3">Как работает механизм прототипного наследования в JavaScript?</text:h>
      <text:p text:style-name="P17">правильный ответ:</text:p>
      <text:p text:style-name="P21">Объект получает доступ к свойствам другого объекта через ссылку на его прототип</text:p>
      <text:p text:style-name="P17">ошибки:</text:p>
      <text:p text:style-name="P23">Свойства передаются из функции в объект автоматически</text:p>
      <text:p text:style-name="P23">Объект наследует свойства класса через super</text:p>
      <text:p text:style-name="P23">Объект создается как клон другого с сохранением прототипа</text:p>
      <text:p text:style-name="P23">Объект копирует свойства другого объекта через ключевое слово prototype</text:p>
      <text:p text:style-name="P19"/>
      <text:h text:style-name="P15" text:outline-level="3">Какой вариант наиболе правильно используя rest-оператор возвращает сумму всех аргументов?</text:h>
      <text:p text:style-name="P17">правильный ответ:</text:p>
      <text:p text:style-name="P21"><text:span text:style-name="T3">function</text:span> sum(...numbers) { <text:span text:style-name="T3">return</text:span> numbers.reduce((a, b) =&gt; a + b, 0); }</text:p>
      <text:p text:style-name="P17">ошибки:</text:p>
      <text:p text:style-name="P23">function sum(...numbers) { return arguments[0] + arguments[1]; }</text:p>
      <text:p text:style-name="P23">function sum(numbers) { return numbers.reduce((a, b) =&gt; a+ b); }</text:p>
      <text:p text:style-name="P23">function sum(numbers...) { return numbers[0] + numbers[1]; }</text:p>
      <text:p text:style-name="P23">function sum(...numbers) { return a + b ; }</text:p>
      <text:p text:style-name="P19"/>
      <text:h text:style-name="P15" text:outline-level="3"><text:soft-page-break/>Какой вариант использования хранения данных НЕ предназначен для хранения секретных токенов и паролей из-за отсутствия шифрования?</text:h>
      <text:p text:style-name="P17">правильный ответ:</text:p>
      <text:p text:style-name="P21">Все перечисленные</text:p>
      <text:p text:style-name="P17">ошибки:</text:p>
      <text:p text:style-name="P23">LocalStorage</text:p>
      <text:p text:style-name="P23">Cookies без флагов Secure/HttpOnly</text:p>
      <text:p text:style-name="P23">SessionStorage</text:p>
      <text:p text:style-name="P23">Ни один из перечисленных вариантов</text:p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29T23:22:40.473000000</dc:date>
    <meta:editing-duration>PT19H53M10S</meta:editing-duration>
    <meta:editing-cycles>35</meta:editing-cycles>
    <meta:generator>LibreOffice/7.2.4.1$Windows_X86_64 LibreOffice_project/27d75539669ac387bb498e35313b970b7fe9c4f9</meta:generator>
    <meta:document-statistic meta:table-count="0" meta:image-count="0" meta:object-count="0" meta:page-count="9" meta:paragraph-count="220" meta:word-count="990" meta:character-count="7301" meta:non-whitespace-character-count="6513"/>
  </office:meta>
</office:document-meta>
</file>