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hh_eng_A1.mp3" manifest:media-type="audio/mpeg"/>
  <manifest:file-entry manifest:full-path="Media/hh_eng_A1_02.mp3" manifest:media-type="audio/m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adornments="Обычный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use-window-font-color="true" loext:opacity="0%"/>
    </style:style>
    <style:style style:name="P2" style:family="paragraph" style:parent-style-name="Heading_20_3">
      <style:text-properties fo:language="ru" fo:country="RU"/>
    </style:style>
    <style:style style:name="P3" style:family="paragraph" style:parent-style-name="Standard">
      <style:text-properties fo:language="en" fo:country="US" officeooo:rsid="001defcb" officeooo:paragraph-rsid="001defcb"/>
    </style:style>
    <style:style style:name="P4" style:family="paragraph" style:parent-style-name="Standard">
      <style:text-properties fo:language="ru" fo:country="RU" officeooo:rsid="001defcb" officeooo:paragraph-rsid="001defcb"/>
    </style:style>
    <style:style style:name="P5" style:family="paragraph" style:parent-style-name="вариант_5f_ответа">
      <style:text-properties officeooo:rsid="002fa36a" officeooo:paragraph-rsid="002fa36a"/>
    </style:style>
    <style:style style:name="P6" style:family="paragraph" style:parent-style-name="вариант_5f_ошибка">
      <style:text-properties fo:language="en" fo:country="US"/>
    </style:style>
    <style:style style:name="P7" style:family="paragraph" style:parent-style-name="Standard">
      <style:text-properties fo:language="ru" fo:country="RU" officeooo:rsid="0020651f" officeooo:paragraph-rsid="0020651f"/>
    </style:style>
    <style:style style:name="P8" style:family="paragraph" style:parent-style-name="блок_5f_текста">
      <style:text-properties fo:font-weight="bold" style:font-weight-asian="bold" style:font-weight-complex="bold"/>
    </style:style>
    <style:style style:name="P9" style:family="paragraph" style:parent-style-name="Standard">
      <style:text-properties fo:language="ru" fo:country="RU" officeooo:rsid="00218f57" officeooo:paragraph-rsid="00218f57"/>
    </style:style>
    <style:style style:name="P10" style:family="paragraph" style:parent-style-name="Heading_20_3">
      <style:text-properties officeooo:paragraph-rsid="0043ebf5"/>
    </style:style>
    <style:style style:name="P11" style:family="paragraph" style:parent-style-name="блок_5f_текста">
      <style:text-properties fo:font-weight="bold" officeooo:paragraph-rsid="0043ebf5" style:font-weight-asian="bold" style:font-weight-complex="bold"/>
    </style:style>
    <style:style style:name="P12" style:family="paragraph" style:parent-style-name="блок_5f_текста">
      <style:text-properties officeooo:paragraph-rsid="0043ebf5"/>
    </style:style>
    <style:style style:name="P13" style:family="paragraph" style:parent-style-name="вариант_5f_ошибка">
      <style:text-properties fo:language="en" fo:country="US" officeooo:rsid="00218f57"/>
    </style:style>
    <style:style style:name="P14" style:family="paragraph" style:parent-style-name="Heading_20_4">
      <style:text-properties officeooo:paragraph-rsid="0043ebf5"/>
    </style:style>
    <style:style style:name="P15" style:family="paragraph" style:parent-style-name="Standard">
      <style:text-properties fo:language="en" fo:country="US" officeooo:rsid="0020651f" officeooo:paragraph-rsid="0021a319"/>
    </style:style>
    <style:style style:name="P16" style:family="paragraph" style:parent-style-name="вариант_5f_ответа">
      <style:text-properties fo:language="ru" fo:country="RU" officeooo:rsid="002a1188" officeooo:paragraph-rsid="0045ddc6"/>
    </style:style>
    <style:style style:name="P17" style:family="paragraph" style:parent-style-name="Standard">
      <style:text-properties fo:language="ru" fo:country="RU" officeooo:rsid="002a1188" officeooo:paragraph-rsid="002a1188"/>
    </style:style>
    <style:style style:name="P18" style:family="paragraph" style:parent-style-name="вариант_5f_ошибка">
      <style:text-properties fo:language="en" fo:country="US" officeooo:rsid="002557f0"/>
    </style:style>
    <style:style style:name="P19" style:family="paragraph" style:parent-style-name="Standard">
      <style:text-properties fo:language="ru" fo:country="RU" officeooo:rsid="004791ae" officeooo:paragraph-rsid="004791ae"/>
    </style:style>
    <style:style style:name="P20" style:family="paragraph" style:parent-style-name="Heading_20_3">
      <style:text-properties officeooo:paragraph-rsid="004791ae"/>
    </style:style>
    <style:style style:name="P21" style:family="paragraph" style:parent-style-name="List_20_Heading">
      <style:text-properties officeooo:paragraph-rsid="004791ae"/>
    </style:style>
    <style:style style:name="P22" style:family="paragraph" style:parent-style-name="вариант_5f_ответа">
      <style:text-properties officeooo:rsid="002fa36a" officeooo:paragraph-rsid="004791ae"/>
    </style:style>
    <style:style style:name="P23" style:family="paragraph" style:parent-style-name="вариант_5f_ошибка">
      <style:text-properties fo:language="ru" fo:country="RU" officeooo:rsid="004791ae" officeooo:paragraph-rsid="004791ae"/>
    </style:style>
    <style:style style:name="P24" style:family="paragraph" style:parent-style-name="Standard">
      <style:text-properties fo:language="ru" fo:country="RU" officeooo:rsid="003e0f1c" officeooo:paragraph-rsid="003e0f1c"/>
    </style:style>
    <style:style style:name="P25" style:family="paragraph" style:parent-style-name="блок_5f_текста">
      <style:text-properties officeooo:paragraph-rsid="004791ae"/>
    </style:style>
    <style:style style:name="P26" style:family="paragraph" style:parent-style-name="Standard">
      <style:text-properties fo:language="en" fo:country="US" officeooo:rsid="0020651f" officeooo:paragraph-rsid="00229cde"/>
    </style:style>
    <style:style style:name="P27" style:family="paragraph" style:parent-style-name="вариант_5f_ответа">
      <style:text-properties fo:language="en" fo:country="US" officeooo:rsid="004791ae" officeooo:paragraph-rsid="004791ae"/>
    </style:style>
    <style:style style:name="P28" style:family="paragraph" style:parent-style-name="Standard">
      <style:text-properties officeooo:paragraph-rsid="004791ae"/>
    </style:style>
    <style:style style:name="P29" style:family="paragraph" style:parent-style-name="Heading_20_3">
      <style:text-properties officeooo:paragraph-rsid="004843e5"/>
    </style:style>
    <style:style style:name="P30" style:family="paragraph" style:parent-style-name="блок_5f_текста">
      <style:text-properties officeooo:paragraph-rsid="004843e5"/>
    </style:style>
    <style:style style:name="P31" style:family="paragraph" style:parent-style-name="Heading_20_4">
      <style:text-properties officeooo:paragraph-rsid="004843e5"/>
    </style:style>
    <style:style style:name="P32" style:family="paragraph" style:parent-style-name="List_20_Heading">
      <style:text-properties officeooo:paragraph-rsid="004843e5"/>
    </style:style>
    <style:style style:name="P33" style:family="paragraph" style:parent-style-name="вариант_5f_ответа">
      <style:text-properties officeooo:rsid="002fa36a" officeooo:paragraph-rsid="004843e5"/>
    </style:style>
    <style:style style:name="P34" style:family="paragraph" style:parent-style-name="вариант_5f_ошибка">
      <style:text-properties fo:language="ru" fo:country="RU" officeooo:rsid="004791ae" officeooo:paragraph-rsid="004843e5"/>
    </style:style>
    <style:style style:name="P35" style:family="paragraph" style:parent-style-name="Standard">
      <style:text-properties officeooo:paragraph-rsid="004843e5"/>
    </style:style>
    <style:style style:name="T1" style:family="text">
      <style:text-properties officeooo:rsid="003fc39a"/>
    </style:style>
    <style:style style:name="T2" style:family="text">
      <style:text-properties fo:language="ru" fo:country="RU" officeooo:rsid="003fc39a"/>
    </style:style>
    <style:style style:name="T3" style:family="text">
      <style:text-properties officeooo:rsid="0047b3ed"/>
    </style:style>
    <style:style style:name="T4" style:family="text">
      <style:text-properties fo:font-weight="bold" style:font-weight-asian="bold" style:font-weight-complex="bold"/>
    </style:style>
    <style:style style:name="gr1" style:family="graphic">
      <style:graphic-properties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loext:decorative="false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Английский А1</text:span><text:span text:style-name="T2"> </text:span>уровень</text:h>
      <text:h text:style-name="Heading_20_3" text:outline-level="3">Выберите правильный вариант.</text:h>
      <text:p text:style-name="блок_5f_текста">The boss wants to see ___ after the meeting.</text:p>
      <text:p text:style-name="List_20_Heading">правильный ответ:</text:p>
      <text:p text:style-name="вариант_5f_ответа">me</text:p>
      <text:p text:style-name="List_20_Heading">ошибки:</text:p>
      <text:p text:style-name="вариант_5f_ошибка">he</text:p>
      <text:p text:style-name="вариант_5f_ошибка">they</text:p>
      <text:p text:style-name="вариант_5f_ошибка">we </text:p>
      <text:p text:style-name="вариант_5f_ошибка">I</text:p>
      <text:p text:style-name="Standard"/>
      <text:h text:style-name="Heading_20_3" text:outline-level="3">Выберите правильный вариант.</text:h>
      <text:p text:style-name="блок_5f_текста">We have an important ____ at 10 a.m. We will discuss the new project.</text:p>
      <text:p text:style-name="List_20_Heading">правильный ответ:</text:p>
      <text:p text:style-name="вариант_5f_ответа">meeting</text:p>
      <text:p text:style-name="List_20_Heading">ошибки:</text:p>
      <text:p text:style-name="вариант_5f_ошибка">resume</text:p>
      <text:p text:style-name="вариант_5f_ошибка">document</text:p>
      <text:p text:style-name="вариант_5f_ошибка">deadline</text:p>
      <text:p text:style-name="вариант_5f_ошибка">file</text:p>
      <text:p text:style-name="Standard"/>
      <text:h text:style-name="Heading_20_3" text:outline-level="3">Выберите правильный вариант.</text:h>
      <text:p text:style-name="блок_5f_текста">I ____ at work last Saturday.</text:p>
      <text:p text:style-name="List_20_Heading">правильный ответ:</text:p>
      <text:p text:style-name="вариант_5f_ответа">was</text:p>
      <text:p text:style-name="List_20_Heading">ошибки:</text:p>
      <text:p text:style-name="вариант_5f_ошибка">are</text:p>
      <text:p text:style-name="вариант_5f_ошибка">were</text:p>
      <text:p text:style-name="вариант_5f_ошибка">is</text:p>
      <text:p text:style-name="вариант_5f_ошибка">am</text:p>
      <text:p text:style-name="Standard"/>
      <text:h text:style-name="P2" text:outline-level="3"><text:soft-page-break/>Выберите правильный вариант.</text:h>
      <text:p text:style-name="блок_5f_текста">I send ____ to our customers every day.</text:p>
      <text:p text:style-name="List_20_Heading">правильный ответ:</text:p>
      <text:p text:style-name="вариант_5f_ответа">emails</text:p>
      <text:p text:style-name="List_20_Heading">ошибки:</text:p>
      <text:p text:style-name="вариант_5f_ошибка">meetings</text:p>
      <text:p text:style-name="вариант_5f_ошибка">deadlines</text:p>
      <text:p text:style-name="вариант_5f_ошибка">bonuses</text:p>
      <text:p text:style-name="вариант_5f_ошибка">phone calls</text:p>
      <text:p text:style-name="P3"/>
      <text:h text:style-name="Heading_20_3" text:outline-level="3">Выберите правильный вариант.</text:h>
      <text:p text:style-name="блок_5f_текста">This is the ____ report I've ever written.</text:p>
      <text:p text:style-name="List_20_Heading">правильный ответ:</text:p>
      <text:p text:style-name="вариант_5f_ответа">longest</text:p>
      <text:p text:style-name="List_20_Heading">ошибки:</text:p>
      <text:p text:style-name="вариант_5f_ошибка">longer</text:p>
      <text:p text:style-name="вариант_5f_ошибка">long</text:p>
      <text:p text:style-name="вариант_5f_ошибка">more long</text:p>
      <text:p text:style-name="вариант_5f_ошибка">most long</text:p>
      <text:p text:style-name="P4"/>
      <text:h text:style-name="Heading_20_3" text:outline-level="3">Выберите правильный вариант.</text:h>
      <text:p text:style-name="блок_5f_текста">She ____ a meeting with the team at 10 o'clock yesterday.</text:p>
      <text:p text:style-name="List_20_Heading">правильный ответ:</text:p>
      <text:p text:style-name="P5">started</text:p>
      <text:p text:style-name="List_20_Heading">ошибки:</text:p>
      <text:p text:style-name="вариант_5f_ошибка">start</text:p>
      <text:p text:style-name="вариант_5f_ошибка">has started</text:p>
      <text:p text:style-name="вариант_5f_ошибка">starting</text:p>
      <text:p text:style-name="вариант_5f_ошибка">starts</text:p>
      <text:p text:style-name="P4"/>
      <text:h text:style-name="Heading_20_3" text:outline-level="3">Выберите правильный вариант.</text:h>
      <text:p text:style-name="блок_5f_текста">He always ____ at 7 o'clock in the morning because his work starts at 8 a.m.</text:p>
      <text:p text:style-name="List_20_Heading">правильный ответ:</text:p>
      <text:p text:style-name="вариант_5f_ответа"><text:soft-page-break/>wakes up</text:p>
      <text:p text:style-name="List_20_Heading">ошибки:</text:p>
      <text:p text:style-name="P6">has dinner</text:p>
      <text:p text:style-name="P6">goes to bed</text:p>
      <text:p text:style-name="P6">falls asleep</text:p>
      <text:p text:style-name="P6">comes home</text:p>
      <text:p text:style-name="P7"/>
      <text:h text:style-name="Heading_20_3" text:outline-level="3">Прочитайте текст и ответьте на вопрос.</text:h>
      <text:p text:style-name="P8">Saving Money for the Future.</text:p>
      <text:p text:style-name="блок_5f_текста">Do you want to save money? Here are some easy ideas.</text:p>
      <text:p text:style-name="P8">Make a plan</text:p>
      <text:p text:style-name="блок_5f_текста">Know how much money you get and how much you spend. Write it down.</text:p>
      <text:p text:style-name="P8">Small amounts help</text:p>
      <text:p text:style-name="блок_5f_текста">Save a little money every week. It is not difficult. For example, save money froma coffe you don't buy.</text:p>
      <text:p text:style-name="P8">Wait before you buy</text:p>
      <text:p text:style-name="блок_5f_текста">See a nice phone? Wait 2 days. Often, you see that you don't need it.</text:p>
      <text:p text:style-name="P8">Have a goal</text:p>
      <text:p text:style-name="блок_5f_текста">Save money for something special, like a holiday or a new bike. It helps you stay happy.</text:p>
      <text:p text:style-name="блок_5f_текста">Saving money is a good habit for a calm future!</text:p>
      <text:h text:style-name="Heading_20_4" text:outline-level="4">What is the text about?</text:h>
      <text:p text:style-name="List_20_Heading">правильный ответ:</text:p>
      <text:p text:style-name="вариант_5f_ответа">Easy ways to save money</text:p>
      <text:p text:style-name="List_20_Heading">ошибки:</text:p>
      <text:p text:style-name="вариант_5f_ошибка">Ways to spend money</text:p>
      <text:p text:style-name="вариант_5f_ошибка">Ways to write a weekly plan</text:p>
      <text:p text:style-name="вариант_5f_ошибка">Ways to choose the best coffe</text:p>
      <text:p text:style-name="вариант_5f_ошибка">Steps of planning a holiday</text:p>
      <text:p text:style-name="P9"/>
      <text:h text:style-name="P10" text:outline-level="3">Прочитайте текст и ответьте на вопрос.</text:h>
      <text:p text:style-name="P11">Saving Money for the Future.</text:p>
      <text:p text:style-name="P12">Do you want to save money? Here are some easy ideas.</text:p>
      <text:p text:style-name="P11">Make a plan</text:p>
      <text:p text:style-name="P12">Know how much money you get and how much you spend. Write it down.</text:p>
      <text:p text:style-name="P11">Small amounts help</text:p>
      <text:p text:style-name="P12">Save a little money every week. It is not difficult. For example, save money froma coffe you don't buy.</text:p>
      <text:p text:style-name="P11">Wait before you buy</text:p>
      <text:p text:style-name="P12">See a nice phone? Wait 2 days. Often, you see that you don't need it.</text:p>
      <text:p text:style-name="P11">Have a goal</text:p>
      <text:p text:style-name="P12"><text:soft-page-break/>Save money for something special, like a holiday or a new bike. It helps you stay happy.</text:p>
      <text:p text:style-name="P12">Saving money is a good habit for a calm future!</text:p>
      <text:h text:style-name="Heading_20_4" text:outline-level="4">What should you do when you see a new phone?</text:h>
      <text:p text:style-name="List_20_Heading">правильный ответ:</text:p>
      <text:p text:style-name="вариант_5f_ответа">Wait for a couple of days</text:p>
      <text:p text:style-name="List_20_Heading">ошибки:</text:p>
      <text:p text:style-name="P13">Wait for a week</text:p>
      <text:p text:style-name="P13">Save money for a year</text:p>
      <text:p text:style-name="P13">Find a cheaper phone</text:p>
      <text:p text:style-name="P13">Buy it now</text:p>
      <text:p text:style-name="P7"/>
      <text:h text:style-name="P10" text:outline-level="3">Прочитайте текст и ответьте на вопрос.</text:h>
      <text:p text:style-name="P11">Saving Money for the Future.</text:p>
      <text:p text:style-name="P12">Do you want to save money? Here are some easy ideas.</text:p>
      <text:p text:style-name="P11">Make a plan</text:p>
      <text:p text:style-name="P12">Know how much money you get and how much you spend. Write it down.</text:p>
      <text:p text:style-name="P11">Small amounts help</text:p>
      <text:p text:style-name="P12">Save a little money every week. It is not difficult. For example, save money froma coffe you don't buy.</text:p>
      <text:p text:style-name="P11">Wait before you buy</text:p>
      <text:p text:style-name="P12">See a nice phone? Wait 2 days. Often, you see that you don't need it.</text:p>
      <text:p text:style-name="P11">Have a goal</text:p>
      <text:p text:style-name="P12">Save money for something special, like a holiday or a new bike. It helps you stay happy.</text:p>
      <text:p text:style-name="P12">Saving money is a good habit for a calm future!</text:p>
      <text:h text:style-name="P14" text:outline-level="4">What is one easy way to save some money every week?</text:h>
      <text:p text:style-name="List_20_Heading">правильный ответ:</text:p>
      <text:p text:style-name="вариант_5f_ответа">Don't buy coffee and save the money</text:p>
      <text:p text:style-name="List_20_Heading">ошибки:</text:p>
      <text:p text:style-name="вариант_5f_ошибка">Don't write a plan</text:p>
      <text:p text:style-name="вариант_5f_ошибка">Don't use your computer </text:p>
      <text:p text:style-name="вариант_5f_ошибка">Don't go on holiday</text:p>
      <text:p text:style-name="вариант_5f_ошибка">Don't buy a bike</text:p>
      <text:p text:style-name="P15"/>
      <text:h text:style-name="Heading_20_3" text:outline-level="3"><text:soft-page-break/>Прослушайте аудио и дайте ответ на вопрос.</text:h>
      <text:h text:style-name="Heading_20_4" text:outline-level="4">What is Tom talking about?</text:h>
      <text:p text:style-name="List_20_Heading"><draw:frame text:anchor-type="paragraph" draw:z-index="1" draw:name="Фигура1" draw:style-name="gr1" svg:width="4.356cm" svg:height="4.356cm" svg:x="0.086cm" svg:y="0cm"><draw:plugin xlink:href="Media/hh_eng_A1.mp3" xlink:type="simple" xlink:show="embed" xlink:actuate="onLoad" draw:mime-type="audio/mpeg"><draw:param draw:name="Loop" draw:value="false"/><draw:param draw:name="Mute" draw:value="false"/><draw:param draw:name="VolumeDB" draw:value="0"/></draw:plugin></draw:frame></text:p>
      <text:p text:style-name="List_20_Heading">правильный ответ:</text:p>
      <text:p text:style-name="P16">Good things about working online</text:p>
      <text:p text:style-name="вариант_5f_ошибка">Working in the office</text:p>
      <text:p text:style-name="вариант_5f_ошибка">Working too much</text:p>
      <text:p text:style-name="вариант_5f_ошибка">Having much free time</text:p>
      <text:p text:style-name="вариант_5f_ошибка">Bad things about working online</text:p>
      <text:p text:style-name="P17"/>
      <text:h text:style-name="Heading_20_3" text:outline-level="3">Прослушайте аудио и дайте ответ на вопрос.</text:h>
      <text:h text:style-name="Heading_20_4" text:outline-level="4">What is Tom's favourite thing about his work?</text:h>
      <text:p text:style-name="List_20_Heading"><draw:frame text:anchor-type="paragraph" draw:z-index="2" draw:name="Фигура2" draw:style-name="gr1" svg:width="4.356cm" svg:height="4.356cm" svg:x="0.086cm" svg:y="0cm"><draw:plugin xlink:href="Media/hh_eng_A1.mp3" xlink:type="simple" xlink:show="embed" xlink:actuate="onLoad" draw:mime-type="audio/mpeg"><draw:param draw:name="Loop" draw:value="false"/><draw:param draw:name="Mute" draw:value="false"/><draw:param draw:name="VolumeDB" draw:value="-5"/></draw:plugin></draw:frame></text:p>
      <text:p text:style-name="List_20_Heading">правильный ответ:</text:p>
      <text:p text:style-name="вариант_5f_ответа">He can work from his kitchen and drink coffee</text:p>
      <text:p text:style-name="List_20_Heading">ошибки:</text:p>
      <text:p text:style-name="P18">He finishes work early every day</text:p>
      <text:p text:style-name="P18">He goes to an office on foot</text:p>
      <text:p text:style-name="P18">He has a lot of meeting</text:p>
      <text:p text:style-name="P18">His working day isn't long</text:p>
      <text:p text:style-name="P19"/>
      <text:h text:style-name="P20" text:outline-level="3"><text:soft-page-break/>Выберите правильный вариант.</text:h>
      <text:p text:style-name="блок_5f_текста">____ is a busy Monday morning.</text:p>
      <text:p text:style-name="P21">правильный ответ:</text:p>
      <text:p text:style-name="P22">It</text:p>
      <text:p text:style-name="P21">ошибки:</text:p>
      <text:p text:style-name="P23">She </text:p>
      <text:p text:style-name="P23">He</text:p>
      <text:p text:style-name="P23">I</text:p>
      <text:p text:style-name="P23">We</text:p>
      <text:p text:style-name="P24"/>
      <text:h text:style-name="P20" text:outline-level="3">Выберите правильный вариант.</text:h>
      <text:p text:style-name="P25">Please, read the ____ and sign it.</text:p>
      <text:p text:style-name="P21">правильный ответ:</text:p>
      <text:p text:style-name="P22">document</text:p>
      <text:p text:style-name="P21">ошибки:</text:p>
      <text:p text:style-name="P23">book</text:p>
      <text:p text:style-name="P23">message</text:p>
      <text:p text:style-name="P23">story</text:p>
      <text:p text:style-name="P23">text</text:p>
      <text:p text:style-name="P26"/>
      <text:h text:style-name="P20" text:outline-level="3">Выберите правильный вариант.</text:h>
      <text:p text:style-name="P25">He ____ on a business trip last week.</text:p>
      <text:p text:style-name="P21">правильный ответ:</text:p>
      <text:p text:style-name="P27">was</text:p>
      <text:p text:style-name="P21">ошибки:</text:p>
      <text:p text:style-name="P23">are</text:p>
      <text:p text:style-name="P23">were</text:p>
      <text:p text:style-name="P23">is</text:p>
      <text:p text:style-name="P23">am</text:p>
      <text:p text:style-name="P26"/>
      <text:h text:style-name="P20" text:outline-level="3">Выберите правильный вариант.</text:h>
      <text:p text:style-name="P25">I forgot my ____. I can't open the computer.</text:p>
      <text:p text:style-name="P21">правильный ответ:</text:p>
      <text:p text:style-name="P22"><text:soft-page-break/>password</text:p>
      <text:p text:style-name="P21">ошибки:</text:p>
      <text:p text:style-name="P23">schedule</text:p>
      <text:p text:style-name="P23">deadline</text:p>
      <text:p text:style-name="P23">document</text:p>
      <text:p text:style-name="P23">pencil</text:p>
      <text:p text:style-name="Standard"/>
      <text:h text:style-name="P20" text:outline-level="3">Выберите правильный вариант.</text:h>
      <text:p text:style-name="P25">This is ____ task of the day. </text:p>
      <text:p text:style-name="P21">правильный ответ:</text:p>
      <text:p text:style-name="P22">the easiest</text:p>
      <text:p text:style-name="P21">ошибки:</text:p>
      <text:p text:style-name="P23">easier</text:p>
      <text:p text:style-name="P23">more easy</text:p>
      <text:p text:style-name="P23">the most easy</text:p>
      <text:p text:style-name="P23">easy</text:p>
      <text:p text:style-name="Standard"/>
      <text:h text:style-name="P20" text:outline-level="3">Выберите правильный вариант.</text:h>
      <text:p text:style-name="P25">I ____ the document for the boss an hour ago.</text:p>
      <text:p text:style-name="P21">правильный ответ:</text:p>
      <text:p text:style-name="P22">printed</text:p>
      <text:p text:style-name="P21">ошибки:</text:p>
      <text:p text:style-name="P23">print </text:p>
      <text:p text:style-name="P23">printing</text:p>
      <text:p text:style-name="P23">prints</text:p>
      <text:p text:style-name="P23">will print</text:p>
      <text:p text:style-name="P28"/>
      <text:h text:style-name="P20" text:outline-level="3">Выберите правильный вариант.</text:h>
      <text:p text:style-name="P25">She always ____ the news on TV in the evening.</text:p>
      <text:p text:style-name="P21">правильный ответ:</text:p>
      <text:p text:style-name="P22">wat<text:span text:style-name="T3">с</text:span>hes</text:p>
      <text:p text:style-name="P21">ошибки:</text:p>
      <text:p text:style-name="P23">reads</text:p>
      <text:p text:style-name="P23"><text:soft-page-break/>looks</text:p>
      <text:p text:style-name="P23">sees</text:p>
      <text:p text:style-name="P23">has</text:p>
      <text:p text:style-name="P28"/>
      <text:h text:style-name="P20" text:outline-level="3">Прочитайте текст и ответьте на вопрос.</text:h>
      <text:p text:style-name="блок_5f_текста">Is your work difficult sometimes? These tips can help.</text:p>
      <text:p text:style-name="блок_5f_текста"><text:span text:style-name="T4">Organize your desk.</text:span> A clean desk helps you think clearly. Put your papers and pens in order.</text:p>
      <text:p text:style-name="блок_5f_текста"><text:span text:style-name="T4">Take short breaks.</text:span> Work for an hour, then rest for 5 minutes. Look out of the window or drink some water.</text:p>
      <text:p text:style-name="блок_5f_текста"><text:span text:style-name="T4">Talk to colleagues.</text:span> Say "good morning" and talk abouts simple things. Good friends at work are important.</text:p>
      <text:p text:style-name="блок_5f_текста"><text:span text:style-name="T4">Make a list.</text:span> Write down your tasks for the day. It helps you remember what to do.</text:p>
      <text:p text:style-name="блок_5f_текста">You can enjoy your work day more with small changes!</text:p>
      <text:h text:style-name="Heading_20_4" text:outline-level="4">What is the main idea of the text?</text:h>
      <text:p text:style-name="P21">правильный ответ:</text:p>
      <text:p text:style-name="P22">How to feel better at work</text:p>
      <text:p text:style-name="P21">ошибки:</text:p>
      <text:p text:style-name="P23">How to make a task list</text:p>
      <text:p text:style-name="P23">How to organize your workplace</text:p>
      <text:p text:style-name="P23">How to communicate at work</text:p>
      <text:p text:style-name="P23">How to find a new job</text:p>
      <text:p text:style-name="P28"/>
      <text:h text:style-name="P29" text:outline-level="3">Прочитайте текст и ответьте на вопрос.</text:h>
      <text:p text:style-name="P30">Is your work difficult sometimes? These tips can help.</text:p>
      <text:p text:style-name="P30"><text:span text:style-name="T4">Organize your desk.</text:span> A clean desk helps you think clearly. Put your papers and pens in order.</text:p>
      <text:p text:style-name="P30"><text:span text:style-name="T4">Take short breaks.</text:span> Work for an hour, then rest for 5 minutes. Look out of the window or drink some water.</text:p>
      <text:p text:style-name="P30"><text:span text:style-name="T4">Talk to colleagues.</text:span> Say "good morning" and talk abouts simple things. Good friends at work are important.</text:p>
      <text:p text:style-name="P30"><text:span text:style-name="T4">Make a list.</text:span> Write down your tasks for the day. It helps you remember what to do.</text:p>
      <text:p text:style-name="P30">You can enjoy your work day more with small changes!</text:p>
      <text:h text:style-name="P31" text:outline-level="4">Why is a clean desk helpful?</text:h>
      <text:p text:style-name="P21">правильный ответ:</text:p>
      <text:p text:style-name="P22">It helps you to think</text:p>
      <text:p text:style-name="P21">ошибки:</text:p>
      <text:p text:style-name="P23">It makes your colleagues happy</text:p>
      <text:p text:style-name="P23"><text:soft-page-break/>You can find things easily</text:p>
      <text:p text:style-name="P23">It is beautiful</text:p>
      <text:p text:style-name="P23">You canwork 4 more hours</text:p>
      <text:p text:style-name="P28"/>
      <text:h text:style-name="P29" text:outline-level="3">Прочитайте текст и ответьте на вопрос.</text:h>
      <text:p text:style-name="P30">Is your work difficult sometimes? These tips can help.</text:p>
      <text:p text:style-name="P30"><text:span text:style-name="T4">Organize your desk.</text:span> A clean desk helps you think clearly. Put your papers and pens in order.</text:p>
      <text:p text:style-name="P30"><text:span text:style-name="T4">Take short breaks.</text:span> Work for an hour, then rest for 5 minutes. Look out of the window or drink some water.</text:p>
      <text:p text:style-name="P30"><text:span text:style-name="T4">Talk to colleagues.</text:span> Say "good morning" and talk abouts simple things. Good friends at work are important.</text:p>
      <text:p text:style-name="P30"><text:span text:style-name="T4">Make a list.</text:span> Write down your tasks for the day. It helps you remember what to do.</text:p>
      <text:p text:style-name="P30">You can enjoy your work day more with small changes!</text:p>
      <text:h text:style-name="P31" text:outline-level="4">Why should you organize your work?</text:h>
      <text:p text:style-name="P21">правильный ответ:</text:p>
      <text:p text:style-name="P22">You can think better</text:p>
      <text:p text:style-name="P21">ошибки:</text:p>
      <text:p text:style-name="P23">It's a rule from the manager</text:p>
      <text:p text:style-name="P23">Your colleagues will be happy</text:p>
      <text:p text:style-name="P23">It saves electricity</text:p>
      <text:p text:style-name="P23">You remember things better</text:p>
      <text:p text:style-name="P28"/>
      <text:h text:style-name="P20" text:outline-level="3">Послушайте аудио и дайте ответ на вопрос.</text:h>
      <text:h text:style-name="Heading_20_4" text:outline-level="4">What is Sarah talking about?</text:h>
      <text:p text:style-name="P21"><draw:frame text:anchor-type="paragraph" draw:z-index="0" draw:name="Медиаобъект 1" draw:style-name="gr2" svg:width="5cm" svg:height="5cm" svg:x="0.058cm" svg:y="-0.081cm"><draw:plugin xlink:href="Media/hh_eng_A1_02.mp3" xlink:type="simple" xlink:show="embed" xlink:actuate="onLoad" draw:mime-type="audio/mpeg"><draw:param draw:name="Loop" draw:value="false"/><draw:param draw:name="Mute" draw:value="false"/><draw:param draw:name="VolumeDB" draw:value="0"/></draw:plugin></draw:frame>правильный ответ:</text:p>
      <text:p text:style-name="P22">Her hard day at work</text:p>
      <text:p text:style-name="P21">ошибки:</text:p>
      <text:p text:style-name="P23"><text:soft-page-break/>Working long hours</text:p>
      <text:p text:style-name="P23">The team meeting</text:p>
      <text:p text:style-name="P23">Emails to customers</text:p>
      <text:p text:style-name="P23">The boss</text:p>
      <text:p text:style-name="P28"/>
      <text:p text:style-name="P28"/>
      <text:h text:style-name="P29" text:outline-level="3">Послушайте аудио и дайте ответ на вопрос.</text:h>
      <text:h text:style-name="Heading_20_4" text:outline-level="4">What did the boss ask Sarah to do?</text:h>
      <text:p text:style-name="P32"><draw:frame text:anchor-type="paragraph" draw:z-index="3" draw:name="Медиаобъект 2" draw:style-name="gr2" svg:width="5cm" svg:height="5cm" svg:x="0.058cm" svg:y="-0.081cm"><draw:plugin xlink:href="Media/hh_eng_A1_02.mp3" xlink:type="simple" xlink:show="embed" xlink:actuate="onLoad" draw:mime-type="audio/mpeg"><draw:param draw:name="Loop" draw:value="false"/><draw:param draw:name="Mute" draw:value="false"/><draw:param draw:name="VolumeDB" draw:value="0"/></draw:plugin></draw:frame>правильный ответ:</text:p>
      <text:p text:style-name="P33">To work on a new project</text:p>
      <text:p text:style-name="P32">ошибки:</text:p>
      <text:p text:style-name="P34">To write an email to a new client</text:p>
      <text:p text:style-name="P34">To have a meeting with clients</text:p>
      <text:p text:style-name="P34">To write a report</text:p>
      <text:p text:style-name="P34">To work with documents</text:p>
      <text:p text:style-name="P35"/>
      <text:p text:style-name="P35"/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adornments="Обычный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вариант_5f_ответа" style:display-name="вариант_ответа" style:family="paragraph" style:parent-style-name="Standard" style:master-page-name="">
      <style:paragraph-properties fo:margin-top="0.101cm" fo:margin-bottom="0.101cm" style:contextual-spacing="false" fo:line-height="100%" style:page-number="auto" fo:padding="0.199cm" fo:border="0.06pt solid #000000" style:join-border="false">
        <style:tab-stops/>
      </style:paragraph-properties>
      <style:text-properties style:font-name="Lucida Console" fo:font-family="'Lucida Console'" style:font-style-name="Обычный" style:font-family-generic="modern" style:font-pitch="fixe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блок_5f_кода" style:display-name="блок_кода" style:family="paragraph" style:master-page-name="">
      <loext:graphic-properties draw:fill="solid" draw:fill-color="#dee7e5"/>
      <style:paragraph-properties style:page-number="auto" fo:background-color="#dee7e5">
        <style:tab-stops/>
      </style:paragraph-properties>
      <style:text-properties style:font-name="Courier New" fo:font-family="'Courier New'" style:font-style-name="Обычный" style:font-family-generic="modern" style:font-pitch="fixed" fo:font-size="11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вариант_5f_ошибка" style:display-name="вариант_ошибка" style:family="paragraph" style:parent-style-name="вариант_5f_ответа" style:master-page-name="">
      <style:paragraph-properties style:page-number="auto" fo:padding="0.199cm" fo:border="0.06pt dotted #666666">
        <style:tab-stops/>
      </style:paragraph-properties>
      <style:text-properties fo:color="#999999" loext:opacity="100%" fo:font-size="10pt"/>
    </style:style>
    <style:style style:name="блок_5f_текста" style:display-name="блок_текста" style:family="paragraph">
      <loext:graphic-properties draw:fill="solid" draw:fill-color="#fdf6f1"/>
      <style:paragraph-properties fo:background-color="#fdf6f1">
        <style:tab-stops/>
      </style:paragraph-properties>
      <style:text-properties style:font-name="Courier New" fo:font-family="'Courier New'" style:font-style-name="Обычный" style:font-family-generic="modern" style:font-pitch="fixed" fo:font-size="11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30T20:43:18.138572600</meta:creation-date>
    <dc:date>2026-07-02T10:38:24.830551900</dc:date>
    <meta:editing-duration>PT23H56M51S</meta:editing-duration>
    <meta:editing-cycles>52</meta:editing-cycles>
    <meta:generator>LibreOffice/25.8.4.2$Windows_X86_64 LibreOffice_project/290daaa01b999472f0c7a3890eb6a550fd74c6df</meta:generator>
    <meta:document-statistic meta:table-count="0" meta:image-count="0" meta:object-count="0" meta:page-count="10" meta:paragraph-count="267" meta:word-count="1293" meta:character-count="6941" meta:non-whitespace-character-count="5910"/>
  </office:meta>
</office:document-meta>
</file>