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hh_eng_A1.mp3" manifest:media-type="application/vnd.sun.star.media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defcb" officeooo:paragraph-rsid="001defcb"/>
    </style:style>
    <style:style style:name="P2" style:family="paragraph" style:parent-style-name="Standard">
      <style:text-properties fo:language="ru" fo:country="RU" officeooo:rsid="0020651f" officeooo:paragraph-rsid="0020651f"/>
    </style:style>
    <style:style style:name="P3" style:family="paragraph" style:parent-style-name="Standard">
      <style:text-properties fo:language="ru" fo:country="RU" officeooo:rsid="00218f57" officeooo:paragraph-rsid="00218f57"/>
    </style:style>
    <style:style style:name="P4" style:family="paragraph" style:parent-style-name="Standard">
      <style:text-properties fo:language="ru" fo:country="RU" officeooo:rsid="002a1188" officeooo:paragraph-rsid="002a1188"/>
    </style:style>
    <style:style style:name="P5" style:family="paragraph" style:parent-style-name="Standard">
      <style:text-properties fo:language="ru" fo:country="RU" officeooo:rsid="003e0f1c" officeooo:paragraph-rsid="003e0f1c"/>
    </style:style>
    <style:style style:name="P6" style:family="paragraph" style:parent-style-name="Standard">
      <style:text-properties fo:language="en" fo:country="US" officeooo:rsid="001defcb" officeooo:paragraph-rsid="001defcb"/>
    </style:style>
    <style:style style:name="P7" style:family="paragraph" style:parent-style-name="вариант_5f_ошибка">
      <style:text-properties fo:language="en" fo:country="US"/>
    </style:style>
    <style:style style:name="P8" style:family="paragraph" style:parent-style-name="вариант_5f_ошибка">
      <style:text-properties fo:language="en" fo:country="US" officeooo:rsid="00218f57"/>
    </style:style>
    <style:style style:name="P9" style:family="paragraph" style:parent-style-name="Standard">
      <style:text-properties fo:language="en" fo:country="US" officeooo:rsid="0020651f" officeooo:paragraph-rsid="0021a319"/>
    </style:style>
    <style:style style:name="P10" style:family="paragraph" style:parent-style-name="Standard">
      <style:text-properties fo:language="en" fo:country="US" officeooo:rsid="0020651f" officeooo:paragraph-rsid="00229cde"/>
    </style:style>
    <style:style style:name="P11" style:family="paragraph" style:parent-style-name="вариант_5f_ошибка">
      <style:text-properties fo:language="en" fo:country="US" officeooo:rsid="0020651f" officeooo:paragraph-rsid="002d06d5"/>
    </style:style>
    <style:style style:name="P12" style:family="paragraph" style:parent-style-name="вариант_5f_ошибка">
      <style:text-properties fo:language="en" fo:country="US" officeooo:rsid="002557f0"/>
    </style:style>
    <style:style style:name="P13" style:family="paragraph" style:parent-style-name="вариант_5f_ответа">
      <style:text-properties fo:language="en" fo:country="US" officeooo:rsid="002557f0"/>
    </style:style>
    <style:style style:name="P14" style:family="paragraph" style:parent-style-name="вариант_5f_ответа">
      <style:text-properties officeooo:rsid="002fa36a" officeooo:paragraph-rsid="002fa36a"/>
    </style:style>
    <style:style style:name="P15" style:family="paragraph" style:parent-style-name="List_20_Heading">
      <style:text-properties officeooo:paragraph-rsid="002d06d5"/>
    </style:style>
    <style:style style:name="P16" style:family="paragraph" style:parent-style-name="вариант_5f_ответа">
      <style:text-properties officeooo:paragraph-rsid="002d06d5"/>
    </style:style>
    <style:style style:name="P17" style:family="paragraph" style:parent-style-name="Standard">
      <style:text-properties officeooo:paragraph-rsid="00229cde"/>
    </style:style>
    <style:style style:name="P18" style:family="paragraph" style:parent-style-name="Standard">
      <style:text-properties fo:language="ru" fo:country="RU" officeooo:rsid="0045ddc6" officeooo:paragraph-rsid="00229cde"/>
    </style:style>
    <style:style style:name="P19" style:family="paragraph" style:parent-style-name="Heading_20_1">
      <style:paragraph-properties fo:text-align="center" style:justify-single-word="false"/>
      <style:text-properties style:use-window-font-color="true" loext:opacity="0%"/>
    </style:style>
    <style:style style:name="P20" style:family="paragraph" style:parent-style-name="Heading_20_3">
      <style:text-properties fo:language="ru" fo:country="RU"/>
    </style:style>
    <style:style style:name="P21" style:family="paragraph" style:parent-style-name="Heading_20_3">
      <style:text-properties officeooo:paragraph-rsid="002d06d5"/>
    </style:style>
    <style:style style:name="P22" style:family="paragraph" style:parent-style-name="Heading_20_3">
      <style:text-properties officeooo:paragraph-rsid="0043ebf5"/>
    </style:style>
    <style:style style:name="P23" style:family="paragraph" style:parent-style-name="Heading_20_4">
      <style:text-properties officeooo:paragraph-rsid="0043ebf5"/>
    </style:style>
    <style:style style:name="P24" style:family="paragraph" style:parent-style-name="блок_5f_текста">
      <style:text-properties fo:font-weight="bold" style:font-weight-asian="bold" style:font-weight-complex="bold"/>
    </style:style>
    <style:style style:name="P25" style:family="paragraph" style:parent-style-name="блок_5f_текста">
      <style:text-properties fo:font-weight="bold" officeooo:paragraph-rsid="0043ebf5" style:font-weight-asian="bold" style:font-weight-complex="bold"/>
    </style:style>
    <style:style style:name="P26" style:family="paragraph" style:parent-style-name="блок_5f_текста">
      <style:text-properties officeooo:paragraph-rsid="0043ebf5"/>
    </style:style>
    <style:style style:name="P27" style:family="paragraph" style:parent-style-name="вариант_5f_ответа">
      <style:text-properties officeooo:paragraph-rsid="0045ddc6"/>
    </style:style>
    <style:style style:name="P28" style:family="paragraph" style:parent-style-name="вариант_5f_ошибка">
      <style:text-properties fo:language="en" fo:country="US"/>
    </style:style>
    <style:style style:name="P29" style:family="paragraph" style:parent-style-name="вариант_5f_ошибка">
      <style:text-properties fo:language="en" fo:country="US" officeooo:rsid="00218f57"/>
    </style:style>
    <style:style style:name="P30" style:family="paragraph" style:parent-style-name="вариант_5f_ошибка">
      <style:text-properties fo:language="en" fo:country="US" officeooo:rsid="002557f0"/>
    </style:style>
    <style:style style:name="T1" style:family="text">
      <style:text-properties fo:language="ru" fo:country="RU" officeooo:rsid="003fc39a"/>
    </style:style>
    <style:style style:name="T2" style:family="text">
      <style:text-properties fo:language="ru" fo:country="RU" officeooo:rsid="002a1188"/>
    </style:style>
    <style:style style:name="T3" style:family="text">
      <style:text-properties fo:color="#ff5429" loext:opacity="100%"/>
    </style:style>
    <style:style style:name="T4" style:family="text">
      <style:text-properties fo:color="#ff5429" loext:opacity="100%" officeooo:rsid="0045ddc6"/>
    </style:style>
    <style:style style:name="T5" style:family="text">
      <style:text-properties officeooo:rsid="0030f775"/>
    </style:style>
    <style:style style:name="T6" style:family="text">
      <style:text-properties officeooo:rsid="003fc39a"/>
    </style:style>
    <style:style style:name="T7" style:family="text">
      <style:text-properties officeooo:rsid="0040f794"/>
    </style: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T6">Английский А1</text:span><text:span text:style-name="T1"> </text:span>уровень</text:h>
      <text:h text:style-name="Heading_20_3" text:outline-level="3">Выберите правильный вариант.</text:h>
      <text:p text:style-name="блок_5f_текста">The boss wants to see ___ after the meeting.</text:p>
      <text:p text:style-name="List_20_Heading">правильный ответ:</text:p>
      <text:p text:style-name="вариант_5f_ответа">me</text:p>
      <text:p text:style-name="List_20_Heading">ошибки:</text:p>
      <text:p text:style-name="вариант_5f_ошибка">he</text:p>
      <text:p text:style-name="вариант_5f_ошибка">they</text:p>
      <text:p text:style-name="вариант_5f_ошибка">we </text:p>
      <text:p text:style-name="вариант_5f_ошибка">I</text:p>
      <text:p text:style-name="Standard"/>
      <text:h text:style-name="Heading_20_3" text:outline-level="3">Выберите правильный вариант.</text:h>
      <text:p text:style-name="блок_5f_текста">We have an important ____ at 10 a.m. We will discuss the new project.</text:p>
      <text:p text:style-name="List_20_Heading">правильный ответ:</text:p>
      <text:p text:style-name="вариант_5f_ответа">meeting</text:p>
      <text:p text:style-name="List_20_Heading">ошибки:</text:p>
      <text:p text:style-name="вариант_5f_ошибка">resume</text:p>
      <text:p text:style-name="вариант_5f_ошибка">document</text:p>
      <text:p text:style-name="вариант_5f_ошибка">deadline</text:p>
      <text:p text:style-name="вариант_5f_ошибка">file</text:p>
      <text:p text:style-name="Standard"/>
      <text:h text:style-name="Heading_20_3" text:outline-level="3">Выберите правильный вариант.</text:h>
      <text:p text:style-name="блок_5f_текста">I ____ at work last Saturday.</text:p>
      <text:p text:style-name="List_20_Heading">правильный ответ:</text:p>
      <text:p text:style-name="вариант_5f_ответа">was</text:p>
      <text:p text:style-name="List_20_Heading">ошибки:</text:p>
      <text:p text:style-name="вариант_5f_ошибка">are</text:p>
      <text:p text:style-name="вариант_5f_ошибка">were</text:p>
      <text:p text:style-name="вариант_5f_ошибка">is</text:p>
      <text:p text:style-name="вариант_5f_ошибка">am</text:p>
      <text:p text:style-name="Standard"/>
      <text:h text:style-name="P20" text:outline-level="3"><text:soft-page-break/>Выберите правильный вариант.</text:h>
      <text:p text:style-name="блок_5f_текста">I send ____ to our customers every day.</text:p>
      <text:p text:style-name="List_20_Heading">правильный ответ:</text:p>
      <text:p text:style-name="вариант_5f_ответа">emails</text:p>
      <text:p text:style-name="List_20_Heading">ошибки:</text:p>
      <text:p text:style-name="вариант_5f_ошибка">meetings</text:p>
      <text:p text:style-name="вариант_5f_ошибка">deadlines</text:p>
      <text:p text:style-name="вариант_5f_ошибка">bonuses</text:p>
      <text:p text:style-name="вариант_5f_ошибка">phone calls</text:p>
      <text:p text:style-name="P6"/>
      <text:h text:style-name="Heading_20_3" text:outline-level="3">Выберите правильный вариант.</text:h>
      <text:p text:style-name="блок_5f_текста">This is the ____ report I've ever written.</text:p>
      <text:p text:style-name="List_20_Heading">правильный ответ:</text:p>
      <text:p text:style-name="вариант_5f_ответа">longest</text:p>
      <text:p text:style-name="List_20_Heading">ошибки:</text:p>
      <text:p text:style-name="вариант_5f_ошибка">longer</text:p>
      <text:p text:style-name="вариант_5f_ошибка">long</text:p>
      <text:p text:style-name="вариант_5f_ошибка">more long</text:p>
      <text:p text:style-name="вариант_5f_ошибка">most long</text:p>
      <text:p text:style-name="P1"/>
      <text:h text:style-name="Heading_20_3" text:outline-level="3">Выберите правильный вариант.</text:h>
      <text:p text:style-name="блок_5f_текста">She ____ a meeting with the team at 10 o'clock yesterday.</text:p>
      <text:p text:style-name="List_20_Heading">правильный ответ:</text:p>
      <text:p text:style-name="P14">started</text:p>
      <text:p text:style-name="List_20_Heading">ошибки:</text:p>
      <text:p text:style-name="вариант_5f_ошибка">start</text:p>
      <text:p text:style-name="вариант_5f_ошибка">has started</text:p>
      <text:p text:style-name="вариант_5f_ошибка">starting</text:p>
      <text:p text:style-name="вариант_5f_ошибка">starts</text:p>
      <text:p text:style-name="P1"/>
      <text:h text:style-name="Heading_20_3" text:outline-level="3">Выберите правильный вариант.</text:h>
      <text:p text:style-name="блок_5f_текста">He always ____ at 7 o'clock in the morning because his work starts at 8 a.m.</text:p>
      <text:p text:style-name="List_20_Heading">правильный ответ:</text:p>
      <text:p text:style-name="вариант_5f_ответа"><text:soft-page-break/>wakes up</text:p>
      <text:p text:style-name="List_20_Heading">ошибки:</text:p>
      <text:p text:style-name="P7">has dinner</text:p>
      <text:p text:style-name="P7">goes to bed</text:p>
      <text:p text:style-name="P7">falls asleep</text:p>
      <text:p text:style-name="P7">comes home</text:p>
      <text:p text:style-name="P2"/>
      <text:h text:style-name="Heading_20_3" text:outline-level="3">Прочитайте текст и ответьте на вопрос.</text:h>
      <text:p text:style-name="P24">Saving Money for the Future.</text:p>
      <text:p text:style-name="блок_5f_текста">Do you want to save money? Here are some easy ideas.</text:p>
      <text:p text:style-name="P24">Make a plan</text:p>
      <text:p text:style-name="блок_5f_текста">Know how much money you get and how much you spend. Write it down.</text:p>
      <text:p text:style-name="P24">Small amounts help</text:p>
      <text:p text:style-name="блок_5f_текста">Save a little money every week. It is not difficult. For example, save money froma coffe you don't buy.</text:p>
      <text:p text:style-name="P24">Wait before you buy</text:p>
      <text:p text:style-name="блок_5f_текста">See a nice phone? Wait 2 days. Often, you see that you don't need it.</text:p>
      <text:p text:style-name="P24">Have a goal</text:p>
      <text:p text:style-name="блок_5f_текста">Save money for something special, like a holiday or a new bike. It helps you stay happy.</text:p>
      <text:p text:style-name="блок_5f_текста">Saving money is a good habit for a calm future!</text:p>
      <text:h text:style-name="Heading_20_4" text:outline-level="4">What is the text about?</text:h>
      <text:p text:style-name="List_20_Heading">правильный ответ:</text:p>
      <text:p text:style-name="вариант_5f_ответа">Easy ways to save money</text:p>
      <text:p text:style-name="List_20_Heading">ошибки:</text:p>
      <text:p text:style-name="вариант_5f_ошибка">Ways to spend money</text:p>
      <text:p text:style-name="вариант_5f_ошибка">Ways to write a weekly plan</text:p>
      <text:p text:style-name="вариант_5f_ошибка">Ways to choose the best coffe</text:p>
      <text:p text:style-name="вариант_5f_ошибка">Steps of planning a holiday</text:p>
      <text:p text:style-name="P3"/>
      <text:h text:style-name="P22" text:outline-level="3">Прочитайте текст и ответьте на вопрос.</text:h>
      <text:p text:style-name="P25">Saving Money for the Future.</text:p>
      <text:p text:style-name="P26">Do you want to save money? Here are some easy ideas.</text:p>
      <text:p text:style-name="P25">Make a plan</text:p>
      <text:p text:style-name="P26">Know how much money you get and how much you spend. Write it down.</text:p>
      <text:p text:style-name="P25">Small amounts help</text:p>
      <text:p text:style-name="P26">Save a little money every week. It is not difficult. For example, save money froma coffe you don't buy.</text:p>
      <text:p text:style-name="P25">Wait before you buy</text:p>
      <text:p text:style-name="P26">See a nice phone? Wait 2 days. Often, you see that you don't need it.</text:p>
      <text:p text:style-name="P25">Have a goal</text:p>
      <text:p text:style-name="P26"><text:soft-page-break/>Save money for something special, like a holiday or a new bike. It helps you stay happy.</text:p>
      <text:p text:style-name="P26">Saving money is a good habit for a calm future!</text:p>
      <text:h text:style-name="Heading_20_4" text:outline-level="4">What should you do when you see a new phone?</text:h>
      <text:p text:style-name="List_20_Heading">правильный ответ:</text:p>
      <text:p text:style-name="вариант_5f_ответа">Wait for a couple of days</text:p>
      <text:p text:style-name="List_20_Heading">ошибки:</text:p>
      <text:p text:style-name="P8">Wait for a week</text:p>
      <text:p text:style-name="P8">Save money for a year</text:p>
      <text:p text:style-name="P8">Find a cheaper phone</text:p>
      <text:p text:style-name="P8">Buy it now</text:p>
      <text:p text:style-name="P2"/>
      <text:h text:style-name="P22" text:outline-level="3">Прочитайте текст и ответьте на вопрос.</text:h>
      <text:p text:style-name="P25">Saving Money for the Future.</text:p>
      <text:p text:style-name="P26">Do you want to save money? Here are some easy ideas.</text:p>
      <text:p text:style-name="P25">Make a plan</text:p>
      <text:p text:style-name="P26">Know how much money you get and how much you spend. Write it down.</text:p>
      <text:p text:style-name="P25">Small amounts help</text:p>
      <text:p text:style-name="P26">Save a little money every week. It is not difficult. For example, save money froma coffe you don't buy.</text:p>
      <text:p text:style-name="P25">Wait before you buy</text:p>
      <text:p text:style-name="P26">See a nice phone? Wait 2 days. Often, you see that you don't need it.</text:p>
      <text:p text:style-name="P25">Have a goal</text:p>
      <text:p text:style-name="P26">Save money for something special, like a holiday or a new bike. It helps you stay happy.</text:p>
      <text:p text:style-name="P26">Saving money is a good habit for a calm future!</text:p>
      <text:h text:style-name="P23" text:outline-level="4">What is one easy way to save some money every week?</text:h>
      <text:p text:style-name="List_20_Heading">правильный ответ:</text:p>
      <text:p text:style-name="вариант_5f_ответа">Don't buy coffee and save the money</text:p>
      <text:p text:style-name="List_20_Heading">ошибки:</text:p>
      <text:p text:style-name="вариант_5f_ошибка">Don't write a plan</text:p>
      <text:p text:style-name="вариант_5f_ошибка">Don't use your computer </text:p>
      <text:p text:style-name="вариант_5f_ошибка">Don't go on holiday</text:p>
      <text:p text:style-name="вариант_5f_ошибка">Don't buy a bike</text:p>
      <text:p text:style-name="P9"/>
      <text:h text:style-name="Heading_20_3" text:outline-level="3"><text:soft-page-break/>Прослушайте аудио и дайте ответ на вопрос.</text:h>
      <text:h text:style-name="Heading_20_4" text:outline-level="4">What is Tom talking about?</text:h>
      <text:p text:style-name="List_20_Heading"><draw:frame text:anchor-type="paragraph" draw:z-index="0" draw:style-name="gr1" svg:width="4.356cm" svg:height="4.356cm" svg:x="0.086cm" svg:y="0cm"><draw:plugin xlink:href="Media/hh_eng_A1.mp3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</text:p>
      <text:p text:style-name="List_20_Heading">правильный ответ:</text:p>
      <text:p text:style-name="P27"><text:span text:style-name="T2">Good things about working online</text:span></text:p>
      <text:p text:style-name="вариант_5f_ошибка">Working in the office</text:p>
      <text:p text:style-name="вариант_5f_ошибка">Working too much</text:p>
      <text:p text:style-name="вариант_5f_ошибка">Having much free time</text:p>
      <text:p text:style-name="вариант_5f_ошибка">Bad things about working online</text:p>
      <text:p text:style-name="P4"/>
      <text:h text:style-name="Heading_20_3" text:outline-level="3">Прослушайте аудио и дайте ответ на вопрос.</text:h>
      <text:h text:style-name="Heading_20_4" text:outline-level="4">What is Tom's favourite thing about his work?</text:h>
      <text:p text:style-name="List_20_Heading"><draw:frame text:anchor-type="paragraph" draw:z-index="1" draw:style-name="gr1" svg:width="4.356cm" svg:height="4.356cm" svg:x="0.086cm" svg:y="0cm"><draw:plugin xlink:href="Media/hh_eng_A1.mp3" xlink:type="simple" xlink:show="embed" xlink:actuate="onLoad" draw:mime-type="application/vnd.sun.star.media"><draw:param draw:name="Loop" draw:value="false"/><draw:param draw:name="Mute" draw:value="false"/><draw:param draw:name="VolumeDB" draw:value="-5"/></draw:plugin></draw:frame></text:p>
      <text:p text:style-name="List_20_Heading">правильный ответ:</text:p>
      <text:p text:style-name="вариант_5f_ответа">He can work from his kitchen and drink coffee</text:p>
      <text:p text:style-name="List_20_Heading">ошибки:</text:p>
      <text:p text:style-name="P12">He finishes work early every day</text:p>
      <text:p text:style-name="P12">He goes to an office on foot</text:p>
      <text:p text:style-name="P12">He has a lot of meeting</text:p>
      <text:p text:style-name="P12">His working day isn't long</text:p>
      <text:p text:style-name="P18"/>
      <text:p text:style-name="P5"><text:soft-page-break/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 fo:font-size="10pt"/>
    </style:style>
    <style:style style:name="блок_5f_текста" style:display-name="блок_текста" style:family="paragraph">
      <loext:graphic-properties draw:fill="solid" draw:fill-color="#fdf6f1"/>
      <style:paragraph-properties fo:background-color="#fdf6f1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0T20:43:18.138572600</meta:creation-date>
    <dc:date>2026-07-02T10:04:23.518000000</dc:date>
    <meta:editing-duration>PT23H39M41S</meta:editing-duration>
    <meta:editing-cycles>49</meta:editing-cycles>
    <meta:generator>LibreOffice/7.2.4.1$Windows_X86_64 LibreOffice_project/27d75539669ac387bb498e35313b970b7fe9c4f9</meta:generator>
    <meta:document-statistic meta:table-count="0" meta:image-count="0" meta:object-count="0" meta:page-count="6" meta:paragraph-count="141" meta:word-count="684" meta:character-count="3603" meta:non-whitespace-character-count="3058"/>
  </office:meta>
</office:document-meta>
</file>