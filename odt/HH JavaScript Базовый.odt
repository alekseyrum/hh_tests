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7a5bb" officeooo:paragraph-rsid="0007a5bb"/>
    </style:style>
    <style:style style:name="P2" style:family="paragraph" style:parent-style-name="вариант_5f_ошибка">
      <style:text-properties fo:language="en" fo:country="US"/>
    </style:style>
    <style:style style:name="P3" style:family="paragraph" style:parent-style-name="Standard">
      <style:text-properties fo:language="en" fo:country="US" officeooo:rsid="000e2394" officeooo:paragraph-rsid="000e2394"/>
    </style:style>
    <style:style style:name="P4" style:family="paragraph" style:parent-style-name="вариант_5f_ошибка">
      <style:text-properties fo:language="en" fo:country="US" officeooo:paragraph-rsid="0026cd48"/>
    </style:style>
    <style:style style:name="P5" style:family="paragraph" style:parent-style-name="Standard">
      <style:text-properties fo:language="en" fo:country="US" officeooo:rsid="000feebf" officeooo:paragraph-rsid="000feebf"/>
    </style:style>
    <style:style style:name="P6" style:family="paragraph" style:parent-style-name="вариант_5f_ответа">
      <style:text-properties fo:language="en" fo:country="US"/>
    </style:style>
    <style:style style:name="P7" style:family="paragraph" style:parent-style-name="Standard">
      <style:text-properties fo:language="ru" fo:country="RU" officeooo:rsid="000addf8" officeooo:paragraph-rsid="000addf8"/>
    </style:style>
    <style:style style:name="P8" style:family="paragraph" style:parent-style-name="Standard">
      <style:text-properties fo:language="ru" fo:country="RU" officeooo:rsid="000f7017" officeooo:paragraph-rsid="000f7017"/>
    </style:style>
    <style:style style:name="P9" style:family="paragraph" style:parent-style-name="Standard">
      <style:text-properties officeooo:rsid="0026cd48" officeooo:paragraph-rsid="0026cd48"/>
    </style:style>
    <style:style style:name="P10" style:family="paragraph" style:parent-style-name="Standard">
      <style:text-properties officeooo:rsid="0026cd48" officeooo:paragraph-rsid="002c1f57"/>
    </style:style>
    <style:style style:name="P11" style:family="paragraph" style:parent-style-name="вариант_5f_ошибка">
      <style:text-properties officeooo:rsid="0026cd48" officeooo:paragraph-rsid="002c1f57"/>
    </style:style>
    <style:style style:name="P12" style:family="paragraph" style:parent-style-name="вариант_5f_ошибка">
      <style:text-properties officeooo:rsid="0026cd48" officeooo:paragraph-rsid="002e36c2"/>
    </style:style>
    <style:style style:name="P13" style:family="paragraph" style:parent-style-name="List_20_Heading">
      <style:text-properties officeooo:paragraph-rsid="002c1f57"/>
    </style:style>
    <style:style style:name="P14" style:family="paragraph" style:parent-style-name="вариант_5f_ответа">
      <style:text-properties officeooo:paragraph-rsid="002c1f57"/>
    </style:style>
    <style:style style:name="P15" style:family="paragraph" style:parent-style-name="List_20_Heading">
      <style:text-properties officeooo:paragraph-rsid="002e36c2"/>
    </style:style>
    <style:style style:name="P16" style:family="paragraph" style:parent-style-name="вариант_5f_ответа">
      <style:text-properties officeooo:paragraph-rsid="002e36c2"/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Heading_20_3">
      <style:text-properties fo:language="en" fo:country="US"/>
    </style:style>
    <style:style style:name="P19" style:family="paragraph" style:parent-style-name="Heading_20_3" style:list-style-name="">
      <style:text-properties fo:language="ru" fo:country="RU" officeooo:rsid="0012948c" officeooo:paragraph-rsid="0012948c"/>
    </style:style>
    <style:style style:name="P20" style:family="paragraph" style:parent-style-name="Heading_20_3" style:list-style-name="">
      <style:text-properties fo:language="ru" fo:country="RU" officeooo:rsid="0012948c" officeooo:paragraph-rsid="002c1f57"/>
    </style:style>
    <style:style style:name="P21" style:family="paragraph" style:parent-style-name="Heading_20_3" style:list-style-name="">
      <style:text-properties fo:language="ru" fo:country="RU" officeooo:rsid="0012948c" officeooo:paragraph-rsid="002e36c2"/>
    </style:style>
    <style:style style:name="P22" style:family="paragraph" style:parent-style-name="Standard">
      <style:text-properties officeooo:rsid="0026cd48" officeooo:paragraph-rsid="002c1f57"/>
    </style:style>
    <style:style style:name="P23" style:family="paragraph" style:parent-style-name="вариант_5f_ответа">
      <style:text-properties officeooo:rsid="00334bed" officeooo:paragraph-rsid="00334bed"/>
    </style:style>
    <style:style style:name="P24" style:family="paragraph" style:parent-style-name="вариант_5f_ответа">
      <style:text-properties officeooo:rsid="00338d7a" officeooo:paragraph-rsid="00338d7a"/>
    </style:style>
    <style:style style:name="P25" style:family="paragraph" style:parent-style-name="вариант_5f_ответа">
      <style:text-properties officeooo:rsid="0038f441" officeooo:paragraph-rsid="0038f441"/>
    </style:style>
    <style:style style:name="P26" style:family="paragraph" style:parent-style-name="вариант_5f_ошибка">
      <style:text-properties fo:language="ru" fo:country="RU"/>
    </style:style>
    <style:style style:name="P27" style:family="paragraph" style:parent-style-name="вариант_5f_ошибка">
      <style:text-properties fo:language="en" fo:country="US"/>
    </style:style>
    <style:style style:name="P28" style:family="paragraph" style:parent-style-name="вариант_5f_ошибка">
      <style:text-properties officeooo:rsid="0026cd48" officeooo:paragraph-rsid="002c1f57"/>
    </style:style>
    <style:style style:name="T1" style:family="text">
      <style:text-properties fo:language="en" fo:country="US" officeooo:rsid="0025ca4b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351b35"/>
    </style:style>
    <style:style style:name="T4" style:family="text">
      <style:text-properties officeooo:rsid="0030b18d"/>
    </style:style>
    <style:style style:name="T5" style:family="text">
      <style:text-properties officeooo:rsid="00325efe"/>
    </style:style>
    <style:style style:name="T6" style:family="text">
      <style:text-properties officeooo:rsid="00351b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pan text:style-name="T1">JavaScript</text:span> <text:span text:style-name="T4">Базовый</text:span> уровень</text:h>
      <text:h text:style-name="Heading_20_3" text:outline-level="3">Какой тип данных у переменной, объявленной так: let salary = 40000; ?</text:h>
      <text:p text:style-name="List_20_Heading">правильный ответ:</text:p>
      <text:p text:style-name="вариант_5f_ответа">number</text:p>
      <text:p text:style-name="List_20_Heading">ошибки:</text:p>
      <text:p text:style-name="вариант_5f_ошибка">array</text:p>
      <text:p text:style-name="вариант_5f_ошибка">string</text:p>
      <text:p text:style-name="вариант_5f_ошибка">boolean</text:p>
      <text:p text:style-name="вариант_5f_ошибка">object</text:p>
      <text:p text:style-name="Standard"/>
      <text:h text:style-name="P18" text:outline-level="3">Что произойдет при выполнении следующего кода?</text:h>
      <text:p text:style-name="блок_5f_кода"><text:span text:style-name="T2">console</text:span>.log(a);</text:p>
      <text:p text:style-name="блок_5f_кода"><text:span text:style-name="T2">var</text:span> a = 5;</text:p>
      <text:p text:style-name="List_20_Heading">правильный ответ:</text:p>
      <text:p text:style-name="вариант_5f_ответа">В консоли будет выведено undefined</text:p>
      <text:p text:style-name="List_20_Heading">ошибки:</text:p>
      <text:p text:style-name="вариант_5f_ошибка">В консоли будет ошибка ReferenceError</text:p>
      <text:p text:style-name="вариант_5f_ошибка">В консоли будет выведено 5</text:p>
      <text:p text:style-name="вариант_5f_ошибка">Код не выполнится</text:p>
      <text:p text:style-name="вариант_5f_ошибка">В консоли будет выведено null</text:p>
      <text:p text:style-name="P1"/>
      <text:h text:style-name="Heading_20_3" text:outline-level="3">Вы разрабатываете систему онлайн-тестирования. Требуется временно хранить ответы пользователя, чтобы при случайном обновлении страницы он мог продолжить с того же места. Данные должны удаляться после завершения теста. Какое хранилище данных лучше всего подойдет?</text:h>
      <text:p text:style-name="List_20_Heading">правильный ответ:</text:p>
      <text:p text:style-name="вариант_5f_ответа">SessionStorage</text:p>
      <text:p text:style-name="List_20_Heading">ошибки:</text:p>
      <text:p text:style-name="вариант_5f_ошибка">IndexedDB</text:p>
      <text:p text:style-name="вариант_5f_ошибка">JSON-файл</text:p>
      <text:p text:style-name="вариант_5f_ошибка"><text:soft-page-break/>Server-side session storage</text:p>
      <text:p text:style-name="вариант_5f_ошибка">Cookies</text:p>
      <text:p text:style-name="P7"/>
      <text:h text:style-name="Heading_20_3" text:outline-level="3">Какое значение примет пременная result после выполнения следующего кода?</text:h>
      <text:p text:style-name="блок_5f_кода"><text:span text:style-name="T2">const</text:span> x = 8;</text:p>
      <text:p text:style-name="блок_5f_кода"><text:span text:style-name="T2">const</text:span> y = 3;</text:p>
      <text:p text:style-name="блок_5f_кода"><text:span text:style-name="T2">const</text:span> result = (x % y) + Math.ceil(x / y);</text:p>
      <text:p text:style-name="List_20_Heading">правильный ответ:</text:p>
      <text:p text:style-name="P23">5</text:p>
      <text:p text:style-name="List_20_Heading">ошибки:</text:p>
      <text:p text:style-name="P26">6 </text:p>
      <text:p text:style-name="P26">7</text:p>
      <text:p text:style-name="P26">4 </text:p>
      <text:p text:style-name="P26">3</text:p>
      <text:p text:style-name="P7"/>
      <text:h text:style-name="Heading_20_3" text:outline-level="3">Вам нужно инвертировать логическое значение isVisible. Какой оператор используете?</text:h>
      <text:p text:style-name="List_20_Heading">правильный ответ:</text:p>
      <text:p text:style-name="P24">!</text:p>
      <text:p text:style-name="List_20_Heading">ошибки:</text:p>
      <text:p text:style-name="вариант_5f_ошибка">||</text:p>
      <text:p text:style-name="вариант_5f_ошибка">&amp;&amp;</text:p>
      <text:p text:style-name="вариант_5f_ошибка">&amp;</text:p>
      <text:p text:style-name="вариант_5f_ошибка">^</text:p>
      <text:p text:style-name="P7"/>
      <text:h text:style-name="Heading_20_3" text:outline-level="3">Какое из выражений присваивает переменной z остаток от деления x на y?</text:h>
      <text:p text:style-name="List_20_Heading">правильный ответ:</text:p>
      <text:p text:style-name="вариант_5f_ответа">z = x % y</text:p>
      <text:p text:style-name="List_20_Heading">ошибки:</text:p>
      <text:p text:style-name="P2">z = x / y</text:p>
      <text:p text:style-name="P2">z = x * y</text:p>
      <text:p text:style-name="P2"><text:soft-page-break/>z = x // y</text:p>
      <text:p text:style-name="P2">z = x - y</text:p>
      <text:p text:style-name="Standard"/>
      <text:h text:style-name="Heading_20_3" text:outline-level="3">Какой цикл выполняется хотя бы один раз даже при ложном условии? </text:h>
      <text:p text:style-name="List_20_Heading">правильный ответ:</text:p>
      <text:p text:style-name="вариант_5f_ответа">do-while</text:p>
      <text:p text:style-name="List_20_Heading">ошибки:</text:p>
      <text:p text:style-name="вариант_5f_ошибка">forever</text:p>
      <text:p text:style-name="вариант_5f_ошибка">until</text:p>
      <text:p text:style-name="вариант_5f_ошибка">for</text:p>
      <text:p text:style-name="вариант_5f_ошибка">while </text:p>
      <text:p text:style-name="P3"/>
      <text:h text:style-name="Heading_20_3" text:outline-level="3">Вы разрабатываете алгоритм обработки данных, в котором:</text:h>
      <text:h text:style-name="Heading_20_3" text:outline-level="3">-Требуется выполнить код определенное количество раз.</text:h>
      <text:h text:style-name="Heading_20_3" text:outline-level="3">-Итерации происходят по заранее известному диапазону значений.</text:h>
      <text:h text:style-name="Heading_20_3" text:outline-level="3">-Условие выхода основано на количестве повторений.</text:h>
      <text:h text:style-name="Heading_20_3" text:outline-level="3">Какой оператор будет оптимальным?</text:h>
      <text:p text:style-name="List_20_Heading">правильный ответ:</text:p>
      <text:p text:style-name="P6">for</text:p>
      <text:p text:style-name="List_20_Heading">ошибки:</text:p>
      <text:p text:style-name="P2">do-while</text:p>
      <text:p text:style-name="P2">switch-case</text:p>
      <text:p text:style-name="P2">while </text:p>
      <text:p text:style-name="P2">if-else</text:p>
      <text:p text:style-name="P8"/>
      <text:h text:style-name="P18" text:outline-level="3">Какое утверждение верно о функциях и их области видимости в этом коде?</text:h>
      <text:p text:style-name="блок_5f_кода"><text:span text:style-name="T2">let</text:span> value = 100;</text:p>
      <text:p text:style-name="блок_5f_кода"><text:span text:style-name="T2">function</text:span> first() {</text:p>
      <text:p text:style-name="блок_5f_кода"><text:span text:style-name="T3"><text:tab/></text:span><text:span text:style-name="T2">let</text:span> value = 200;</text:p>
      <text:p text:style-name="блок_5f_кода"><text:soft-page-break/><text:span text:style-name="T3"><text:tab/></text:span><text:span text:style-name="T2">function</text:span> second() {</text:p>
      <text:p text:style-name="блок_5f_кода"><text:span text:style-name="T3"><text:tab/></text:span><text:span text:style-name="T2">return</text:span> value;<text:tab/></text:p>
      <text:p text:style-name="блок_5f_кода"><text:span text:style-name="T6"><text:tab/></text:span>}<text:tab/></text:p>
      <text:p text:style-name="блок_5f_кода"><text:span text:style-name="T3"><text:tab/></text:span><text:span text:style-name="T2">return</text:span> second();</text:p>
      <text:p text:style-name="блок_5f_кода">}</text:p>
      <text:p text:style-name="List_20_Heading">правильный ответ:</text:p>
      <text:p text:style-name="вариант_5f_ответа">second вернет 200</text:p>
      <text:p text:style-name="List_20_Heading">ошибки:</text:p>
      <text:p text:style-name="вариант_5f_ошибка">second вернет 0</text:p>
      <text:p text:style-name="вариант_5f_ошибка">second вернет undefined</text:p>
      <text:p text:style-name="вариант_5f_ошибка">Ошибка</text:p>
      <text:p text:style-name="вариант_5f_ошибка">second вернет 100</text:p>
      <text:p text:style-name="P5"/>
      <text:h text:style-name="Heading_20_3" text:outline-level="3">Какое значение будет выведено в консоль при выполнении кода?</text:h>
      <text:p text:style-name="блок_5f_кода"><text:span text:style-name="T2">function</text:span> example(){</text:p>
      <text:p text:style-name="блок_5f_кода"><text:tab/><text:span text:style-name="T2">console</text:span>.log(value);</text:p>
      <text:p text:style-name="блок_5f_кода"><text:tab/><text:span text:style-name="T2">let</text:span> value = 5;</text:p>
      <text:p text:style-name="блок_5f_кода">}</text:p>
      <text:p text:style-name="блок_5f_кода">example();</text:p>
      <text:p text:style-name="List_20_Heading">правильный ответ:</text:p>
      <text:p text:style-name="вариант_5f_ответа">Ошибка: Cannot access 'value' before initialization</text:p>
      <text:p text:style-name="List_20_Heading">ошибки:</text:p>
      <text:p text:style-name="вариант_5f_ошибка">5</text:p>
      <text:p text:style-name="вариант_5f_ошибка">undefined</text:p>
      <text:p text:style-name="вариант_5f_ошибка">null</text:p>
      <text:p text:style-name="вариант_5f_ошибка">NaN</text:p>
      <text:p text:style-name="Standard"/>
      <text:h text:style-name="Heading_20_3" text:outline-level="3">Какие значения может содержать переменная типа string в JavaScript?</text:h>
      <text:p text:style-name="List_20_Heading">правильный ответ:</text:p>
      <text:p text:style-name="вариант_5f_ответа">Последовательности символов, заключенные в кавычки</text:p>
      <text:p text:style-name="List_20_Heading">ошибки:</text:p>
      <text:p text:style-name="вариант_5f_ошибка">Только латинские буквы и цифры</text:p>
      <text:p text:style-name="вариант_5f_ошибка">Только последовательности букв</text:p>
      <text:p text:style-name="вариант_5f_ошибка">Только одиночные символы</text:p>
      <text:p text:style-name="вариант_5f_ошибка"><text:soft-page-break/>Только значения, заключенные в двойные кавычки</text:p>
      <text:p text:style-name="Standard"/>
      <text:h text:style-name="P19" text:outline-level="3">Вы разрабатываете веб-приложение для бронирования билетов в кинотеатр. Пользователь выбирает места и заполняет данные, но перед оплатой может случайно закрыть вкладку или перезагрузить страницу. Какое хранилище данных лучше использовать, чтобы информация о бронировании сохранялась только во время текущей работы с сайтом?</text:h>
      <text:p text:style-name="List_20_Heading">правильный ответ:</text:p>
      <text:p text:style-name="вариант_5f_ответа">SessionStorage</text:p>
      <text:p text:style-name="List_20_Heading">ошибки:</text:p>
      <text:p text:style-name="вариант_5f_ошибка">In-memory object</text:p>
      <text:p text:style-name="вариант_5f_ошибка">JSON-файл</text:p>
      <text:p text:style-name="вариант_5f_ошибка">куки(cookies)</text:p>
      <text:p text:style-name="вариант_5f_ошибка">IndexedDB</text:p>
      <text:p text:style-name="P9"/>
      <text:h text:style-name="P20" text:outline-level="3">Что делает оператор === в JavaScript?</text:h>
      <text:p text:style-name="P13">правильный ответ:</text:p>
      <text:p text:style-name="P14">Сравнивает значения и типы на равенство</text:p>
      <text:p text:style-name="P13">ошибки:</text:p>
      <text:p text:style-name="P11">Сравнивает больше или меньше</text:p>
      <text:p text:style-name="P11">Инкрементирует переменную</text:p>
      <text:p text:style-name="P11">Сравнивает значения без учета типа</text:p>
      <text:p text:style-name="P11">Присваивает значение переменной</text:p>
      <text:p text:style-name="P9"/>
      <text:h text:style-name="P20" text:outline-level="3">Какой результат выполнения выражения !(5 &gt; 6) ?</text:h>
      <text:p text:style-name="P13">правильный ответ:</text:p>
      <text:p text:style-name="P14">true</text:p>
      <text:p text:style-name="P13">ошибки:</text:p>
      <text:p text:style-name="P11">undefined</text:p>
      <text:p text:style-name="P11">null</text:p>
      <text:p text:style-name="P11">false</text:p>
      <text:p text:style-name="P11"><text:soft-page-break/>5</text:p>
      <text:p text:style-name="P10"/>
      <text:h text:style-name="P20" text:outline-level="3">Что произойдет при выполнении следующего кода?</text:h>
      <text:p text:style-name="блок_5f_кода"><text:span text:style-name="T2">const</text:span> b = 5;</text:p>
      <text:p text:style-name="блок_5f_кода"><text:span text:style-name="T2">if</text:span> (b &gt; 0 || b &lt; -10) {</text:p>
      <text:p text:style-name="блок_5f_кода"><text:tab/><text:span text:style-name="T2">console</text:span>.log("b положительное или меньше -10");</text:p>
      <text:p text:style-name="блок_5f_кода">} <text:span text:style-name="T2">else</text:span> {</text:p>
      <text:p text:style-name="блок_5f_кода"><text:tab/><text:span text:style-name="T2">console</text:span>.log("b не соответствует условиям");</text:p>
      <text:p text:style-name="блок_5f_кода">}</text:p>
      <text:p text:style-name="P13">правильный ответ:</text:p>
      <text:p text:style-name="P14">В консоль будет выведено "b положительное или меньше -10"</text:p>
      <text:p text:style-name="P13">ошибки:</text:p>
      <text:p text:style-name="P11">Будет выброшена ошибка синтаксиса</text:p>
      <text:p text:style-name="P11">Код не выполнится из-за неверного использования if</text:p>
      <text:p text:style-name="P11">Код зациклится и не завершится</text:p>
      <text:p text:style-name="P11">В консоль будет выведено "b не соответствует условиям"</text:p>
      <text:p text:style-name="P10"/>
      <text:h text:style-name="P20" text:outline-level="3">Что выведет данный код в консоль?</text:h>
      <text:p text:style-name="блок_5f_кода"><text:span text:style-name="T2">function</text:span> outer() {</text:p>
      <text:p text:style-name="блок_5f_кода"><text:tab/><text:span text:style-name="T2">var</text:span> a = 5;</text:p>
      <text:p text:style-name="блок_5f_кода"><text:tab/><text:span text:style-name="T2">return</text:span> <text:span text:style-name="T2">function</text:span> inner() {</text:p>
      <text:p text:style-name="блок_5f_кода"><text:tab/><text:tab/><text:span text:style-name="T2">return</text:span> a;</text:p>
      <text:p text:style-name="блок_5f_кода"><text:tab/>}</text:p>
      <text:p text:style-name="блок_5f_кода">}</text:p>
      <text:p text:style-name="блок_5f_кода"><text:span text:style-name="T2">const</text:span> getA = oute();</text:p>
      <text:p text:style-name="блок_5f_кода"><text:span text:style-name="T2">console</text:span>.log( getA());</text:p>
      <text:p text:style-name="P13">правильный ответ:</text:p>
      <text:p text:style-name="P25">5</text:p>
      <text:p text:style-name="P13">ошибки:</text:p>
      <text:p text:style-name="P11">0</text:p>
      <text:p text:style-name="P11">undefined</text:p>
      <text:p text:style-name="P11">Ошибка</text:p>
      <text:p text:style-name="P11">null</text:p>
      <text:p text:style-name="P10"/>
      <text:h text:style-name="P20" text:outline-level="3">Какое значение будет выведено в консоль при выполнении кода?</text:h>
      <text:p text:style-name="блок_5f_кода"><text:span text:style-name="T2">function</text:span> testScope() {</text:p>
      <text:p text:style-name="блок_5f_кода"><text:tab/><text:span text:style-name="T2">var</text:span> x =7;</text:p>
      <text:p text:style-name="блок_5f_кода"><text:tab/><text:span text:style-name="T2">if</text:span> (true) {</text:p>
      <text:p text:style-name="блок_5f_кода"><text:tab/><text:tab/><text:span text:style-name="T2">var</text:span> x = 20;</text:p>
      <text:p text:style-name="блок_5f_кода"><text:soft-page-break/><text:tab/><text:tab/><text:span text:style-name="T2">console</text:span>.log(x);</text:p>
      <text:p text:style-name="блок_5f_кода"><text:tab/>}</text:p>
      <text:p text:style-name="блок_5f_кода"><text:tab/><text:span text:style-name="T2">console</text:span>.log(x);</text:p>
      <text:p text:style-name="блок_5f_кода">}</text:p>
      <text:p text:style-name="блок_5f_кода">testScope();</text:p>
      <text:p text:style-name="P13">правильный ответ:</text:p>
      <text:p text:style-name="P14">20 20</text:p>
      <text:p text:style-name="P13">ошибки:</text:p>
      <text:p text:style-name="P11">77</text:p>
      <text:p text:style-name="P11">Ошибка: x не определена </text:p>
      <text:p text:style-name="P11">20 7</text:p>
      <text:p text:style-name="P11">7 20</text:p>
      <text:p text:style-name="P10"/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вариант_5f_ответа" style:display-name="вариант_ответа" style:family="paragraph" style:parent-style-name="Standard" style:master-page-name="">
      <style:paragraph-properties fo:margin-top="0.101cm" fo:margin-bottom="0.101cm" style:contextual-spacing="false" fo:line-height="100%" style:page-number="auto" fo:padding="0.199cm" fo:border="0.06pt solid #000000" style:join-border="false">
        <style:tab-stops/>
      </style:paragraph-properties>
      <style:text-properties style:font-name="Lucida Console" fo:font-family="'Lucida Console'" style:font-style-name="Обычный" style:font-family-generic="modern" style:font-pitch="fixe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блок_5f_кода" style:display-name="блок_кода" style:family="paragraph" style:master-page-name="">
      <loext:graphic-properties draw:fill="solid" draw:fill-color="#dee7e5"/>
      <style:paragraph-properties style:page-number="auto" fo:background-color="#dee7e5">
        <style:tab-stops/>
      </style:paragraph-properties>
      <style:text-properties style:font-name="Courier New" fo:font-family="'Courier New'" style:font-style-name="Обычный" style:font-family-generic="modern" style:font-pitch="fixed" fo:font-size="11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вариант_5f_ошибка" style:display-name="вариант_ошибка" style:family="paragraph" style:parent-style-name="вариант_5f_ответа" style:master-page-name="">
      <style:paragraph-properties style:page-number="auto" fo:padding="0.199cm" fo:border="0.06pt dotted #666666">
        <style:tab-stops/>
      </style:paragraph-properties>
      <style:text-properties fo:color="#999999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30T20:43:18.138572600</meta:creation-date>
    <dc:date>2026-06-30T18:59:36.026000000</dc:date>
    <meta:editing-duration>PT20H17M7S</meta:editing-duration>
    <meta:editing-cycles>45</meta:editing-cycles>
    <meta:generator>LibreOffice/7.2.4.1$Windows_X86_64 LibreOffice_project/27d75539669ac387bb498e35313b970b7fe9c4f9</meta:generator>
    <meta:document-statistic meta:table-count="0" meta:image-count="0" meta:object-count="0" meta:page-count="7" meta:paragraph-count="182" meta:word-count="604" meta:character-count="3922" meta:non-whitespace-character-count="3470"/>
  </office:meta>
</office:document-meta>
</file>