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5bb" officeooo:paragraph-rsid="0007a5bb"/>
    </style:style>
    <style:style style:name="P2" style:family="paragraph" style:parent-style-name="Standard">
      <style:text-properties fo:language="en" fo:country="US" officeooo:rsid="000e2394" officeooo:paragraph-rsid="000e2394"/>
    </style:style>
    <style:style style:name="P3" style:family="paragraph" style:parent-style-name="Standard">
      <style:text-properties fo:language="en" fo:country="US" officeooo:rsid="000feebf" officeooo:paragraph-rsid="000feebf"/>
    </style:style>
    <style:style style:name="P4" style:family="paragraph" style:parent-style-name="Standard">
      <style:text-properties fo:language="ru" fo:country="RU" officeooo:rsid="000addf8" officeooo:paragraph-rsid="000addf8"/>
    </style:style>
    <style:style style:name="P5" style:family="paragraph" style:parent-style-name="Standard">
      <style:text-properties fo:language="ru" fo:country="RU" officeooo:rsid="000f7017" officeooo:paragraph-rsid="000f7017"/>
    </style:style>
    <style:style style:name="P6" style:family="paragraph" style:parent-style-name="Standard">
      <style:text-properties officeooo:rsid="0014a052" officeooo:paragraph-rsid="0014a052"/>
    </style:style>
    <style:style style:name="P7" style:family="paragraph" style:parent-style-name="Standard">
      <style:text-properties fo:language="ru" fo:country="RU" officeooo:rsid="0014a052" officeooo:paragraph-rsid="0014a052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 fo:break-before="page"/>
      <style:text-properties fo:color="#c9211e" loext:opacity="100%"/>
    </style:style>
    <style:style style:name="P10" style:family="paragraph" style:parent-style-name="Heading_20_3" style:list-style-name="">
      <style:text-properties fo:language="ru" fo:country="RU" officeooo:rsid="0012948c" officeooo:paragraph-rsid="0012948c"/>
    </style:style>
    <style:style style:name="P11" style:family="paragraph" style:parent-style-name="Text_20_body" style:list-style-name="">
      <style:text-properties fo:language="ru" fo:country="RU" officeooo:rsid="0014a052" officeooo:paragraph-rsid="0012948c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7825e"/>
    </style:style>
    <style:style style:name="T5" style:family="text">
      <style:text-properties fo:language="en" fo:country="US" officeooo:rsid="0007a5bb"/>
    </style:style>
    <style:style style:name="T6" style:family="text">
      <style:text-properties fo:color="#ff5429" loext:opacity="100%"/>
    </style:style>
    <style:style style:name="T7" style:family="text">
      <style:text-properties fo:language="ru" fo:country="RU"/>
    </style:style>
    <style:style style:name="T8" style:family="text">
      <style:text-properties officeooo:rsid="000d13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С++ Базовый уровень</text:h>
      <text:h text:style-name="Heading_20_3" text:outline-level="3">Какой из приведенных циклов всегда выполнится хотя бы один раз?</text:h>
      <text:p text:style-name="List_20_Heading">правильный ответ:</text:p>
      <text:p text:style-name="вариант_5f_ответа"><text:span text:style-name="T1">while</text:span> (condition) { ... }</text:p>
      <text:p text:style-name="List_20_Heading">ошибки:</text:p>
      <text:p text:style-name="вариант_5f_ошибка"><text:span text:style-name="T1">do</text:span> { ... } <text:span text:style-name="T1">while</text:span> (condition)</text:p>
      <text:p text:style-name="вариант_5f_ошибка"><text:span text:style-name="T1">for</text:span> (int i = x; i &lt; 10; ++i) { ... }</text:p>
      <text:p text:style-name="вариант_5f_ошибка"><text:span text:style-name="T3">f</text:span><text:span text:style-name="T4">o</text:span><text:span text:style-name="T3">reach</text:span> (auto x:p) { ... }</text:p>
      <text:p text:style-name="вариант_5f_ошибка">loop { ... } until (condition)</text:p>
      <text:p text:style-name="Standard"/>
      <text:h text:style-name="Heading_20_3" text:outline-level="3">Как правильно считать строку с пробелами из консоли в переменную <text:span text:style-name="T3">std::string</text:span><text:span text:style-name="T5"> str</text:span><text:span text:style-name="T3">?</text:span></text:h>
      <text:p text:style-name="List_20_Heading">правильный ответ:</text:p>
      <text:p text:style-name="вариант_5f_ответа">std::<text:span text:style-name="T6">getline</text:span>(std::cin, str)</text:p>
      <text:p text:style-name="List_20_Heading">ошибки:</text:p>
      <text:p text:style-name="вариант_5f_ошибка">std::cin &gt;&gt; str</text:p>
      <text:p text:style-name="вариант_5f_ошибка">std::cin.<text:span text:style-name="T6">read</text:span>(std::cin, 100)</text:p>
      <text:p text:style-name="вариант_5f_ошибка"><text:span text:style-name="T6">scanf</text:span>("%s", &amp;str)</text:p>
      <text:p text:style-name="вариант_5f_ошибка">std::cin.<text:span text:style-name="T6">getch</text:span>(str,100)</text:p>
      <text:p text:style-name="P1"/>
      <text:h text:style-name="Heading_20_3" text:outline-level="3">Какое утверждение верно для данной функции?</text:h>
      <text:p text:style-name="блок_5f_кода"><text:span text:style-name="T1">int</text:span> f(<text:span text:style-name="T1">int</text:span> p) {</text:p>
      <text:p text:style-name="блок_5f_кода"><text:tab/><text:span text:style-name="T1">int</text:span> i = 25;</text:p>
      <text:p text:style-name="блок_5f_кода"><text:tab/><text:span text:style-name="T1">if</text:span> (i == p) {</text:p>
      <text:p text:style-name="блок_5f_кода"><text:tab/><text:tab/>std::cout &lt;&lt; "cpp\n";</text:p>
      <text:p text:style-name="блок_5f_кода"><text:tab/><text:tab/><text:span text:style-name="T1">int</text:span> k = f(p);</text:p>
      <text:p text:style-name="блок_5f_кода"><text:tab/><text:tab/><text:span text:style-name="T1">return</text:span> -1;</text:p>
      <text:p text:style-name="блок_5f_кода"><text:tab/>} <text:span text:style-name="T1">else</text:span> {</text:p>
      <text:p text:style-name="блок_5f_кода"><text:tab/><text:tab/><text:span text:style-name="T1">return</text:span> 0;</text:p>
      <text:p text:style-name="блок_5f_кода"><text:tab/>}</text:p>
      <text:p text:style-name="блок_5f_кода">}</text:p>
      <text:p text:style-name="List_20_Heading">правильный ответ:</text:p>
      <text:p text:style-name="вариант_5f_ответа">Функция выводит «срр» бесконечно, когда р = 25, пока стек не заполнится</text:p>
      <text:p text:style-name="List_20_Heading">ошибки:</text:p>
      <text:p text:style-name="вариант_5f_ошибка"><text:soft-page-break/>Функция возвращает ноль для всех значений р, меньших 25</text:p>
      <text:p text:style-name="вариант_5f_ошибка">Функция возвращает ноль для всех значений р, больших 25</text:p>
      <text:p text:style-name="вариант_5f_ошибка">Функция возвращает -1, когда р = 25</text:p>
      <text:p text:style-name="вариант_5f_ошибка">Функция выводит «срр» бесконечно для всех значений р, кроме 25, пока стек не заполнится</text:p>
      <text:p text:style-name="P4"/>
      <text:h text:style-name="Heading_20_3" text:outline-level="3">Разница между вектором <text:span text:style-name="T3">std::vector </text:span>и очередью <text:span text:style-name="T3">std::deque </text:span>заключается в том, что:</text:h>
      <text:p text:style-name="List_20_Heading">правильный ответ:</text:p>
      <text:p text:style-name="вариант_5f_ответа">Очередь позволяет быстро вставлять элементы как в конец, так и в начало контейнера</text:p>
      <text:p text:style-name="List_20_Heading">ошибки:</text:p>
      <text:p text:style-name="вариант_5f_ошибка">std::vector <text:span text:style-name="T7">никогда не выделяет динамическую память</text:span></text:p>
      <text:p text:style-name="вариант_5f_ошибка"><text:span text:style-name="T7">Вектор предназначен исключительно для элементов типа </text:span><text:span text:style-name="T1">bool</text:span></text:p>
      <text:p text:style-name="вариант_5f_ошибка">std::deque <text:span text:style-name="T7">позволяет быстро обращаться к элементу по его номеру</text:span></text:p>
      <text:p text:style-name="вариант_5f_ошибка">Они не отличаются друг от друга</text:p>
      <text:p text:style-name="P4"/>
      <text:h text:style-name="Heading_20_3" text:outline-level="3">У банка есть таблица с данными, где ключ — это номер счета, а данные — имя владельца. Банку необходимо часто определять имя клиента по номеру счета, а также добавлять и удалять данные о новых пользователях. Какой <text:span text:style-name="T3">STL-</text:span><text:span text:style-name="T8">контейнер будет эффективен для хранения таких данных?</text:span></text:h>
      <text:p text:style-name="List_20_Heading">правильный ответ:</text:p>
      <text:p text:style-name="вариант_5f_ответа">std::unordered_map</text:p>
      <text:p text:style-name="List_20_Heading">ошибки:</text:p>
      <text:p text:style-name="вариант_5f_ошибка">std::vector</text:p>
      <text:p text:style-name="вариант_5f_ошибка">std::list</text:p>
      <text:p text:style-name="вариант_5f_ошибка">std::queue</text:p>
      <text:p text:style-name="вариант_5f_ошибка">std::unordered_set</text:p>
      <text:p text:style-name="P4"/>
      <text:h text:style-name="Heading_20_3" text:outline-level="3">Какой механизм позволяет вызывать метод производного класса через указатель на базовый?</text:h>
      <text:p text:style-name="List_20_Heading">правильный ответ:</text:p>
      <text:p text:style-name="вариант_5f_ответа"><text:soft-page-break/>Динамический полиморфизм (виртуальные функции)</text:p>
      <text:p text:style-name="List_20_Heading">ошибки:</text:p>
      <text:p text:style-name="вариант_5f_ошибка">Статическое связывание</text:p>
      <text:p text:style-name="вариант_5f_ошибка">Множественное наследование</text:p>
      <text:p text:style-name="вариант_5f_ошибка">Шаблоны (<text:span text:style-name="T3">templates)</text:span></text:p>
      <text:p text:style-name="вариант_5f_ошибка">Перегрузка функций (<text:span text:style-name="T3">function overloading)</text:span></text:p>
      <text:p text:style-name="Standard"/>
      <text:h text:style-name="Heading_20_3" text:outline-level="3">Как нужно объявить переменную <text:span text:style-name="T3">count </text:span>на месте пропуска в классе <text:span text:style-name="T3">Player, </text:span>чтобы на экран было выведено 2?</text:h>
      <text:p text:style-name="блок_5f_кода">#<text:span text:style-name="T1">include</text:span> &lt;iostream&gt;</text:p>
      <text:p text:style-name="блок_5f_кода"><text:span text:style-name="T1">using</text:span> <text:span text:style-name="T1">namespace</text:span> std;</text:p>
      <text:p text:style-name="блок_5f_кода"><text:span text:style-name="T1">class</text:span> Player {</text:p>
      <text:p text:style-name="блок_5f_кода"><text:span text:style-name="T1">private</text:span>:</text:p>
      <text:p text:style-name="блок_5f_кода"><text:tab/>_____</text:p>
      <text:p text:style-name="блок_5f_кода"><text:span text:style-name="T1">public</text:span>:</text:p>
      <text:p text:style-name="блок_5f_кода"><text:tab/><text:span text:style-name="T1">Player</text:span>() {</text:p>
      <text:p text:style-name="блок_5f_кода"><text:tab/><text:tab/>count++;</text:p>
      <text:p text:style-name="блок_5f_кода"><text:tab/>}</text:p>
      <text:p text:style-name="блок_5f_кода"><text:tab/>~<text:span text:style-name="T1">Player</text:span>() {</text:p>
      <text:p text:style-name="блок_5f_кода"><text:tab/><text:tab/>count--;</text:p>
      <text:p text:style-name="блок_5f_кода"><text:tab/>}</text:p>
      <text:p text:style-name="блок_5f_кода"><text:tab/><text:span text:style-name="T1">static</text:span> <text:span text:style-name="T1">int</text:span> getCount() {</text:p>
      <text:p text:style-name="блок_5f_кода"><text:tab/><text:tab/><text:span text:style-name="T1">return</text:span> count;</text:p>
      <text:p text:style-name="блок_5f_кода"><text:tab/>}</text:p>
      <text:p text:style-name="блок_5f_кода">};</text:p>
      <text:p text:style-name="блок_5f_кода"><text:span text:style-name="T1">int</text:span> Player::count = 0;</text:p>
      <text:p text:style-name="блок_5f_кода"><text:span text:style-name="T1">int</text:span> main() {</text:p>
      <text:p text:style-name="блок_5f_кода"><text:tab/>Player p1, p2;</text:p>
      <text:p text:style-name="блок_5f_кода"><text:tab/>cout &lt;&lt; Player::<text:span text:style-name="T1">getCount</text:span>() &lt;&lt; endl;</text:p>
      <text:p text:style-name="блок_5f_кода"><text:tab/><text:span text:style-name="T1">return</text:span> 0; </text:p>
      <text:p text:style-name="блок_5f_кода">}</text:p>
      <text:p text:style-name="List_20_Heading">правильный ответ:</text:p>
      <text:p text:style-name="вариант_5f_ответа"><text:span text:style-name="T1">static int</text:span> count</text:p>
      <text:p text:style-name="List_20_Heading">ошибки:</text:p>
      <text:p text:style-name="вариант_5f_ошибка"><text:span text:style-name="T1">int static</text:span> count</text:p>
      <text:p text:style-name="вариант_5f_ошибка"><text:span text:style-name="T1">friend int</text:span> count</text:p>
      <text:p text:style-name="вариант_5f_ошибка"><text:span text:style-name="T1">int</text:span> count </text:p>
      <text:p text:style-name="вариант_5f_ошибка"><text:span text:style-name="T1">int</text:span> cost count</text:p>
      <text:p text:style-name="P2"/>
      <text:h text:style-name="Heading_20_3" text:outline-level="3">Для чего нужно <text:span text:style-name="T3">virtual </text:span>наследование в данном коде?</text:h>
      <text:p text:style-name="блок_5f_кода"><text:span text:style-name="T1">class</text:span> A {</text:p>
      <text:p text:style-name="блок_5f_кода"><text:soft-page-break/><text:span text:style-name="T1">public</text:span>:</text:p>
      <text:p text:style-name="блок_5f_кода"><text:tab/><text:span text:style-name="T1">int</text:span> x;</text:p>
      <text:p text:style-name="блок_5f_кода">};</text:p>
      <text:p text:style-name="блок_5f_кода"><text:span text:style-name="T1">class</text:span> B : <text:span text:style-name="T1">virtual</text:span> <text:span text:style-name="T1">public</text:span> A {} ;</text:p>
      <text:p text:style-name="блок_5f_кода"><text:span text:style-name="T1">class</text:span> C : <text:span text:style-name="T1">virtual</text:span> <text:span text:style-name="T1">public</text:span> A {} ;</text:p>
      <text:p text:style-name="блок_5f_кода"><text:span text:style-name="T1">class</text:span> D : <text:span text:style-name="T1">public</text:span> B, <text:span text:style-name="T1">public</text:span> C {};</text:p>
      <text:p text:style-name="List_20_Heading">правильный ответ:</text:p>
      <text:p text:style-name="вариант_5f_ответа">Чтобы избежать неоднозначности при доступе к х из <text:span text:style-name="T3">D</text:span></text:p>
      <text:p text:style-name="List_20_Heading">ошибки:</text:p>
      <text:p text:style-name="вариант_5f_ошибка">Чтобы сделать х приватным в <text:span text:style-name="T3">D </text:span></text:p>
      <text:p text:style-name="вариант_5f_ошибка"><text:span text:style-name="T7">Чтобы запретить наследование от </text:span>D</text:p>
      <text:p text:style-name="вариант_5f_ошибка">Чтобы запретить наследование от А</text:p>
      <text:p text:style-name="вариант_5f_ошибка">Для ускорения работы программы</text:p>
      <text:p text:style-name="P5"/>
      <text:h text:style-name="Heading_20_3" text:outline-level="3">Что нужно сделать, чтобы освободить память, выделенную с помощью оператора <text:span text:style-name="T3">new?</text:span></text:h>
      <text:p text:style-name="List_20_Heading">правильный ответ:</text:p>
      <text:p text:style-name="вариант_5f_ответа">Вызвать функцию <text:span text:style-name="T2">delete</text:span></text:p>
      <text:p text:style-name="List_20_Heading">ошибки:</text:p>
      <text:p text:style-name="вариант_5f_ошибка">C++ <text:span text:style-name="T7">самостоятельно освободит память</text:span></text:p>
      <text:p text:style-name="вариант_5f_ошибка">Вызвать функцию <text:span text:style-name="T2">free</text:span></text:p>
      <text:p text:style-name="вариант_5f_ошибка">Явно вызвать деструктор объекта</text:p>
      <text:p text:style-name="вариант_5f_ошибка">Вызвать оператор <text:span text:style-name="T2">remove</text:span></text:p>
      <text:p text:style-name="P3"/>
      <text:h text:style-name="Heading_20_3" text:outline-level="3">Какие значения содержат переменные <text:span text:style-name="T3">a </text:span>и <text:span text:style-name="T3">b </text:span>после выполнения кода?</text:h>
      <text:p text:style-name="блок_5f_кода"><text:span text:style-name="T1">int</text:span> a = 8, b = 4;</text:p>
      <text:p text:style-name="блок_5f_кода"><text:span text:style-name="T1">int</text:span> *p = &amp;a;</text:p>
      <text:p text:style-name="блок_5f_кода"><text:span text:style-name="T1">int</text:span> *q = &amp;b;</text:p>
      <text:p text:style-name="блок_5f_кода"><text:span text:style-name="T1">int</text:span> **h = &amp;q;</text:p>
      <text:p text:style-name="блок_5f_кода">*p = *q;</text:p>
      <text:p text:style-name="блок_5f_кода">**h = 10;</text:p>
      <text:p text:style-name="List_20_Heading">правильный ответ:</text:p>
      <text:p text:style-name="вариант_5f_ответа">a=4, b=10;</text:p>
      <text:p text:style-name="List_20_Heading">ошибки:</text:p>
      <text:p text:style-name="вариант_5f_ошибка">a=10, b=10</text:p>
      <text:p text:style-name="вариант_5f_ошибка">a=8, b=4</text:p>
      <text:p text:style-name="вариант_5f_ошибка"><text:soft-page-break/>a=4, b=4</text:p>
      <text:p text:style-name="вариант_5f_ошибка">a=10, b=4</text:p>
      <text:p text:style-name="Standard"/>
      <text:h text:style-name="P10" text:outline-level="3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6-03T09:48:58.494000000</dc:date>
    <meta:editing-duration>PT16H25M5S</meta:editing-duration>
    <meta:editing-cycles>20</meta:editing-cycles>
    <meta:generator>LibreOffice/7.2.4.1$Windows_X86_64 LibreOffice_project/27d75539669ac387bb498e35313b970b7fe9c4f9</meta:generator>
    <meta:document-statistic meta:table-count="0" meta:image-count="0" meta:object-count="0" meta:page-count="5" meta:paragraph-count="126" meta:word-count="527" meta:character-count="3228" meta:non-whitespace-character-count="2794"/>
  </office:meta>
</office:document-meta>
</file>