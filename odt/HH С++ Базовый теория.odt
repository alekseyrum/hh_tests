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5bb" officeooo:paragraph-rsid="0007a5bb"/>
    </style:style>
    <style:style style:name="P2" style:family="paragraph" style:parent-style-name="Standard">
      <style:text-properties fo:language="en" fo:country="US" officeooo:rsid="000e2394" officeooo:paragraph-rsid="000e2394"/>
    </style:style>
    <style:style style:name="P3" style:family="paragraph" style:parent-style-name="Standard">
      <style:text-properties fo:language="en" fo:country="US" officeooo:rsid="000feebf" officeooo:paragraph-rsid="000feebf"/>
    </style:style>
    <style:style style:name="P4" style:family="paragraph" style:parent-style-name="Standard">
      <style:text-properties fo:language="ru" fo:country="RU" officeooo:rsid="000addf8" officeooo:paragraph-rsid="000addf8"/>
    </style:style>
    <style:style style:name="P5" style:family="paragraph" style:parent-style-name="Standard">
      <style:text-properties fo:language="ru" fo:country="RU" officeooo:rsid="000f7017" officeooo:paragraph-rsid="000f7017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3" style:list-style-name="">
      <style:text-properties fo:language="ru" fo:country="RU" officeooo:rsid="0012948c" officeooo:paragraph-rsid="0012948c"/>
    </style:style>
    <style:style style:name="P8" style:family="paragraph" style:parent-style-name="Text_20_body">
      <style:text-properties fo:language="ru" fo:country="RU" officeooo:rsid="0014a052" officeooo:paragraph-rsid="0012948c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7825e"/>
    </style:style>
    <style:style style:name="T5" style:family="text">
      <style:text-properties fo:language="en" fo:country="US" officeooo:rsid="0007a5bb"/>
    </style:style>
    <style:style style:name="T6" style:family="text">
      <style:text-properties fo:color="#ff5429" loext:opacity="100%"/>
    </style:style>
    <style:style style:name="T7" style:family="text">
      <style:text-properties fo:language="ru" fo:country="RU"/>
    </style:style>
    <style:style style:name="T8" style:family="text">
      <style:text-properties officeooo:rsid="000d1339"/>
    </style:style>
    <style:style style:name="T9" style:family="text">
      <style:text-properties fo:color="#800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С++ Базовый уровень</text:h>
      <text:h text:style-name="Heading_20_3" text:outline-level="3">Какой из приведенных циклов всегда выполнится хотя бы один раз?</text:h>
      <text:p text:style-name="List_20_Heading">правильный ответ:</text:p>
      <text:p text:style-name="вариант_5f_ответа"><text:span text:style-name="T1">while</text:span> (condition) { ... }</text:p>
      <text:p text:style-name="List_20_Heading">ошибки:</text:p>
      <text:p text:style-name="вариант_5f_ошибка"><text:span text:style-name="T1">do</text:span> { ... } <text:span text:style-name="T1">while</text:span> (condition)</text:p>
      <text:p text:style-name="вариант_5f_ошибка"><text:span text:style-name="T1">for</text:span> (int i = x; i &lt; 10; ++i) { ... }</text:p>
      <text:p text:style-name="вариант_5f_ошибка"><text:span text:style-name="T3">f</text:span><text:span text:style-name="T4">o</text:span><text:span text:style-name="T3">reach</text:span> (auto x:p) { ... }</text:p>
      <text:p text:style-name="вариант_5f_ошибка">loop { ... } until (condition)</text:p>
      <text:p text:style-name="Standard"/>
      <text:h text:style-name="Heading_20_3" text:outline-level="3">Как правильно считать строку с пробелами из консоли в переменную <text:span text:style-name="T3">std::string</text:span><text:span text:style-name="T5"> str</text:span><text:span text:style-name="T3">?</text:span></text:h>
      <text:p text:style-name="List_20_Heading">правильный ответ:</text:p>
      <text:p text:style-name="вариант_5f_ответа">std::<text:span text:style-name="T6">getline</text:span>(std::cin, str)</text:p>
      <text:p text:style-name="List_20_Heading">ошибки:</text:p>
      <text:p text:style-name="вариант_5f_ошибка">std::cin &gt;&gt; str</text:p>
      <text:p text:style-name="вариант_5f_ошибка">std::cin.<text:span text:style-name="T6">read</text:span>(std::cin, 100)</text:p>
      <text:p text:style-name="вариант_5f_ошибка"><text:span text:style-name="T6">scanf</text:span>("%s", &amp;str)</text:p>
      <text:p text:style-name="вариант_5f_ошибка">std::cin.<text:span text:style-name="T6">getch</text:span>(str,100)</text:p>
      <text:p text:style-name="P1"/>
      <text:h text:style-name="Heading_20_3" text:outline-level="3">Какое утверждение верно для данной функции?</text:h>
      <text:p text:style-name="блок_5f_кода"><text:span text:style-name="T1">int</text:span> f(<text:span text:style-name="T1">int</text:span> p) {</text:p>
      <text:p text:style-name="блок_5f_кода"><text:tab/><text:span text:style-name="T1">int</text:span> i = 25;</text:p>
      <text:p text:style-name="блок_5f_кода"><text:tab/><text:span text:style-name="T1">if</text:span> (i == p) {</text:p>
      <text:p text:style-name="блок_5f_кода"><text:tab/><text:tab/>std::cout &lt;&lt; "cpp\n";</text:p>
      <text:p text:style-name="блок_5f_кода"><text:tab/><text:tab/><text:span text:style-name="T1">int</text:span> k = f(p);</text:p>
      <text:p text:style-name="блок_5f_кода"><text:tab/><text:tab/><text:span text:style-name="T1">return</text:span> -1;</text:p>
      <text:p text:style-name="блок_5f_кода"><text:tab/>} <text:span text:style-name="T1">else</text:span> {</text:p>
      <text:p text:style-name="блок_5f_кода"><text:tab/><text:tab/><text:span text:style-name="T1">return</text:span> 0;</text:p>
      <text:p text:style-name="блок_5f_кода"><text:tab/>}</text:p>
      <text:p text:style-name="блок_5f_кода">}</text:p>
      <text:p text:style-name="List_20_Heading">правильный ответ:</text:p>
      <text:p text:style-name="вариант_5f_ответа">Функция выводит «срр» бесконечно, когда р = 25, пока стек не заполнится</text:p>
      <text:p text:style-name="List_20_Heading">ошибки:</text:p>
      <text:p text:style-name="вариант_5f_ошибка"><text:soft-page-break/>Функция возвращает ноль для всех значений р, меньших 25</text:p>
      <text:p text:style-name="вариант_5f_ошибка">Функция возвращает ноль для всех значений р, больших 25</text:p>
      <text:p text:style-name="вариант_5f_ошибка">Функция возвращает -1, когда р = 25</text:p>
      <text:p text:style-name="вариант_5f_ошибка">Функция выводит «срр» бесконечно для всех значений р, кроме 25, пока стек не заполнится</text:p>
      <text:p text:style-name="P4"/>
      <text:h text:style-name="Heading_20_3" text:outline-level="3">Разница между вектором <text:span text:style-name="T3">std::vector </text:span>и очередью <text:span text:style-name="T3">std::deque </text:span>заключается в том, что:</text:h>
      <text:p text:style-name="List_20_Heading">правильный ответ:</text:p>
      <text:p text:style-name="вариант_5f_ответа">Очередь позволяет быстро вставлять элементы как в конец, так и в начало контейнера</text:p>
      <text:p text:style-name="List_20_Heading">ошибки:</text:p>
      <text:p text:style-name="вариант_5f_ошибка">std::vector <text:span text:style-name="T7">никогда не выделяет динамическую память</text:span></text:p>
      <text:p text:style-name="вариант_5f_ошибка"><text:span text:style-name="T7">Вектор предназначен исключительно для элементов типа </text:span><text:span text:style-name="T1">bool</text:span></text:p>
      <text:p text:style-name="вариант_5f_ошибка">std::deque <text:span text:style-name="T7">позволяет быстро обращаться к элементу по его номеру</text:span></text:p>
      <text:p text:style-name="вариант_5f_ошибка">Они не отличаются друг от друга</text:p>
      <text:p text:style-name="P4"/>
      <text:h text:style-name="Heading_20_3" text:outline-level="3">У банка есть таблица с данными, где ключ — это номер счета, а данные — имя владельца. Банку необходимо часто определять имя клиента по номеру счета, а также добавлять и удалять данные о новых пользователях. Какой <text:span text:style-name="T3">STL-</text:span><text:span text:style-name="T8">контейнер будет эффективен для хранения таких данных?</text:span></text:h>
      <text:p text:style-name="List_20_Heading">правильный ответ:</text:p>
      <text:p text:style-name="вариант_5f_ответа">std::unordered_map</text:p>
      <text:p text:style-name="List_20_Heading">ошибки:</text:p>
      <text:p text:style-name="вариант_5f_ошибка">std::vector</text:p>
      <text:p text:style-name="вариант_5f_ошибка">std::list</text:p>
      <text:p text:style-name="вариант_5f_ошибка">std::queue</text:p>
      <text:p text:style-name="вариант_5f_ошибка">std::unordered_set</text:p>
      <text:p text:style-name="P4"/>
      <text:h text:style-name="Heading_20_3" text:outline-level="3">Какой механизм позволяет вызывать метод производного класса через указатель на базовый?</text:h>
      <text:p text:style-name="List_20_Heading">правильный ответ:</text:p>
      <text:p text:style-name="вариант_5f_ответа"><text:soft-page-break/>Динамический полиморфизм (виртуальные функции)</text:p>
      <text:p text:style-name="List_20_Heading">ошибки:</text:p>
      <text:p text:style-name="вариант_5f_ошибка">Статическое связывание</text:p>
      <text:p text:style-name="вариант_5f_ошибка">Множественное наследование</text:p>
      <text:p text:style-name="вариант_5f_ошибка">Шаблоны (<text:span text:style-name="T3">templates)</text:span></text:p>
      <text:p text:style-name="вариант_5f_ошибка">Перегрузка функций (<text:span text:style-name="T3">function overloading)</text:span></text:p>
      <text:p text:style-name="Standard"/>
      <text:h text:style-name="Heading_20_3" text:outline-level="3">Как нужно объявить переменную <text:span text:style-name="T3">count </text:span>на месте пропуска в классе <text:span text:style-name="T3">Player, </text:span>чтобы на экран было выведено 2?</text:h>
      <text:p text:style-name="блок_5f_кода">#<text:span text:style-name="T1">include</text:span> &lt;iostream&gt;</text:p>
      <text:p text:style-name="блок_5f_кода"><text:span text:style-name="T1">using</text:span> <text:span text:style-name="T1">namespace</text:span> std;</text:p>
      <text:p text:style-name="блок_5f_кода"><text:span text:style-name="T1">class</text:span> Player {</text:p>
      <text:p text:style-name="блок_5f_кода"><text:span text:style-name="T1">private</text:span>:</text:p>
      <text:p text:style-name="блок_5f_кода"><text:tab/>_____</text:p>
      <text:p text:style-name="блок_5f_кода"><text:span text:style-name="T1">public</text:span>:</text:p>
      <text:p text:style-name="блок_5f_кода"><text:tab/><text:span text:style-name="T1">Player</text:span>() {</text:p>
      <text:p text:style-name="блок_5f_кода"><text:tab/><text:tab/>count++;</text:p>
      <text:p text:style-name="блок_5f_кода"><text:tab/>}</text:p>
      <text:p text:style-name="блок_5f_кода"><text:tab/>~<text:span text:style-name="T1">Player</text:span>() {</text:p>
      <text:p text:style-name="блок_5f_кода"><text:tab/><text:tab/>count--;</text:p>
      <text:p text:style-name="блок_5f_кода"><text:tab/>}</text:p>
      <text:p text:style-name="блок_5f_кода"><text:tab/><text:span text:style-name="T1">static</text:span> <text:span text:style-name="T1">int</text:span> getCount() {</text:p>
      <text:p text:style-name="блок_5f_кода"><text:tab/><text:tab/><text:span text:style-name="T1">return</text:span> count;</text:p>
      <text:p text:style-name="блок_5f_кода"><text:tab/>}</text:p>
      <text:p text:style-name="блок_5f_кода">};</text:p>
      <text:p text:style-name="блок_5f_кода"><text:span text:style-name="T1">int</text:span> Player::count = 0;</text:p>
      <text:p text:style-name="блок_5f_кода"><text:span text:style-name="T1">int</text:span> main() {</text:p>
      <text:p text:style-name="блок_5f_кода"><text:tab/>Player p1, p2;</text:p>
      <text:p text:style-name="блок_5f_кода"><text:tab/>cout &lt;&lt; Player::<text:span text:style-name="T1">getCount</text:span>() &lt;&lt; endl;</text:p>
      <text:p text:style-name="блок_5f_кода"><text:tab/><text:span text:style-name="T1">return</text:span> 0; </text:p>
      <text:p text:style-name="блок_5f_кода">}</text:p>
      <text:p text:style-name="List_20_Heading">правильный ответ:</text:p>
      <text:p text:style-name="вариант_5f_ответа"><text:span text:style-name="T1">static int</text:span> count</text:p>
      <text:p text:style-name="List_20_Heading">ошибки:</text:p>
      <text:p text:style-name="вариант_5f_ошибка"><text:span text:style-name="T1">int static</text:span> count</text:p>
      <text:p text:style-name="вариант_5f_ошибка"><text:span text:style-name="T1">friend int</text:span> count</text:p>
      <text:p text:style-name="вариант_5f_ошибка"><text:span text:style-name="T1">int</text:span> count </text:p>
      <text:p text:style-name="вариант_5f_ошибка"><text:span text:style-name="T1">int</text:span> cost count</text:p>
      <text:p text:style-name="P2"/>
      <text:h text:style-name="Heading_20_3" text:outline-level="3">Для чего нужно <text:span text:style-name="T3">virtual </text:span>наследование в данном коде?</text:h>
      <text:p text:style-name="блок_5f_кода"><text:span text:style-name="T1">class</text:span> A {</text:p>
      <text:p text:style-name="блок_5f_кода"><text:soft-page-break/><text:span text:style-name="T1">public</text:span>:</text:p>
      <text:p text:style-name="блок_5f_кода"><text:tab/><text:span text:style-name="T1">int</text:span> x;</text:p>
      <text:p text:style-name="блок_5f_кода">};</text:p>
      <text:p text:style-name="блок_5f_кода"><text:span text:style-name="T1">class</text:span> B : <text:span text:style-name="T1">virtual</text:span> <text:span text:style-name="T1">public</text:span> A {} ;</text:p>
      <text:p text:style-name="блок_5f_кода"><text:span text:style-name="T1">class</text:span> C : <text:span text:style-name="T1">virtual</text:span> <text:span text:style-name="T1">public</text:span> A {} ;</text:p>
      <text:p text:style-name="блок_5f_кода"><text:span text:style-name="T1">class</text:span> D : <text:span text:style-name="T1">public</text:span> B, <text:span text:style-name="T1">public</text:span> C {};</text:p>
      <text:p text:style-name="List_20_Heading">правильный ответ:</text:p>
      <text:p text:style-name="вариант_5f_ответа">Чтобы избежать неоднозначности при доступе к х из <text:span text:style-name="T3">D</text:span></text:p>
      <text:p text:style-name="List_20_Heading">ошибки:</text:p>
      <text:p text:style-name="вариант_5f_ошибка">Чтобы сделать х приватным в <text:span text:style-name="T3">D </text:span></text:p>
      <text:p text:style-name="вариант_5f_ошибка"><text:span text:style-name="T7">Чтобы запретить наследование от </text:span>D</text:p>
      <text:p text:style-name="вариант_5f_ошибка">Чтобы запретить наследование от А</text:p>
      <text:p text:style-name="вариант_5f_ошибка">Для ускорения работы программы</text:p>
      <text:p text:style-name="P5"/>
      <text:h text:style-name="Heading_20_3" text:outline-level="3">Что нужно сделать, чтобы освободить память, выделенную с помощью оператора <text:span text:style-name="T3">new?</text:span></text:h>
      <text:p text:style-name="List_20_Heading">правильный ответ:</text:p>
      <text:p text:style-name="вариант_5f_ответа">Вызвать функцию <text:span text:style-name="T2">delete</text:span></text:p>
      <text:p text:style-name="List_20_Heading">ошибки:</text:p>
      <text:p text:style-name="вариант_5f_ошибка">C++ <text:span text:style-name="T7">самостоятельно освободит память</text:span></text:p>
      <text:p text:style-name="вариант_5f_ошибка">Вызвать функцию <text:span text:style-name="T2">free</text:span></text:p>
      <text:p text:style-name="вариант_5f_ошибка">Явно вызвать деструктор объекта</text:p>
      <text:p text:style-name="вариант_5f_ошибка">Вызвать оператор <text:span text:style-name="T2">remove</text:span></text:p>
      <text:p text:style-name="P3"/>
      <text:h text:style-name="Heading_20_3" text:outline-level="3">Какие значения содержат переменные <text:span text:style-name="T3">a </text:span>и <text:span text:style-name="T3">b </text:span>после выполнения кода?</text:h>
      <text:p text:style-name="блок_5f_кода"><text:span text:style-name="T1">int</text:span> a = 8, b = 4;</text:p>
      <text:p text:style-name="блок_5f_кода"><text:span text:style-name="T1">int</text:span> *p = &amp;a;</text:p>
      <text:p text:style-name="блок_5f_кода"><text:span text:style-name="T1">int</text:span> *q = &amp;b;</text:p>
      <text:p text:style-name="блок_5f_кода"><text:span text:style-name="T1">int</text:span> **h = &amp;q;</text:p>
      <text:p text:style-name="блок_5f_кода">*p = *q;</text:p>
      <text:p text:style-name="блок_5f_кода">**h = 10;</text:p>
      <text:p text:style-name="List_20_Heading">правильный ответ:</text:p>
      <text:p text:style-name="вариант_5f_ответа">a=4, b=10;</text:p>
      <text:p text:style-name="List_20_Heading">ошибки:</text:p>
      <text:p text:style-name="вариант_5f_ошибка">a=10, b=10</text:p>
      <text:p text:style-name="вариант_5f_ошибка">a=8, b=4</text:p>
      <text:p text:style-name="вариант_5f_ошибка"><text:soft-page-break/>a=4, b=4</text:p>
      <text:p text:style-name="вариант_5f_ошибка">a=10, b=4</text:p>
      <text:p text:style-name="Standard"/>
      <text:h text:style-name="Heading_20_3" text:outline-level="3">Чтобы вывести, сколько байт занимает определенный тип данных float, используется код:</text:h>
      <text:p text:style-name="List_20_Heading">правильный ответ:</text:p>
      <text:p text:style-name="вариант_5f_ответа">std::cout &lt;&lt; <text:span text:style-name="T1">sizeof</text:span>(<text:span text:style-name="T1">float</text:span>) &lt;&lt; std::endl</text:p>
      <text:p text:style-name="List_20_Heading">ошибки:</text:p>
      <text:p text:style-name="вариант_5f_ошибка">std::cout &lt;&lt; float ( sizeof ) &lt;&lt; std::endl</text:p>
      <text:p text:style-name="вариант_5f_ошибка">std::cout &lt;&lt; float.sizeof &lt;&lt; std::endl</text:p>
      <text:p text:style-name="вариант_5f_ошибка">std::cout &lt;&lt; float ( size ) &lt;&lt; std::endl</text:p>
      <text:p text:style-name="вариант_5f_ошибка">std::cout &lt;&lt; size.float &lt;&lt; std::endl</text:p>
      <text:p text:style-name="Standard"/>
      <text:h text:style-name="P7" text:outline-level="3">Выберите правильный вариант записи текстовой строки "Test" в файл output.txt:</text:h>
      <text:p text:style-name="List_20_Heading">правильный ответ:</text:p>
      <text:p text:style-name="вариант_5f_ответа">std::ofstream <text:span text:style-name="T9">fout</text:span>("output.txt"); fout &lt;&lt; "Test";</text:p>
      <text:p text:style-name="List_20_Heading">ошибки:</text:p>
      <text:p text:style-name="вариант_5f_ошибка">std::ofstream fout("output.txt"); fputs("Test", "output.txt");</text:p>
      <text:p text:style-name="вариант_5f_ошибка">fout=open("output.txt"); fout.print("Test");</text:p>
      <text:p text:style-name="вариант_5f_ошибка">open("output.txt", "w").write("Test");</text:p>
      <text:p text:style-name="вариант_5f_ошибка">write_file("output.txt", "Test");</text:p>
      <text:p text:style-name="Standard"/>
      <text:h text:style-name="Heading_20_3" text:outline-level="3">Что выведет функция при вызове F(-1)?</text:h>
      <text:p text:style-name="блок_5f_кода"><text:span text:style-name="T1">void</text:span> F(<text:span text:style-name="T1">int</text:span> n) {</text:p>
      <text:p text:style-name="блок_5f_кода"><text:tab/><text:span text:style-name="T1">if</text:span> (n &lt; 3) {</text:p>
      <text:p text:style-name="блок_5f_кода"><text:tab/><text:tab/>cout &lt;&lt; n;</text:p>
      <text:p text:style-name="блок_5f_кода"><text:tab/><text:tab/>F(n + 3);</text:p>
      <text:p text:style-name="блок_5f_кода"><text:tab/><text:tab/>F(n + 2);</text:p>
      <text:p text:style-name="блок_5f_кода"><text:tab/>}</text:p>
      <text:p text:style-name="блок_5f_кода">}</text:p>
      <text:p text:style-name="List_20_Heading">правильный ответ:</text:p>
      <text:p text:style-name="вариант_5f_ответа">-121</text:p>
      <text:p text:style-name="List_20_Heading">ошибки:</text:p>
      <text:p text:style-name="вариант_5f_ошибка"><text:soft-page-break/>122</text:p>
      <text:p text:style-name="вариант_5f_ошибка">2-1-1</text:p>
      <text:p text:style-name="вариант_5f_ошибка">121</text:p>
      <text:p text:style-name="вариант_5f_ошибка">-111</text:p>
      <text:p text:style-name="Standard"/>
      <text:h text:style-name="Heading_20_3" text:outline-level="3">Что делает функция push() для контейнера std::queue?</text:h>
      <text:p text:style-name="List_20_Heading">правильный ответ:</text:p>
      <text:p text:style-name="вариант_5f_ответа">Добавляет элемент в конец очереди</text:p>
      <text:p text:style-name="List_20_Heading">ошибки:</text:p>
      <text:p text:style-name="вариант_5f_ошибка">Добавляет элемент в начало очереди</text:p>
      <text:p text:style-name="вариант_5f_ошибка">Удаляет элемент из начала очереди</text:p>
      <text:p text:style-name="вариант_5f_ошибка">Находит середину очереди и добавляет элемент туда</text:p>
      <text:p text:style-name="вариант_5f_ошибка">Ничего не добавляет, так как функция push() не работает для queue</text:p>
      <text:p text:style-name="Standard"/>
      <text:h text:style-name="Heading_20_3" text:outline-level="3">Система онлайн покупки билетов на развлекательные мероприятия требует хранения кэш сессий пользователей с быстрым поиском. Какой STL-контейнер будет эффективен для хранения и обработки таких данных?</text:h>
      <text:p text:style-name="List_20_Heading">правильный ответ:</text:p>
      <text:p text:style-name="вариант_5f_ответа">std::unordered_map</text:p>
      <text:p text:style-name="List_20_Heading">ошибки:</text:p>
      <text:p text:style-name="вариант_5f_ошибка">std::queue</text:p>
      <text:p text:style-name="вариант_5f_ошибка">std::stack</text:p>
      <text:p text:style-name="вариант_5f_ошибка">std::vector</text:p>
      <text:p text:style-name="вариант_5f_ошибка">std::list</text:p>
      <text:p text:style-name="P8"/>
      <text:h text:style-name="Heading_20_3" text:outline-level="3">Что дочерний класс наследует от базового класса?</text:h>
      <text:p text:style-name="List_20_Heading">правильный ответ:</text:p>
      <text:p text:style-name="вариант_5f_ответа">Все <text:span text:style-name="T1">public</text:span> и <text:span text:style-name="T1">protected</text:span> члены базового класса </text:p>
      <text:p text:style-name="List_20_Heading">ошибки:</text:p>
      <text:p text:style-name="вариант_5f_ошибка"><text:soft-page-break/>Все public и private члены базового класса </text:p>
      <text:p text:style-name="вариант_5f_ошибка">Только public члены базового класса </text:p>
      <text:p text:style-name="вариант_5f_ошибка">Конструкторы и деструкторы</text:p>
      <text:p text:style-name="вариант_5f_ошибка">Дружественные функции</text:p>
      <text:p text:style-name="Text_20_body"/>
      <text:h text:style-name="Heading_20_3" text:outline-level="3">Что нужно вставить на место ____, чтобы программа вывела "Derived"?</text:h>
      <text:p text:style-name="блок_5f_кода">#<text:span text:style-name="T1">include</text:span> &lt;iostream&gt;</text:p>
      <text:p text:style-name="блок_5f_кода"><text:span text:style-name="T1">using</text:span> <text:span text:style-name="T1">namespace</text:span> std;</text:p>
      <text:p text:style-name="блок_5f_кода"><text:span text:style-name="T1">class</text:span> Base {</text:p>
      <text:p text:style-name="блок_5f_кода">public:</text:p>
      <text:p text:style-name="блок_5f_кода"><text:tab/>____ <text:span text:style-name="T1">void</text:span> show () {</text:p>
      <text:p text:style-name="блок_5f_кода"><text:tab/><text:tab/>cout &lt;&lt; "Base" &lt;&lt; endl;</text:p>
      <text:p text:style-name="блок_5f_кода"><text:tab/>}<text:tab/></text:p>
      <text:p text:style-name="блок_5f_кода">};</text:p>
      <text:p text:style-name="блок_5f_кода"><text:span text:style-name="T1">class</text:span> Derived : <text:span text:style-name="T1">public</text:span> Base {</text:p>
      <text:p text:style-name="блок_5f_кода"><text:span text:style-name="T1">public</text:span>:</text:p>
      <text:p text:style-name="блок_5f_кода"><text:tab/><text:span text:style-name="T1">void</text:span> show() {</text:p>
      <text:p text:style-name="блок_5f_кода"><text:tab/><text:tab/>cout &lt;&lt; "Derived" &lt;&lt; endl;</text:p>
      <text:p text:style-name="блок_5f_кода"><text:tab/>}</text:p>
      <text:p text:style-name="блок_5f_кода">};</text:p>
      <text:p text:style-name="блок_5f_кода"><text:span text:style-name="T1">int</text:span> main () {</text:p>
      <text:p text:style-name="блок_5f_кода"><text:tab/>Base *b = <text:span text:style-name="T1">new</text:span> Derived();</text:p>
      <text:p text:style-name="блок_5f_кода"><text:tab/>b-&gt;show();</text:p>
      <text:p text:style-name="блок_5f_кода"><text:tab/><text:span text:style-name="T1">delete</text:span> b;</text:p>
      <text:p text:style-name="блок_5f_кода"><text:tab/><text:span text:style-name="T1">return</text:span> 0;</text:p>
      <text:p text:style-name="блок_5f_кода">}</text:p>
      <text:p text:style-name="List_20_Heading">правильный ответ:</text:p>
      <text:p text:style-name="вариант_5f_ответа">virtual</text:p>
      <text:p text:style-name="List_20_Heading">ошибки:</text:p>
      <text:p text:style-name="вариант_5f_ошибка">override</text:p>
      <text:p text:style-name="вариант_5f_ошибка">const</text:p>
      <text:p text:style-name="вариант_5f_ошибка">inline</text:p>
      <text:p text:style-name="вариант_5f_ошибка">static</text:p>
      <text:p text:style-name="Text_20_body"/>
      <text:h text:style-name="Heading_20_3" text:outline-level="3">Выражение <text:span text:style-name="T1">const int</text:span>* wsk означает:</text:h>
      <text:p text:style-name="List_20_Heading">правильный ответ:</text:p>
      <text:p text:style-name="вариант_5f_ответа">Указатель на константный объект</text:p>
      <text:p text:style-name="List_20_Heading">ошибки:</text:p>
      <text:p text:style-name="вариант_5f_ошибка"><text:soft-page-break/>Указатель на объект</text:p>
      <text:p text:style-name="вариант_5f_ошибка">Обычный указатель</text:p>
      <text:p text:style-name="вариант_5f_ошибка">Константный указатель на константный объект</text:p>
      <text:p text:style-name="вариант_5f_ошибка">Константный указатель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20:43:18.138572600</meta:creation-date>
    <dc:date>2026-06-26T14:48:24.366000000</dc:date>
    <meta:editing-duration>PT18H40M8S</meta:editing-duration>
    <meta:editing-cycles>27</meta:editing-cycles>
    <meta:generator>LibreOffice/7.2.4.1$Windows_X86_64 LibreOffice_project/27d75539669ac387bb498e35313b970b7fe9c4f9</meta:generator>
    <meta:document-statistic meta:table-count="0" meta:image-count="0" meta:object-count="0" meta:page-count="8" meta:paragraph-count="217" meta:word-count="839" meta:character-count="5389" meta:non-whitespace-character-count="4710"/>
  </office:meta>
</office:document-meta>
</file>