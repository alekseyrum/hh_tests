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efcb" officeooo:paragraph-rsid="001defcb"/>
    </style:style>
    <style:style style:name="P2" style:family="paragraph" style:parent-style-name="вариант_5f_ошибка">
      <style:text-properties fo:language="en" fo:country="US"/>
    </style:style>
    <style:style style:name="P3" style:family="paragraph" style:parent-style-name="вариант_5f_ошибка">
      <style:text-properties fo:language="en" fo:country="US" officeooo:rsid="00218f57"/>
    </style:style>
    <style:style style:name="P4" style:family="paragraph" style:parent-style-name="вариант_5f_ошибка">
      <style:text-properties fo:language="en" fo:country="US" officeooo:rsid="002557f0"/>
    </style:style>
    <style:style style:name="P5" style:family="paragraph" style:parent-style-name="Standard">
      <style:text-properties fo:language="en" fo:country="US" officeooo:rsid="0020651f" officeooo:paragraph-rsid="00229cde"/>
    </style:style>
    <style:style style:name="P6" style:family="paragraph" style:parent-style-name="вариант_5f_ошибка">
      <style:text-properties fo:language="en" fo:country="US" officeooo:rsid="0020651f" officeooo:paragraph-rsid="002d9449"/>
    </style:style>
    <style:style style:name="P7" style:family="paragraph" style:parent-style-name="Standard">
      <style:text-properties fo:language="en" fo:country="US" officeooo:rsid="0020651f" officeooo:paragraph-rsid="002d9449"/>
    </style:style>
    <style:style style:name="P8" style:family="paragraph" style:parent-style-name="Standard">
      <style:text-properties fo:language="ru" fo:country="RU" officeooo:rsid="001defcb" officeooo:paragraph-rsid="001defcb"/>
    </style:style>
    <style:style style:name="P9" style:family="paragraph" style:parent-style-name="Standard">
      <style:text-properties fo:language="ru" fo:country="RU" officeooo:rsid="0020651f" officeooo:paragraph-rsid="0020651f"/>
    </style:style>
    <style:style style:name="P10" style:family="paragraph" style:parent-style-name="Standard">
      <style:text-properties fo:language="ru" fo:country="RU" officeooo:rsid="00218f57" officeooo:paragraph-rsid="00218f57"/>
    </style:style>
    <style:style style:name="P11" style:family="paragraph" style:parent-style-name="Standard">
      <style:text-properties fo:language="ru" fo:country="RU" officeooo:rsid="002a1188" officeooo:paragraph-rsid="002a1188"/>
    </style:style>
    <style:style style:name="P12" style:family="paragraph" style:parent-style-name="List_20_Heading">
      <style:text-properties officeooo:paragraph-rsid="002d9449"/>
    </style:style>
    <style:style style:name="P13" style:family="paragraph" style:parent-style-name="вариант_5f_ответа">
      <style:text-properties officeooo:paragraph-rsid="002d9449"/>
    </style:style>
    <style:style style:name="P14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15" style:family="paragraph" style:parent-style-name="Heading_20_3">
      <style:text-properties fo:language="ru" fo:country="RU"/>
    </style:style>
    <style:style style:name="P16" style:family="paragraph" style:parent-style-name="Heading_20_3">
      <style:text-properties officeooo:paragraph-rsid="002d9449"/>
    </style:style>
    <style:style style:name="P17" style:family="paragraph" style:parent-style-name="Heading_20_3">
      <style:text-properties officeooo:paragraph-rsid="002d9993"/>
    </style:style>
    <style:style style:name="P18" style:family="paragraph" style:parent-style-name="Heading_20_3">
      <style:text-properties fo:language="en" fo:country="US" officeooo:rsid="0020651f" officeooo:paragraph-rsid="002d9993"/>
    </style:style>
    <style:style style:name="P19" style:family="paragraph" style:parent-style-name="List_20_Heading">
      <style:text-properties officeooo:paragraph-rsid="002d9993"/>
    </style:style>
    <style:style style:name="P20" style:family="paragraph" style:parent-style-name="Standard">
      <style:text-properties fo:language="en" fo:country="US" officeooo:rsid="0020651f" officeooo:paragraph-rsid="0021a319"/>
    </style:style>
    <style:style style:name="P21" style:family="paragraph" style:parent-style-name="Standard">
      <style:text-properties fo:language="en" fo:country="US" officeooo:rsid="0020651f" officeooo:paragraph-rsid="00229cde"/>
    </style:style>
    <style:style style:name="P22" style:family="paragraph" style:parent-style-name="Standard">
      <style:text-properties fo:language="en" fo:country="US" officeooo:rsid="0020651f" officeooo:paragraph-rsid="002d9449"/>
    </style:style>
    <style:style style:name="P23" style:family="paragraph" style:parent-style-name="вариант_5f_ответа">
      <style:text-properties fo:language="en" fo:country="US" officeooo:rsid="002557f0"/>
    </style:style>
    <style:style style:name="P24" style:family="paragraph" style:parent-style-name="вариант_5f_ответа">
      <style:text-properties officeooo:paragraph-rsid="002d9993"/>
    </style:style>
    <style:style style:name="P25" style:family="paragraph" style:parent-style-name="вариант_5f_ошибка">
      <style:text-properties fo:language="en" fo:country="US" officeooo:rsid="0020651f" officeooo:paragraph-rsid="002d9993"/>
    </style:style>
    <style:style style:name="T1" style:family="text">
      <style:text-properties fo:language="en" fo:country="US" officeooo:rsid="002bfe9b"/>
    </style:style>
    <style:style style:name="T2" style:family="text">
      <style:text-properties fo:language="ru" fo:country="RU" officeooo:rsid="002bfe9b"/>
    </style:style>
    <style:style style:name="T3" style:family="text">
      <style:text-properties officeooo:rsid="002d9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Linux </text:span><text:span text:style-name="T2">Базовый</text:span> уровень</text:h>
      <text:h text:style-name="Heading_20_3" text:outline-level="3">Вы работаете в терминале и хотите увидеть, в каком каталоге находитесь сейчас. Какую команду нужно использовать?</text:h>
      <text:p text:style-name="List_20_Heading">правильный ответ:</text:p>
      <text:p text:style-name="вариант_5f_ответа">pwd</text:p>
      <text:p text:style-name="List_20_Heading">ошибки:</text:p>
      <text:p text:style-name="вариант_5f_ошибка">hostname</text:p>
      <text:p text:style-name="вариант_5f_ошибка">cd</text:p>
      <text:p text:style-name="вариант_5f_ошибка">ls</text:p>
      <text:p text:style-name="вариант_5f_ошибка">echo $PATH</text:p>
      <text:p text:style-name="Standard"/>
      <text:h text:style-name="Heading_20_3" text:outline-level="3">Вы находитесь в каталоге /home/user/docs/reports. Какой командой можно перейти в директорию /home/user/docs?</text:h>
      <text:p text:style-name="List_20_Heading">правильный ответ:</text:p>
      <text:p text:style-name="вариант_5f_ответа">cd ..</text:p>
      <text:p text:style-name="List_20_Heading">ошибки:</text:p>
      <text:p text:style-name="вариант_5f_ошибка">cd ~</text:p>
      <text:p text:style-name="вариант_5f_ошибка">cd root</text:p>
      <text:p text:style-name="вариант_5f_ошибка">cd ./docs</text:p>
      <text:p text:style-name="вариант_5f_ошибка">cd /</text:p>
      <text:p text:style-name="Standard"/>
      <text:h text:style-name="Heading_20_3" text:outline-level="3">Какой командой можно скопировать файл?</text:h>
      <text:p text:style-name="List_20_Heading">правильный ответ:</text:p>
      <text:p text:style-name="вариант_5f_ответа">cp</text:p>
      <text:p text:style-name="List_20_Heading">ошибки:</text:p>
      <text:p text:style-name="вариант_5f_ошибка">mv</text:p>
      <text:p text:style-name="вариант_5f_ошибка">pwd</text:p>
      <text:p text:style-name="вариант_5f_ошибка">ls</text:p>
      <text:p text:style-name="вариант_5f_ошибка">rm</text:p>
      <text:p text:style-name="Standard"/>
      <text:h text:style-name="P15" text:outline-level="3"><text:soft-page-break/>Какой командой можно скопировать файл data.csv в каталог ~/archive, не изменяя имя файла?</text:h>
      <text:p text:style-name="List_20_Heading">правильный ответ:</text:p>
      <text:p text:style-name="вариант_5f_ответа">cp data.csv ~/archive/</text:p>
      <text:p text:style-name="List_20_Heading">ошибки:</text:p>
      <text:p text:style-name="вариант_5f_ошибка">mv data.csv ~/archive/</text:p>
      <text:p text:style-name="вариант_5f_ошибка">touch ~/archive/data.csv</text:p>
      <text:p text:style-name="вариант_5f_ошибка">copy data.csv ~/archive/</text:p>
      <text:p text:style-name="вариант_5f_ошибка">rsync ~/archive/ data.csv</text:p>
      <text:p text:style-name="P1"/>
      <text:h text:style-name="Heading_20_3" text:outline-level="3">Что верно относительно команды locate?</text:h>
      <text:p text:style-name="List_20_Heading">правильный ответ:</text:p>
      <text:p text:style-name="вариант_5f_ответа">Она использует индекс базы и может не находить новые файлы</text:p>
      <text:p text:style-name="List_20_Heading">ошибки:</text:p>
      <text:p text:style-name="вариант_5f_ошибка">Она работает только с текстовыми файлами</text:p>
      <text:p text:style-name="вариант_5f_ошибка">Она показывает содержимое файла</text:p>
      <text:p text:style-name="вариант_5f_ошибка">Она заменяет find и grep одновременно</text:p>
      <text:p text:style-name="вариант_5f_ошибка">Она ищет только в текущем каталоге</text:p>
      <text:p text:style-name="P8"/>
      <text:h text:style-name="Heading_20_3" text:outline-level="3">Какой командой найти все .cfg-файлы и отобразить строки, содержищие "timeout" ?</text:h>
      <text:p text:style-name="List_20_Heading">правильный ответ:</text:p>
      <text:p text:style-name="вариант_5f_ответа">find . -name "*.cfg" | xargs grep "timeout"</text:p>
      <text:p text:style-name="List_20_Heading">ошибки:</text:p>
      <text:p text:style-name="вариант_5f_ошибка">grep "timeout" *.cfg</text:p>
      <text:p text:style-name="вариант_5f_ошибка">cat *.cfg | grep "timeout"</text:p>
      <text:p text:style-name="вариант_5f_ошибка">find . -text "timeout"</text:p>
      <text:p text:style-name="вариант_5f_ошибка">grep -r "timeout" *.cfg</text:p>
      <text:p text:style-name="P8"/>
      <text:h text:style-name="Heading_20_3" text:outline-level="3"><text:soft-page-break/>Какая команда позволит записать вывод команды ls в новый файл file.txt?</text:h>
      <text:p text:style-name="List_20_Heading">правильный ответ:</text:p>
      <text:p text:style-name="вариант_5f_ответа">ls &gt; file.txt</text:p>
      <text:p text:style-name="List_20_Heading">ошибки:</text:p>
      <text:p text:style-name="P2">ls &amp; file.txt</text:p>
      <text:p text:style-name="P2">ls &lt; file.txt</text:p>
      <text:p text:style-name="P2">ls | file.txt</text:p>
      <text:p text:style-name="P2">ls &gt;&gt; file.txt</text:p>
      <text:p text:style-name="P9"/>
      <text:h text:style-name="Heading_20_3" text:outline-level="3">Как вывести на экран и одновременно в файл output.log результат работы команды who?</text:h>
      <text:p text:style-name="List_20_Heading">правильный ответ:</text:p>
      <text:p text:style-name="вариант_5f_ответа">who | tee output.log</text:p>
      <text:p text:style-name="List_20_Heading">ошибки:</text:p>
      <text:p text:style-name="вариант_5f_ошибка">who &gt; output.log</text:p>
      <text:p text:style-name="вариант_5f_ошибка">who &gt;&gt; output.log</text:p>
      <text:p text:style-name="вариант_5f_ошибка">tee who &gt; output.log</text:p>
      <text:p text:style-name="вариант_5f_ошибка">who &lt; output.log</text:p>
      <text:p text:style-name="P10"/>
      <text:h text:style-name="Heading_20_3" text:outline-level="3">Кто может создавать новых пользователей в системе Linux по умолчанию?</text:h>
      <text:p text:style-name="List_20_Heading">правильный ответ:</text:p>
      <text:p text:style-name="вариант_5f_ответа">Только суперпользователь (root)</text:p>
      <text:p text:style-name="List_20_Heading">ошибки:</text:p>
      <text:p text:style-name="P3">Группа video</text:p>
      <text:p text:style-name="P3">Любой пользователь</text:p>
      <text:p text:style-name="P3">Только члены группы audio</text:p>
      <text:p text:style-name="P3">Любой зарегистрированный процесс</text:p>
      <text:p text:style-name="P9"/>
      <text:h text:style-name="Heading_20_3" text:outline-level="3"><text:soft-page-break/>Какой флаг команде usermod позволяет изменить домашнюю директорию пользователя?</text:h>
      <text:p text:style-name="List_20_Heading">правильный ответ:</text:p>
      <text:p text:style-name="вариант_5f_ответа">-d</text:p>
      <text:p text:style-name="List_20_Heading">ошибки:</text:p>
      <text:p text:style-name="вариант_5f_ошибка">-g</text:p>
      <text:p text:style-name="вариант_5f_ошибка">-u</text:p>
      <text:p text:style-name="вариант_5f_ошибка">-m</text:p>
      <text:p text:style-name="вариант_5f_ошибка">-p</text:p>
      <text:p text:style-name="P20"/>
      <text:h text:style-name="Heading_20_3" text:outline-level="3">Какой командой можно вывести список файлов и папок в текущем каталоге?</text:h>
      <text:p text:style-name="List_20_Heading">правильный ответ:</text:p>
      <text:p text:style-name="вариант_5f_ответа">ls</text:p>
      <text:p text:style-name="P11">ошибки:</text:p>
      <text:p text:style-name="вариант_5f_ошибка">hostname</text:p>
      <text:p text:style-name="вариант_5f_ошибка">cd</text:p>
      <text:p text:style-name="вариант_5f_ошибка">listdir</text:p>
      <text:p text:style-name="вариант_5f_ошибка">whoami</text:p>
      <text:p text:style-name="P11"/>
      <text:h text:style-name="Heading_20_3" text:outline-level="3">Какой командой можно перейти в домашний каталог, используя переменную окружения?</text:h>
      <text:p text:style-name="List_20_Heading">правильный ответ:</text:p>
      <text:p text:style-name="вариант_5f_ответа">cd $HOME</text:p>
      <text:p text:style-name="List_20_Heading">ошибки:</text:p>
      <text:p text:style-name="P4">cd ./</text:p>
      <text:p text:style-name="P4">cd /home/user</text:p>
      <text:p text:style-name="P4">cd root</text:p>
      <text:p text:style-name="P4">cd home</text:p>
      <text:p text:style-name="P5"/>
      <text:h text:style-name="Heading_20_3" text:outline-level="3"><text:soft-page-break/>Как называется команда, которая удаляет пустые директории?</text:h>
      <text:p text:style-name="List_20_Heading">правильный ответ:</text:p>
      <text:p text:style-name="P23">rmdir</text:p>
      <text:p text:style-name="List_20_Heading">ошибки:</text:p>
      <text:p text:style-name="P4">mv</text:p>
      <text:p text:style-name="P4">cp</text:p>
      <text:p text:style-name="P4">pwd</text:p>
      <text:p text:style-name="P4">rm</text:p>
      <text:p text:style-name="P5"/>
      <text:h text:style-name="Heading_20_3" text:outline-level="3">Чтобы скопировать каталог docs вместе с содержимым в директорию backup, какая команда подойдет?</text:h>
      <text:p text:style-name="List_20_Heading">правильный ответ:</text:p>
      <text:p text:style-name="вариант_5f_ответа">cp -r docs backup</text:p>
      <text:p text:style-name="List_20_Heading">ошибки:</text:p>
      <text:p text:style-name="P2">mv docs backup</text:p>
      <text:p text:style-name="P2">del docs backup</text:p>
      <text:p text:style-name="P2">rm docs backup</text:p>
      <text:p text:style-name="P2">cp docs backup</text:p>
      <text:p text:style-name="P5"/>
      <text:h text:style-name="P16" text:outline-level="3">Какой командой можно найти все строки с "error" в файле log.txt?</text:h>
      <text:p text:style-name="P12">правильный ответ:</text:p>
      <text:p text:style-name="P13">grep error log.txt</text:p>
      <text:p text:style-name="P12">ошибки:</text:p>
      <text:p text:style-name="P6">mv error log.txt</text:p>
      <text:p text:style-name="P6">ls error log.txt</text:p>
      <text:p text:style-name="P6">find error log.txt</text:p>
      <text:p text:style-name="P6">cat error log.txt</text:p>
      <text:p text:style-name="P5"/>
      <text:h text:style-name="P16" text:outline-level="3">Как вывести строки с числом "404" во всех log-файлах в текущей папке?</text:h>
      <text:p text:style-name="P12">правильный ответ:</text:p>
      <text:p text:style-name="P13"><text:soft-page-break/>grep 404 *.log</text:p>
      <text:p text:style-name="P12">ошибки:</text:p>
      <text:p text:style-name="P6">search 404 .log</text:p>
      <text:p text:style-name="P6">cat 404 *.log</text:p>
      <text:p text:style-name="P6">find . -name 404</text:p>
      <text:p text:style-name="P6">ls 404 *.log</text:p>
      <text:p text:style-name="P5"/>
      <text:h text:style-name="P16" text:outline-level="3">Какой символ используется для передачи вывода одной команды в качестве ввода другой?</text:h>
      <text:p text:style-name="P12">правильный ответ:</text:p>
      <text:p text:style-name="P13">|</text:p>
      <text:p text:style-name="P12">ошибки:</text:p>
      <text:p text:style-name="P6">&amp;</text:p>
      <text:p text:style-name="P6">&gt;</text:p>
      <text:p text:style-name="P6">!</text:p>
      <text:p text:style-name="P6">$</text:p>
      <text:p text:style-name="P5"/>
      <text:h text:style-name="P16" text:outline-level="3">Какая команда выведет первые 10 строк файла input.txt и добавит результат в файл result.txt без удаления старых данных в result.txt ?</text:h>
      <text:p text:style-name="P12">правильный ответ:</text:p>
      <text:p text:style-name="P13">head input.txt &gt;&gt; result.txt</text:p>
      <text:p text:style-name="P12">ошибки:</text:p>
      <text:p text:style-name="P6">cat input.txt &gt; result.txt</text:p>
      <text:p text:style-name="P6">tail input.txt &gt;&gt; result.txt</text:p>
      <text:p text:style-name="P6">head input.txt &gt; result.txt</text:p>
      <text:p text:style-name="P6">tail input.txt &gt; result.txt</text:p>
      <text:p text:style-name="P7"/>
      <text:p text:style-name="P7"/>
      <text:h text:style-name="P16" text:outline-level="3">Как удалить пользователя вместе с его домашней директорией?</text:h>
      <text:p text:style-name="P12">правильный ответ:</text:p>
      <text:p text:style-name="P13"><text:soft-page-break/>userdel -r</text:p>
      <text:p text:style-name="P12">ошибки:</text:p>
      <text:p text:style-name="P6">usermod -d</text:p>
      <text:p text:style-name="P6">deluser -p</text:p>
      <text:p text:style-name="P6">rmuser -h</text:p>
      <text:p text:style-name="P6">useradd -r</text:p>
      <text:p text:style-name="P7"/>
      <text:p text:style-name="P7"/>
      <text:h text:style-name="P17" text:outline-level="3">Какое основное назначение команды cd в Linux?</text:h>
      <text:p text:style-name="P19">правильный ответ:</text:p>
      <text:p text:style-name="P24">Перемещаться между каталогами</text:p>
      <text:p text:style-name="P19">ошибки:</text:p>
      <text:p text:style-name="P25">Сохранять изменения в файле</text:p>
      <text:p text:style-name="P25">Показывать содержимое файла</text:p>
      <text:p text:style-name="P25">Копировать файлы</text:p>
      <text:p text:style-name="P25">Удалять директории</text:p>
      <text:p text:style-name="P7"/>
      <text:p text:style-name="P5"/>
      <text:h text:style-name="P17" text:outline-level="3">Какая команда НЕ используется для работы с файлами и каталогами как объектами файловой системы?</text:h>
      <text:p text:style-name="P19">правильный ответ:</text:p>
      <text:p text:style-name="P24">grep</text:p>
      <text:p text:style-name="P19">ошибки:</text:p>
      <text:p text:style-name="P25">rm</text:p>
      <text:p text:style-name="P25">mv</text:p>
      <text:p text:style-name="P25">mkdir</text:p>
      <text:p text:style-name="P25">cp</text:p>
      <text:p text:style-name="P5"/>
      <text:h text:style-name="P17" text:outline-level="3"><text:span text:style-name="T3">------</text:span>Как удалить пользователя вместе с его домашней директорией?</text:h>
      <text:p text:style-name="P19">правильный ответ:</text:p>
      <text:p text:style-name="P24">userdel -r</text:p>
      <text:p text:style-name="P19"><text:soft-page-break/>ошибки:</text:p>
      <text:p text:style-name="P25">usermod -d</text:p>
      <text:p text:style-name="P25">deluser -p</text:p>
      <text:p text:style-name="P5"/>
      <text:h text:style-name="P17" text:outline-level="3">Вам нужно создать копию каталога project под именем project_backup. Какая команда подойдет?</text:h>
      <text:p text:style-name="P19">правильный ответ:</text:p>
      <text:p text:style-name="P24">cp -r project project_backup</text:p>
      <text:p text:style-name="P19">ошибки:</text:p>
      <text:p text:style-name="P25">cp project project_backup</text:p>
      <text:p text:style-name="P25">mv project project_backup</text:p>
      <text:p text:style-name="P25">touch project_backup project</text:p>
      <text:p text:style-name="P25">rm -r project project_backup</text:p>
      <text:p text:style-name="P5"/>
      <text:h text:style-name="P17" text:outline-level="3">Как найти все строки со словом "user" без учета регистра в файле data.txt?</text:h>
      <text:p text:style-name="P19">правильный ответ:</text:p>
      <text:p text:style-name="P24">grep -i user data.txt</text:p>
      <text:p text:style-name="P19">ошибки:</text:p>
      <text:p text:style-name="P25">search user -i data.txt</text:p>
      <text:p text:style-name="P25">find -i user data.txt</text:p>
      <text:p text:style-name="P25">grep user -no-case data.txt</text:p>
      <text:p text:style-name="P25">cat -i user data.txt</text:p>
      <text:p text:style-name="P5"/>
      <text:h text:style-name="P17" text:outline-level="3">Какой синтаксис используется для перенаправления стандартного потока ошибок в файл?</text:h>
      <text:p text:style-name="P19">правильный ответ:</text:p>
      <text:p text:style-name="P24">2&gt; filename.txt</text:p>
      <text:p text:style-name="P19">ошибки:</text:p>
      <text:p text:style-name="P25">&amp;2 &gt; filename.txt</text:p>
      <text:p text:style-name="P25">2 filename.txt</text:p>
      <text:p text:style-name="P25"><text:soft-page-break/>1&gt; filename.txt</text:p>
      <text:p text:style-name="P25">stderr &gt; filename.txt</text:p>
      <text:p text:style-name="P5"/>
      <text:h text:style-name="P17" text:outline-level="3">Как сохранить список всех процессов в файл proc.log , добавив данные в конец файла, а не перезаписывая его?</text:h>
      <text:p text:style-name="P19">правильный ответ:</text:p>
      <text:p text:style-name="P24">ps aux &gt;&gt; proc.log</text:p>
      <text:p text:style-name="P19">ошибки:</text:p>
      <text:p text:style-name="P25">ps aux &gt; proc.log</text:p>
      <text:p text:style-name="P25">cat proc.log &gt;&gt; ps</text:p>
      <text:p text:style-name="P25">echo proc.log &gt; ps aux</text:p>
      <text:p text:style-name="P25">ps aux | tail -f</text:p>
      <text:p text:style-name="P5"/>
      <text:h text:style-name="P17" text:outline-level="3">Что определяет принадлежность пользователя к группе в Linux?</text:h>
      <text:p text:style-name="P19">правильный ответ:</text:p>
      <text:p text:style-name="P24">Доступ к файлам, общим для группы</text:p>
      <text:p text:style-name="P19">ошибки:</text:p>
      <text:p text:style-name="P25">Установка даты и времени</text:p>
      <text:p text:style-name="P25">Возможность создавать пароли</text:p>
      <text:p text:style-name="P25">Доступ к своим настройкам</text:p>
      <text:p text:style-name="P25">Автоматическое удаление пользователя</text:p>
      <text:p text:style-name="P5"/>
      <text:h text:style-name="P17" text:outline-level="3">Как изменить основную группу пользователя ivan на devteam?</text:h>
      <text:p text:style-name="P19">правильный ответ:</text:p>
      <text:p text:style-name="P24">usermod -g devteam ivan</text:p>
      <text:p text:style-name="P19">ошибки:</text:p>
      <text:p text:style-name="P25">gpasswd -a ivan devteam</text:p>
      <text:p text:style-name="P25">groupmod -u devteam ivan</text:p>
      <text:p text:style-name="P25">usermod -G devteam ivan</text:p>
      <text:p text:style-name="P25">setfacl -m u:ivan:rw devteam</text:p>
      <text:p text:style-name="P5"><text:soft-page-break/></text:p>
      <text:p text:style-name="P5"/>
      <text:h text:style-name="P18" text:outline-level="3"/>
      <text:p text:style-name="P5"/>
      <text:p text:style-name="P5"/>
      <text:p text:style-name="P5"/>
      <text:p text:style-name="P5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29T12:34:51.468000000</dc:date>
    <meta:editing-duration>PT22H46M23S</meta:editing-duration>
    <meta:editing-cycles>35</meta:editing-cycles>
    <meta:generator>LibreOffice/7.2.4.1$Windows_X86_64 LibreOffice_project/27d75539669ac387bb498e35313b970b7fe9c4f9</meta:generator>
    <meta:document-statistic meta:table-count="0" meta:image-count="0" meta:object-count="0" meta:page-count="10" meta:paragraph-count="223" meta:word-count="776" meta:character-count="4994" meta:non-whitespace-character-count="4442"/>
  </office:meta>
</office:document-meta>
</file>