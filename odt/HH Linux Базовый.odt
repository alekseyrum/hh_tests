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2" style:family="paragraph" style:parent-style-name="Standard">
      <style:text-properties fo:language="en" fo:country="US" officeooo:rsid="001defcb" officeooo:paragraph-rsid="001defcb"/>
    </style:style>
    <style:style style:name="P3" style:family="paragraph" style:parent-style-name="Standard">
      <style:text-properties fo:language="ru" fo:country="RU" officeooo:rsid="001defcb" officeooo:paragraph-rsid="001defcb"/>
    </style:style>
    <style:style style:name="P4" style:family="paragraph" style:parent-style-name="вариант_5f_ошибка">
      <style:text-properties fo:language="en" fo:country="US"/>
    </style:style>
    <style:style style:name="P5" style:family="paragraph" style:parent-style-name="Standard">
      <style:text-properties fo:language="ru" fo:country="RU" officeooo:rsid="0020651f" officeooo:paragraph-rsid="0020651f"/>
    </style:style>
    <style:style style:name="P6" style:family="paragraph" style:parent-style-name="Standard">
      <style:text-properties fo:language="ru" fo:country="RU" officeooo:rsid="00218f57" officeooo:paragraph-rsid="00218f57"/>
    </style:style>
    <style:style style:name="P7" style:family="paragraph" style:parent-style-name="вариант_5f_ошибка">
      <style:text-properties fo:language="en" fo:country="US" officeooo:rsid="00218f57"/>
    </style:style>
    <style:style style:name="P8" style:family="paragraph" style:parent-style-name="Standard">
      <style:text-properties fo:language="ru" fo:country="RU" officeooo:rsid="0020651f" officeooo:paragraph-rsid="0021a319"/>
    </style:style>
    <style:style style:name="P9" style:family="paragraph" style:parent-style-name="Standard">
      <style:text-properties fo:language="ru" fo:country="RU" officeooo:rsid="002a1188" officeooo:paragraph-rsid="002a1188"/>
    </style:style>
    <style:style style:name="P10" style:family="paragraph" style:parent-style-name="вариант_5f_ошибка">
      <style:text-properties fo:language="en" fo:country="US" officeooo:rsid="002557f0"/>
    </style:style>
    <style:style style:name="P11" style:family="paragraph" style:parent-style-name="Standard">
      <style:text-properties fo:language="ru" fo:country="RU" officeooo:rsid="0020651f" officeooo:paragraph-rsid="00229cde"/>
    </style:style>
    <style:style style:name="P12" style:family="paragraph" style:parent-style-name="Standard">
      <style:text-properties fo:language="en" fo:country="US" officeooo:rsid="0020651f" officeooo:paragraph-rsid="00229cde"/>
    </style:style>
    <style:style style:name="P13" style:family="paragraph" style:parent-style-name="Heading_20_3">
      <style:text-properties officeooo:paragraph-rsid="002d9449"/>
    </style:style>
    <style:style style:name="P14" style:family="paragraph" style:parent-style-name="List_20_Heading">
      <style:text-properties officeooo:paragraph-rsid="002d9449"/>
    </style:style>
    <style:style style:name="P15" style:family="paragraph" style:parent-style-name="вариант_5f_ответа">
      <style:text-properties officeooo:paragraph-rsid="002d9449"/>
    </style:style>
    <style:style style:name="P16" style:family="paragraph" style:parent-style-name="вариант_5f_ошибка">
      <style:text-properties fo:language="en" fo:country="US" officeooo:rsid="0020651f" officeooo:paragraph-rsid="002d9449"/>
    </style:style>
    <style:style style:name="P17" style:family="paragraph" style:parent-style-name="Standard">
      <style:text-properties fo:language="en" fo:country="US" officeooo:rsid="0020651f" officeooo:paragraph-rsid="002d9449"/>
    </style:style>
    <style:style style:name="T1" style:family="text">
      <style:text-properties fo:language="en" fo:country="US" officeooo:rsid="002bfe9b"/>
    </style:style>
    <style:style style:name="T2" style:family="text">
      <style:text-properties fo:language="ru" fo:country="RU" officeooo:rsid="002bfe9b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55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Linux </text:span><text:span text:style-name="T2">Базовый</text:span> уровень</text:h>
      <text:h text:style-name="Heading_20_3" text:outline-level="3">Вы работаете в терминале и хотите увидеть, в каком каталоге находитесь сейчас. Какую команду нужно использовать?</text:h>
      <text:p text:style-name="List_20_Heading">правильный ответ:</text:p>
      <text:p text:style-name="вариант_5f_ответа">pwd</text:p>
      <text:p text:style-name="List_20_Heading">ошибки:</text:p>
      <text:p text:style-name="вариант_5f_ошибка">hostname</text:p>
      <text:p text:style-name="вариант_5f_ошибка">cd</text:p>
      <text:p text:style-name="вариант_5f_ошибка">ls</text:p>
      <text:p text:style-name="вариант_5f_ошибка">echo $PATH</text:p>
      <text:p text:style-name="Standard"/>
      <text:h text:style-name="Heading_20_3" text:outline-level="3">Вы находитесь в каталоге /home/user/docs/reports. Какой командой можно перейти в директорию /home/user/docs?</text:h>
      <text:p text:style-name="List_20_Heading">правильный ответ:</text:p>
      <text:p text:style-name="вариант_5f_ответа">cd ..</text:p>
      <text:p text:style-name="List_20_Heading">ошибки:</text:p>
      <text:p text:style-name="вариант_5f_ошибка">cd ~</text:p>
      <text:p text:style-name="вариант_5f_ошибка">cd root</text:p>
      <text:p text:style-name="вариант_5f_ошибка">cd ./docs</text:p>
      <text:p text:style-name="вариант_5f_ошибка">cd /</text:p>
      <text:p text:style-name="Standard"/>
      <text:h text:style-name="Heading_20_3" text:outline-level="3">Какой командой можно скопировать файл?</text:h>
      <text:p text:style-name="List_20_Heading">правильный ответ:</text:p>
      <text:p text:style-name="вариант_5f_ответа">cp</text:p>
      <text:p text:style-name="List_20_Heading">ошибки:</text:p>
      <text:p text:style-name="вариант_5f_ошибка">mv</text:p>
      <text:p text:style-name="вариант_5f_ошибка">pwd</text:p>
      <text:p text:style-name="вариант_5f_ошибка">ls</text:p>
      <text:p text:style-name="вариант_5f_ошибка">rm</text:p>
      <text:p text:style-name="Standard"/>
      <text:h text:style-name="Heading_20_3" text:outline-level="3"><text:soft-page-break/><text:span text:style-name="T3">Какой командой можно скопировать файл data.csv в каталог ~/archive, не изменяя имя файла?</text:span></text:h>
      <text:p text:style-name="List_20_Heading">правильный ответ:</text:p>
      <text:p text:style-name="вариант_5f_ответа">cp data.csv ~/archive/</text:p>
      <text:p text:style-name="List_20_Heading">ошибки:</text:p>
      <text:p text:style-name="вариант_5f_ошибка">mv data.csv ~/archive/</text:p>
      <text:p text:style-name="вариант_5f_ошибка">touch ~/archive/data.csv</text:p>
      <text:p text:style-name="вариант_5f_ошибка">copy data.csv ~/archive/</text:p>
      <text:p text:style-name="вариант_5f_ошибка">rsync ~/archive/ data.csv</text:p>
      <text:p text:style-name="P2"/>
      <text:h text:style-name="Heading_20_3" text:outline-level="3">Что верно относительно команды locate?</text:h>
      <text:p text:style-name="List_20_Heading">правильный ответ:</text:p>
      <text:p text:style-name="вариант_5f_ответа">Она использует индекс базы и может не находить новые файлы</text:p>
      <text:p text:style-name="List_20_Heading">ошибки:</text:p>
      <text:p text:style-name="вариант_5f_ошибка">Она работает только с текстовыми файлами</text:p>
      <text:p text:style-name="вариант_5f_ошибка">Она показывает содержимое файла</text:p>
      <text:p text:style-name="вариант_5f_ошибка">Она заменяет find и grep одновременно</text:p>
      <text:p text:style-name="вариант_5f_ошибка">Она ищет только в текущем каталоге</text:p>
      <text:p text:style-name="P3"/>
      <text:h text:style-name="Heading_20_3" text:outline-level="3">Какой командой найти все .cfg-файлы и отобразить строки, содержищие "timeout" ?</text:h>
      <text:p text:style-name="List_20_Heading">правильный ответ:</text:p>
      <text:p text:style-name="вариант_5f_ответа">find . -name "*.cfg" | xargs grep "timeout"</text:p>
      <text:p text:style-name="List_20_Heading">ошибки:</text:p>
      <text:p text:style-name="вариант_5f_ошибка">grep "timeout" *.cfg</text:p>
      <text:p text:style-name="вариант_5f_ошибка">cat *.cfg | grep "timeout"</text:p>
      <text:p text:style-name="вариант_5f_ошибка">find . -text "timeout"</text:p>
      <text:p text:style-name="вариант_5f_ошибка">grep -r "timeout" *.cfg</text:p>
      <text:p text:style-name="P3"/>
      <text:h text:style-name="Heading_20_3" text:outline-level="3"><text:soft-page-break/>Какая команда позволит записать вывод команды ls в новый файл file.txt?</text:h>
      <text:p text:style-name="List_20_Heading">правильный ответ:</text:p>
      <text:p text:style-name="вариант_5f_ответа">ls &gt; file.txt</text:p>
      <text:p text:style-name="List_20_Heading">ошибки:</text:p>
      <text:p text:style-name="P4">ls &amp; file.txt</text:p>
      <text:p text:style-name="P4">ls &lt; file.txt</text:p>
      <text:p text:style-name="P4">ls | file.txt</text:p>
      <text:p text:style-name="P4">ls &gt;&gt; file.txt</text:p>
      <text:p text:style-name="P5"/>
      <text:h text:style-name="Heading_20_3" text:outline-level="3">Как вывести на экран и одновременно в файл output.log результат работы команды who?</text:h>
      <text:p text:style-name="List_20_Heading">правильный ответ:</text:p>
      <text:p text:style-name="вариант_5f_ответа">who | tee output.log</text:p>
      <text:p text:style-name="List_20_Heading">ошибки:</text:p>
      <text:p text:style-name="вариант_5f_ошибка">who &gt; output.log</text:p>
      <text:p text:style-name="вариант_5f_ошибка">who &gt;&gt; output.log</text:p>
      <text:p text:style-name="вариант_5f_ошибка">tee who &gt; output.log</text:p>
      <text:p text:style-name="вариант_5f_ошибка">who &lt; output.log</text:p>
      <text:p text:style-name="P6"/>
      <text:h text:style-name="Heading_20_3" text:outline-level="3">Кто может создавать новых пользователей в системе Linux по умолчанию?</text:h>
      <text:p text:style-name="List_20_Heading">правильный ответ:</text:p>
      <text:p text:style-name="вариант_5f_ответа">Только суперпользователь (root)</text:p>
      <text:p text:style-name="List_20_Heading">ошибки:</text:p>
      <text:p text:style-name="P7">Группа video</text:p>
      <text:p text:style-name="P7">Любой пользователь</text:p>
      <text:p text:style-name="P7">Только члены группы audio</text:p>
      <text:p text:style-name="P7">Любой зарегистрированный процесс</text:p>
      <text:p text:style-name="P5"/>
      <text:h text:style-name="Heading_20_3" text:outline-level="3"><text:soft-page-break/>Какой флаг команде usermod позволяет изменить домашнюю директорию пользователя?</text:h>
      <text:p text:style-name="List_20_Heading">правильный ответ:</text:p>
      <text:p text:style-name="вариант_5f_ответа">-d</text:p>
      <text:p text:style-name="List_20_Heading">ошибки:</text:p>
      <text:p text:style-name="вариант_5f_ошибка">-g</text:p>
      <text:p text:style-name="вариант_5f_ошибка">-u</text:p>
      <text:p text:style-name="вариант_5f_ошибка">-m</text:p>
      <text:p text:style-name="вариант_5f_ошибка">-p</text:p>
      <text:p text:style-name="P8"><text:span text:style-name="T4"/></text:p>
      <text:h text:style-name="Heading_20_3" text:outline-level="3">Какой командой можно вывести список файлов и папок в текущем каталоге?</text:h>
      <text:p text:style-name="List_20_Heading">правильный ответ:</text:p>
      <text:p text:style-name="вариант_5f_ответа">ls</text:p>
      <text:p text:style-name="P9">ошибки:</text:p>
      <text:p text:style-name="вариант_5f_ошибка">hostname</text:p>
      <text:p text:style-name="вариант_5f_ошибка">cd</text:p>
      <text:p text:style-name="вариант_5f_ошибка">listdir</text:p>
      <text:p text:style-name="вариант_5f_ошибка">whoami</text:p>
      <text:p text:style-name="P9"/>
      <text:h text:style-name="Heading_20_3" text:outline-level="3">Какой командой можно перейти в домашний каталог, используя переменную окружения?</text:h>
      <text:p text:style-name="List_20_Heading">правильный ответ:</text:p>
      <text:p text:style-name="вариант_5f_ответа">cd $HOME</text:p>
      <text:p text:style-name="List_20_Heading">ошибки:</text:p>
      <text:p text:style-name="P10">cd ./</text:p>
      <text:p text:style-name="P10">cd /home/user</text:p>
      <text:p text:style-name="P10">cd root</text:p>
      <text:p text:style-name="P10">cd home</text:p>
      <text:p text:style-name="P11"><text:span text:style-name="T4"/></text:p>
      <text:h text:style-name="Heading_20_3" text:outline-level="3"><text:soft-page-break/>Как называется команда, которая удаляет пустые директории?</text:h>
      <text:p text:style-name="List_20_Heading">правильный ответ:</text:p>
      <text:p text:style-name="вариант_5f_ответа"><text:span text:style-name="T5">rmdir</text:span></text:p>
      <text:p text:style-name="List_20_Heading">ошибки:</text:p>
      <text:p text:style-name="P10">mv</text:p>
      <text:p text:style-name="P10">cp</text:p>
      <text:p text:style-name="P10">pwd</text:p>
      <text:p text:style-name="P10">rm</text:p>
      <text:p text:style-name="P11"><text:span text:style-name="T4"/></text:p>
      <text:h text:style-name="Heading_20_3" text:outline-level="3">Чтобы скопировать каталог docs вместе с содержимым в директорию backup, какая команда подойдет?</text:h>
      <text:p text:style-name="List_20_Heading">правильный ответ:</text:p>
      <text:p text:style-name="вариант_5f_ответа">cp -r docs backup</text:p>
      <text:p text:style-name="List_20_Heading">ошибки:</text:p>
      <text:p text:style-name="P4">mv docs backup</text:p>
      <text:p text:style-name="P4">del docs backup</text:p>
      <text:p text:style-name="P4">rm docs backup</text:p>
      <text:p text:style-name="P4">cp docs backup</text:p>
      <text:p text:style-name="P12"/>
      <text:h text:style-name="P13" text:outline-level="3">Какой командой можно найти все строки с "error" в файле log.txt?</text:h>
      <text:p text:style-name="P14">правильный ответ:</text:p>
      <text:p text:style-name="P15">grep error log.txt</text:p>
      <text:p text:style-name="P14">ошибки:</text:p>
      <text:p text:style-name="P16">mv error log.txt</text:p>
      <text:p text:style-name="P16">ls error log.txt</text:p>
      <text:p text:style-name="P16">find error log.txt</text:p>
      <text:p text:style-name="P16">cat error log.txt</text:p>
      <text:p text:style-name="P12"/>
      <text:h text:style-name="P13" text:outline-level="3">Как вывести строки с числом "404" во всех log-файлах в текущей папке?</text:h>
      <text:p text:style-name="P14">правильный ответ:</text:p>
      <text:p text:style-name="P15"><text:soft-page-break/>grep 404 *.log</text:p>
      <text:p text:style-name="P14">ошибки:</text:p>
      <text:p text:style-name="P16">search 404 .log</text:p>
      <text:p text:style-name="P16">cat 404 *.log</text:p>
      <text:p text:style-name="P16">find . -name 404</text:p>
      <text:p text:style-name="P16">ls 404 *.log</text:p>
      <text:p text:style-name="P12"/>
      <text:h text:style-name="P13" text:outline-level="3">Какой символ используется для передачи вывода одной команды в качестве ввода другой?</text:h>
      <text:p text:style-name="P14">правильный ответ:</text:p>
      <text:p text:style-name="P15">|</text:p>
      <text:p text:style-name="P14">ошибки:</text:p>
      <text:p text:style-name="P16">&amp;</text:p>
      <text:p text:style-name="P16">&gt;</text:p>
      <text:p text:style-name="P16">!</text:p>
      <text:p text:style-name="P16">$</text:p>
      <text:p text:style-name="P12"/>
      <text:h text:style-name="P13" text:outline-level="3">Какая команда выведет первые 10 строк файла input.txt и добавит результат в файл result.txt без удаления старых данных в result.txt ?</text:h>
      <text:p text:style-name="P14">правильный ответ:</text:p>
      <text:p text:style-name="P15">head input.txt &gt;&gt; result.txt</text:p>
      <text:p text:style-name="P14">ошибки:</text:p>
      <text:p text:style-name="P16">cat input.txt &gt; result.txt</text:p>
      <text:p text:style-name="P16">tail input.txt &gt;&gt; result.txt</text:p>
      <text:p text:style-name="P16">head input.txt &gt; result.txt</text:p>
      <text:p text:style-name="P16">tail input.txt &gt; result.txt</text:p>
      <text:p text:style-name="P17"/>
      <text:p text:style-name="P17"/>
      <text:h text:style-name="P13" text:outline-level="3">Как удалить пользователя вместе с его домашней директорией?</text:h>
      <text:p text:style-name="P14">правильный ответ:</text:p>
      <text:p text:style-name="P15"><text:soft-page-break/>userdel -r</text:p>
      <text:p text:style-name="P14">ошибки:</text:p>
      <text:p text:style-name="P16">usermod -d</text:p>
      <text:p text:style-name="P16">deluser -p</text:p>
      <text:p text:style-name="P16">rmuser -h</text:p>
      <text:p text:style-name="P16">useradd -r</text:p>
      <text:p text:style-name="P17"/>
      <text:p text:style-name="P17"/>
      <text:p text:style-name="P12"/>
      <text:p text:style-name="P12"/>
      <text:p text:style-name="P12"/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6-28T19:32:37.589719500</dc:date>
    <meta:editing-duration>PT19H53M20S</meta:editing-duration>
    <meta:editing-cycles>33</meta:editing-cycles>
    <meta:generator>LibreOffice/25.8.4.2$Windows_X86_64 LibreOffice_project/290daaa01b999472f0c7a3890eb6a550fd74c6df</meta:generator>
    <meta:document-statistic meta:table-count="0" meta:image-count="0" meta:object-count="0" meta:page-count="7" meta:paragraph-count="153" meta:word-count="514" meta:character-count="3252" meta:non-whitespace-character-count="2891"/>
  </office:meta>
</office:document-meta>
</file>