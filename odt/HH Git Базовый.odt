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 officeooo:paragraph-rsid="0027c7d8"/>
    </style:style>
    <style:style style:name="P2" style:family="paragraph" style:parent-style-name="Heading_20_3">
      <style:text-properties officeooo:rsid="0027c7d8" officeooo:paragraph-rsid="0027c7d8"/>
    </style:style>
    <style:style style:name="P3" style:family="paragraph" style:parent-style-name="Heading_20_3">
      <style:text-properties fo:language="ru" fo:country="RU"/>
    </style:style>
    <style:style style:name="P4" style:family="paragraph" style:parent-style-name="Standard">
      <style:text-properties fo:language="en" fo:country="US" officeooo:rsid="001defcb" officeooo:paragraph-rsid="001defcb"/>
    </style:style>
    <style:style style:name="P5" style:family="paragraph" style:parent-style-name="Standard">
      <style:text-properties fo:language="ru" fo:country="RU" officeooo:rsid="001defcb" officeooo:paragraph-rsid="001defcb"/>
    </style:style>
    <style:style style:name="P6" style:family="paragraph" style:parent-style-name="вариант_5f_ошибка">
      <style:text-properties fo:language="en" fo:country="US"/>
    </style:style>
    <style:style style:name="P7" style:family="paragraph" style:parent-style-name="Standard">
      <style:text-properties fo:language="ru" fo:country="RU" officeooo:rsid="0020651f" officeooo:paragraph-rsid="0020651f"/>
    </style:style>
    <style:style style:name="P8" style:family="paragraph" style:parent-style-name="Standard">
      <style:text-properties fo:language="ru" fo:country="RU" officeooo:rsid="00218f57" officeooo:paragraph-rsid="00218f57"/>
    </style:style>
    <style:style style:name="P9" style:family="paragraph" style:parent-style-name="вариант_5f_ошибка">
      <style:text-properties fo:language="en" fo:country="US" officeooo:rsid="00218f57"/>
    </style:style>
    <style:style style:name="P10" style:family="paragraph" style:parent-style-name="вариант_5f_ошибка">
      <style:text-properties fo:language="en" fo:country="US" officeooo:rsid="002557f0"/>
    </style:style>
    <style:style style:name="P11" style:family="paragraph" style:parent-style-name="Standard">
      <style:text-properties fo:language="en" fo:country="US" officeooo:rsid="0020651f" officeooo:paragraph-rsid="00229cde"/>
    </style:style>
    <style:style style:name="P12" style:family="paragraph" style:parent-style-name="Standard">
      <style:text-properties fo:language="ru" fo:country="RU" officeooo:rsid="0020651f" officeooo:paragraph-rsid="00229cde"/>
    </style:style>
    <style:style style:name="T1" style:family="text">
      <style:text-properties fo:language="en" fo:country="US" officeooo:rsid="002ffc32"/>
    </style:style>
    <style:style style:name="T2" style:family="text">
      <style:text-properties fo:language="en" fo:country="US" officeooo:rsid="0027c7d8"/>
    </style:style>
    <style:style style:name="T3" style:family="text">
      <style:text-properties fo:language="ru" fo:country="RU" officeooo:rsid="0027c7d8"/>
    </style:style>
    <style:style style:name="T4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git</text:span><text:span text:style-name="T2"> </text:span><text:span text:style-name="T3">Базовый уровень</text:span></text:h>
      <text:h text:style-name="P2" text:outline-level="3">Стартап разрабатывает новый продукт с командой из пяти человек. Какая особенность Git будет полезной на ранних этапах разработки, когда архитектура продукта часто меняется?</text:h>
      <text:p text:style-name="List_20_Heading">правильный ответ:</text:p>
      <text:p text:style-name="вариант_5f_ответа">Возможность легко создавать и объединять ветки для экспериментов с различными подходами</text:p>
      <text:p text:style-name="List_20_Heading">ошибки:</text:p>
      <text:p text:style-name="вариант_5f_ошибка">Возможность отслеживать, кто внес определенные изменения</text:p>
      <text:p text:style-name="вариант_5f_ошибка">Наличие подробной истории изменений кода, доступной через команды git log и git blame</text:p>
      <text:p text:style-name="вариант_5f_ошибка">Строгий контроль доступа к репозиторию</text:p>
      <text:p text:style-name="вариант_5f_ошибка">Поддержка pre-commit-хуков, которые автоматически запускают проверки перед фиксацией изменений</text:p>
      <text:p text:style-name="Standard"/>
      <text:h text:style-name="Heading_20_3" text:outline-level="3">Какой командой отвязать Git от глобального e-mail, оставив его пустым?</text:h>
      <text:p text:style-name="List_20_Heading">правильный ответ:</text:p>
      <text:p text:style-name="вариант_5f_ответа">git config --unset --global user.email</text:p>
      <text:p text:style-name="List_20_Heading">ошибки:</text:p>
      <text:p text:style-name="вариант_5f_ошибка">git config --global user.email """"</text:p>
      <text:p text:style-name="вариант_5f_ошибка">git delete --global user.email</text:p>
      <text:p text:style-name="вариант_5f_ошибка">git remove --global user.email</text:p>
      <text:p text:style-name="вариант_5f_ошибка">git config user.email -</text:p>
      <text:p text:style-name="Standard"/>
      <text:h text:style-name="Heading_20_3" text:outline-level="3">Компания переходит на Git с другой системы контроля версий. Вам нужно создать репозиторий, который будет содержать все афйлы проекта, но без истории изменений. Какой из следующих подходов соответствует этой задаче?</text:h>
      <text:p text:style-name="List_20_Heading">правильный ответ:</text:p>
      <text:p text:style-name="вариант_5f_ответа">git init &amp;&amp; cp -r old_project/* . &amp;&amp; git add . &amp;&amp; git commit -m "Initial commit"</text:p>
      <text:p text:style-name="List_20_Heading">ошибки:</text:p>
      <text:p text:style-name="вариант_5f_ошибка"><text:soft-page-break/>git clone old_project/.git &amp;&amp; rm -rf .git &amp;&amp; git init &amp;&amp; git add . &amp;&amp; git commit -m "Initial commit"</text:p>
      <text:p text:style-name="вариант_5f_ошибка">git init &amp;&amp; rsync -av old_project/ . &amp;&amp; git commit -am "Initial commit"</text:p>
      <text:p text:style-name="вариант_5f_ошибка">tar -czf backup.tar.gz old_project &amp;&amp; git init &amp;&amp; git add . &amp;&amp; git commit -m "Initial commit"</text:p>
      <text:p text:style-name="вариант_5f_ошибка">git archive --format=tar HEAD | tar -x -C new_folder &amp;&amp; git init &amp;&amp; git add . &amp;&amp; git commit -m "Initial commit"</text:p>
      <text:p text:style-name="Standard"/>
      <text:h text:style-name="P3" text:outline-level="3">Вы внесли изменения в несколько отслеживаемых файлов проекта и хотите зафиксировать их в истории репозитория с комментарием. Какая команда позволит это сделать одним шагом, без предварительного вызова git add ?</text:h>
      <text:p text:style-name="List_20_Heading">правильный ответ:</text:p>
      <text:p text:style-name="вариант_5f_ответа">git commit -am "Комментарий"</text:p>
      <text:p text:style-name="List_20_Heading">ошибки:</text:p>
      <text:p text:style-name="вариант_5f_ошибка">git commit --all --allow-empty-message</text:p>
      <text:p text:style-name="вариант_5f_ошибка">git add . &amp;&amp; git commit -m "Комментарий"</text:p>
      <text:p text:style-name="вариант_5f_ошибка">git commit -m "Комментарий"</text:p>
      <text:p text:style-name="вариант_5f_ошибка">git commit --amend "Комментарий"</text:p>
      <text:p text:style-name="P4"/>
      <text:h text:style-name="Heading_20_3" text:outline-level="3">Вы хотите, чтобы Git игнорировал все файлы с расширением .tmp во всех папках проекта. Какую строку нужно добавить в .gitignore?</text:h>
      <text:p text:style-name="List_20_Heading">правильный ответ:</text:p>
      <text:p text:style-name="вариант_5f_ответа">.tmp</text:p>
      <text:p text:style-name="List_20_Heading">ошибки:</text:p>
      <text:p text:style-name="вариант_5f_ошибка">tmp/</text:p>
      <text:p text:style-name="вариант_5f_ошибка">\tmp</text:p>
      <text:p text:style-name="вариант_5f_ошибка">/tmp</text:p>
      <text:p text:style-name="вариант_5f_ошибка">tmp.</text:p>
      <text:p text:style-name="P5"/>
      <text:h text:style-name="Heading_20_3" text:outline-level="3"><text:soft-page-break/>Вы хотите узнать, какие ветки существуют в вашем локальном репозитории и какая из них активна в данный момент. Какая команда позволит это сделать?</text:h>
      <text:p text:style-name="List_20_Heading">правильный ответ:</text:p>
      <text:p text:style-name="вариант_5f_ответа">git branch</text:p>
      <text:p text:style-name="List_20_Heading">ошибки:</text:p>
      <text:p text:style-name="вариант_5f_ошибка">git show-branch</text:p>
      <text:p text:style-name="вариант_5f_ошибка">git log --branches</text:p>
      <text:p text:style-name="вариант_5f_ошибка">git rev-parse --abbrev-ref HEAD</text:p>
      <text:p text:style-name="вариант_5f_ошибка">git show-ref --heads</text:p>
      <text:p text:style-name="P5"/>
      <text:h text:style-name="Heading_20_3" text:outline-level="3">Вы работаете в команде над проектом с длинной историей коммитов. Вам нужно понять, как изменялась определенная функциональность со временем. Какая команда Git позволит вам увидеть историю изменений конкретной функции или метода в коде?</text:h>
      <text:p text:style-name="List_20_Heading">правильный ответ:</text:p>
      <text:p text:style-name="вариант_5f_ответа">git log -L:&lt;имя_функции&gt;:файл.txt</text:p>
      <text:p text:style-name="List_20_Heading">ошибки:</text:p>
      <text:p text:style-name="P6">git diff файл.txt</text:p>
      <text:p text:style-name="P6">git log -p файл.txt</text:p>
      <text:p text:style-name="P6">git grep имя_функции</text:p>
      <text:p text:style-name="P6">git log --stat файл.txt</text:p>
      <text:p text:style-name="P7"/>
      <text:h text:style-name="Heading_20_3" text:outline-level="3">Вы работаете в команде над проектом и хотите узнать, какие изменения внес конкретный разработчик (например, user@example.com). Какая команда Git позволит просмотреть все коммиты этого автора?</text:h>
      <text:p text:style-name="List_20_Heading">правильный ответ:</text:p>
      <text:p text:style-name="вариант_5f_ответа">git log --author=user@example.com</text:p>
      <text:p text:style-name="List_20_Heading">ошибки:</text:p>
      <text:p text:style-name="вариант_5f_ошибка">git log --author="User Name"<text:tab/><text:tab/>ГуглИИ написал, что это тоже подойдет</text:p>
      <text:p text:style-name="вариант_5f_ошибка">git log --grep=user@example.com</text:p>
      <text:p text:style-name="вариант_5f_ошибка"><text:soft-page-break/>git log --committer=user@example.com</text:p>
      <text:p text:style-name="вариант_5f_ошибка">git shortlog -sne</text:p>
      <text:p text:style-name="P8"/>
      <text:h text:style-name="Heading_20_3" text:outline-level="3">Чтобы отменить добавление файла в индекс перед комитом, какую комманду нужно использовать?</text:h>
      <text:p text:style-name="List_20_Heading">правильный ответ:</text:p>
      <text:p text:style-name="вариант_5f_ответа">git reset HEAD file.txt</text:p>
      <text:p text:style-name="List_20_Heading">ошибки:</text:p>
      <text:p text:style-name="P9">git revert file.txt</text:p>
      <text:p text:style-name="P9">git merge file.txt</text:p>
      <text:p text:style-name="P9">git status file.txt</text:p>
      <text:p text:style-name="P9">git stash apply</text:p>
      <text:p text:style-name="P7"/>
      <text:h text:style-name="Heading_20_3" text:outline-level="3">После git commit вы поняли, что забыли добавить важный файл. Как лучше откатить и добавить файл, не нарушая истории?</text:h>
      <text:p text:style-name="List_20_Heading">правильный ответ:</text:p>
      <text:p text:style-name="вариант_5f_ответа">Сделать git reset --soft HEAD~1, добавить файл и закоммитить</text:p>
      <text:p text:style-name="List_20_Heading">ошибки:</text:p>
      <text:p text:style-name="P10">Вызвать git rebase</text:p>
      <text:p text:style-name="P10">git stash pop</text:p>
      <text:p text:style-name="P10">Выполнить git merge</text:p>
      <text:p text:style-name="P10">Использовать git revert HEAD</text:p>
      <text:p text:style-name="P11"/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6-20T14:56:32.328429900</dc:date>
    <meta:editing-duration>PT21H26M16S</meta:editing-duration>
    <meta:editing-cycles>38</meta:editing-cycles>
    <meta:generator>LibreOffice/25.8.4.2$Windows_X86_64 LibreOffice_project/290daaa01b999472f0c7a3890eb6a550fd74c6df</meta:generator>
    <meta:document-statistic meta:table-count="0" meta:image-count="0" meta:object-count="0" meta:page-count="4" meta:paragraph-count="81" meta:word-count="551" meta:character-count="3608" meta:non-whitespace-character-count="3155"/>
  </office:meta>
</office:document-meta>
</file>